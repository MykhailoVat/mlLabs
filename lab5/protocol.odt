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8000001F4DA16E8AA.png" manifest:media-type="image/png"/>
  <manifest:file-entry manifest:full-path="Pictures/10000000000001DA0000010BA4EEB0C2.png" manifest:media-type="image/png"/>
  <manifest:file-entry manifest:full-path="Pictures/10000000000001DA0000013C0FE38469.png" manifest:media-type="image/png"/>
  <manifest:file-entry manifest:full-path="Pictures/10000001000003200000025848B6D63B.png" manifest:media-type="image/png"/>
  <manifest:file-entry manifest:full-path="Pictures/10000001000003E8000003E84E9C9400.png" manifest:media-type="image/png"/>
  <manifest:file-entry manifest:full-path="Pictures/1000000100000320000002583C693A05.png" manifest:media-type="image/png"/>
  <manifest:file-entry manifest:full-path="Pictures/1000000100000320000002586FECAD69.png" manifest:media-type="image/png"/>
  <manifest:file-entry manifest:full-path="Pictures/100000010000032000000258366CFDD6.png" manifest:media-type="image/png"/>
  <manifest:file-entry manifest:full-path="Pictures/100000010000032000000258BFA2D73E.png" manifest:media-type="image/png"/>
  <manifest:file-entry manifest:full-path="Pictures/10000001000003E8000003E8E4A5AE79.png" manifest:media-type="image/png"/>
  <manifest:file-entry manifest:full-path="Pictures/1000000100000320000002584B777C69.png" manifest:media-type="image/png"/>
  <manifest:file-entry manifest:full-path="Pictures/10000001000003E8000003E8B84D9A38.png" manifest:media-type="image/png"/>
  <manifest:file-entry manifest:full-path="Pictures/100000010000032000000258B0F96186.png" manifest:media-type="image/png"/>
  <manifest:file-entry manifest:full-path="Pictures/10000001000003E8000001F4F2BA8E2C.png" manifest:media-type="image/png"/>
  <manifest:file-entry manifest:full-path="Pictures/10000001000003E8000001F448A8991B.png" manifest:media-type="image/png"/>
  <manifest:file-entry manifest:full-path="Pictures/10000000000003640000028B06C8C8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1514912"/>
    </style:style>
    <style:style style:name="P3" style:family="paragraph" style:parent-style-name="Preformatted_20_Text">
      <style:paragraph-properties fo:text-align="start" style:justify-single-word="false"/>
    </style:style>
    <style:style style:name="P4" style:family="paragraph" style:parent-style-name="Preformatted_20_Text">
      <style:text-properties officeooo:paragraph-rsid="0024b6db"/>
    </style:style>
    <style:style style:name="P5" style:family="paragraph" style:parent-style-name="Preformatted_20_Text">
      <style:text-properties fo:font-size="12pt" style:text-underline-style="solid" style:text-underline-width="auto" style:text-underline-color="font-color" fo:font-weight="bold" officeooo:paragraph-rsid="0024b6db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style:font-size-asian="12pt" style:font-size-complex="12pt"/>
    </style:style>
    <style:style style:name="P7" style:family="paragraph" style:parent-style-name="Preformatted_20_Text">
      <style:text-properties fo:font-size="12pt" officeooo:paragraph-rsid="01154888" style:font-size-asian="12pt" style:font-size-complex="12pt"/>
    </style:style>
    <style:style style:name="P8" style:family="paragraph" style:parent-style-name="Preformatted_20_Text">
      <style:text-properties fo:font-size="12pt" officeooo:rsid="01525aec" officeooo:paragraph-rsid="01525aec" style:font-size-asian="12pt" style:font-size-complex="12pt"/>
    </style:style>
    <style:style style:name="P9" style:family="paragraph" style:parent-style-name="Preformatted_20_Text">
      <style:text-properties fo:font-size="12pt" officeooo:rsid="0127bc7a" style:font-size-asian="12pt" style:font-size-complex="12pt"/>
    </style:style>
    <style:style style:name="P10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fo:font-size="12pt" style:text-underline-style="none" officeooo:rsid="00d52a01" officeooo:paragraph-rsid="00d52a01" style:font-size-asian="10.5pt" style:font-size-complex="12pt"/>
    </style:style>
    <style:style style:name="P12" style:family="paragraph" style:parent-style-name="Preformatted_20_Text">
      <style:text-properties fo:font-size="12pt" style:text-underline-style="none" officeooo:rsid="01574eec" officeooo:paragraph-rsid="01574eec" style:font-size-asian="10.5pt" style:font-size-complex="12pt"/>
    </style:style>
    <style:style style:name="P13" style:family="paragraph" style:parent-style-name="Standard">
      <loext:graphic-properties draw:fill="solid" draw:fill-color="#191a1c"/>
      <style:paragraph-properties fo:background-color="#191a1c" fo:padding="0cm" fo:border="none" style:shadow="none"/>
    </style:style>
    <style:style style:name="P14" style:family="paragraph" style:parent-style-name="Standard">
      <loext:graphic-properties draw:fill="solid" draw:fill-color="#191a1c"/>
      <style:paragraph-properties fo:background-color="#191a1c" fo:padding="0cm" fo:border="none" style:shadow="none"/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P15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4dcc5e" officeooo:paragraph-rsid="012189d3" style:font-size-asian="10pt" style:font-style-asian="normal" style:font-weight-asian="normal" style:font-size-complex="12pt"/>
    </style:style>
    <style:style style:name="P16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574eec" officeooo:paragraph-rsid="01574eec" style:font-size-asian="10pt" style:font-style-asian="normal" style:font-weight-asian="normal" style:font-size-complex="12pt"/>
    </style:style>
    <style:style style:name="P17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591b9d" officeooo:paragraph-rsid="01591b9d" style:font-size-asian="10pt" style:font-style-asian="normal" style:font-weight-asian="normal" style:font-size-complex="12pt"/>
    </style:style>
    <style:style style:name="P18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591b9d" officeooo:paragraph-rsid="015ad769" style:font-size-asian="10pt" style:font-style-asian="normal" style:font-weight-asian="normal" style:font-size-complex="12pt"/>
    </style:style>
    <style:style style:name="P19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5ad769" officeooo:paragraph-rsid="015ad769" style:font-size-asian="10pt" style:font-style-asian="normal" style:font-weight-asian="normal" style:font-size-complex="12pt"/>
    </style:style>
    <style:style style:name="P20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603fcb" officeooo:paragraph-rsid="01603fcb" style:font-size-asian="10pt" style:font-style-asian="normal" style:font-weight-asian="normal" style:font-size-complex="12pt"/>
    </style:style>
    <style:style style:name="P21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648a19" officeooo:paragraph-rsid="01658885" style:font-size-asian="10pt" style:font-style-asian="normal" style:font-weight-asian="normal" style:font-size-complex="12pt"/>
    </style:style>
    <style:style style:name="P22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658885" officeooo:paragraph-rsid="01658885" style:font-size-asian="10pt" style:font-style-asian="normal" style:font-weight-asian="normal" style:font-size-complex="12pt"/>
    </style:style>
    <style:style style:name="P23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684b4f" officeooo:paragraph-rsid="01684b4f" style:font-size-asian="10pt" style:font-style-asian="normal" style:font-weight-asian="normal" style:font-size-complex="12pt"/>
    </style:style>
    <style:style style:name="P24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745595" officeooo:paragraph-rsid="01745595" style:font-size-asian="10pt" style:font-style-asian="normal" style:font-weight-asian="normal" style:font-size-complex="12pt"/>
    </style:style>
    <style:style style:name="P25" style:family="paragraph" style:parent-style-name="Standard">
      <loext:graphic-properties draw:fill="solid" draw:fill-color="#191a1c"/>
      <style:paragraph-properties fo:background-color="#191a1c" fo:padding="0cm" fo:border="none" style:shadow="none"/>
      <style:text-properties officeooo:paragraph-rsid="01745595"/>
    </style:style>
    <style:style style:name="P26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7579b2" officeooo:paragraph-rsid="017579b2" style:font-size-asian="10pt" style:font-style-asian="normal" style:font-weight-asian="normal" style:font-size-complex="12pt"/>
    </style:style>
    <style:style style:name="P27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75956c" officeooo:paragraph-rsid="0175956c" style:font-size-asian="10pt" style:font-style-asian="normal" style:font-weight-asian="normal" style:font-size-complex="12pt"/>
    </style:style>
    <style:style style:name="P28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76e5af" officeooo:paragraph-rsid="0176e5af" style:font-size-asian="10pt" style:font-style-asian="normal" style:font-weight-asian="normal" style:font-size-complex="12pt"/>
    </style:style>
    <style:style style:name="P29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780ee0" officeooo:paragraph-rsid="01780ee0" style:font-size-asian="10pt" style:font-style-asian="normal" style:font-weight-asian="normal" style:font-size-complex="12pt"/>
    </style:style>
    <style:style style:name="P30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784006" officeooo:paragraph-rsid="01784006" style:font-size-asian="10pt" style:font-style-asian="normal" style:font-weight-asian="normal" style:font-size-complex="12pt"/>
    </style:style>
    <style:style style:name="P31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79e6a7" officeooo:paragraph-rsid="0179e6a7" style:font-size-asian="10pt" style:font-style-asian="normal" style:font-weight-asian="normal" style:font-size-complex="12pt"/>
    </style:style>
    <style:style style:name="P32" style:family="paragraph" style:parent-style-name="Standard">
      <style:text-properties fo:color="#000000" loext:opacity="100%" style:font-name="JetBrains Mono" fo:font-size="10pt" fo:font-style="normal" style:text-underline-style="solid" style:text-underline-width="auto" style:text-underline-color="font-color" fo:font-weight="normal" officeooo:rsid="017c7dd8" officeooo:paragraph-rsid="017c7dd8" style:font-size-asian="10pt" style:font-style-asian="normal" style:font-weight-asian="normal" style:font-size-complex="12pt"/>
    </style:style>
    <style:style style:name="P33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7d66a3" officeooo:paragraph-rsid="017d66a3" style:font-size-asian="10pt" style:font-style-asian="normal" style:font-weight-asian="normal" style:font-size-complex="12pt"/>
    </style:style>
    <style:style style:name="P34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7f3a55" officeooo:paragraph-rsid="017f3a55" style:font-size-asian="10pt" style:font-style-asian="normal" style:font-weight-asian="normal" style:font-size-complex="12pt"/>
    </style:style>
    <style:style style:name="P35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802648" officeooo:paragraph-rsid="01802648" style:font-size-asian="10pt" style:font-style-asian="normal" style:font-weight-asian="normal" style:font-size-complex="12pt"/>
    </style:style>
    <style:style style:name="P36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8048b7" officeooo:paragraph-rsid="018048b7" style:font-size-asian="10pt" style:font-style-asian="normal" style:font-weight-asian="normal" style:font-size-complex="12pt"/>
    </style:style>
    <style:style style:name="P37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83d8af" officeooo:paragraph-rsid="0183d8af" style:font-size-asian="10pt" style:font-style-asian="normal" style:font-weight-asian="normal" style:font-size-complex="12pt"/>
    </style:style>
    <style:style style:name="P38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851189" officeooo:paragraph-rsid="01851189" style:font-size-asian="10pt" style:font-style-asian="normal" style:font-weight-asian="normal" style:font-size-complex="12pt"/>
    </style:style>
    <style:style style:name="P39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86ba59" officeooo:paragraph-rsid="0186ba59" style:font-size-asian="10pt" style:font-style-asian="normal" style:font-weight-asian="normal" style:font-size-complex="12pt"/>
    </style:style>
    <style:style style:name="P40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89933e" officeooo:paragraph-rsid="0189933e" style:font-size-asian="10pt" style:font-style-asian="normal" style:font-weight-asian="normal" style:font-size-complex="12pt"/>
    </style:style>
    <style:style style:name="P41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8c275e" officeooo:paragraph-rsid="018c275e" style:font-size-asian="10pt" style:font-style-asian="normal" style:font-weight-asian="normal" style:font-size-complex="12pt"/>
    </style:style>
    <style:style style:name="P42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90b63f" officeooo:paragraph-rsid="0190b63f" style:font-size-asian="10pt" style:font-style-asian="normal" style:font-weight-asian="normal" style:font-size-complex="12pt"/>
    </style:style>
    <style:style style:name="P43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90b63f" officeooo:paragraph-rsid="0190e704" style:font-size-asian="10pt" style:font-style-asian="normal" style:font-weight-asian="normal" style:font-size-complex="12pt"/>
    </style:style>
    <style:style style:name="P44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90b63f" officeooo:paragraph-rsid="0191d67c" style:font-size-asian="10pt" style:font-style-asian="normal" style:font-weight-asian="normal" style:font-size-complex="12pt"/>
    </style:style>
    <style:style style:name="P45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922b12" officeooo:paragraph-rsid="01938955" style:font-size-asian="10pt" style:font-style-asian="normal" style:font-weight-asian="normal" style:font-size-complex="12pt"/>
    </style:style>
    <style:style style:name="P46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90b63f" officeooo:paragraph-rsid="01938955" style:font-size-asian="10pt" style:font-style-asian="normal" style:font-weight-asian="normal" style:font-size-complex="12pt"/>
    </style:style>
    <style:style style:name="P47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938955" officeooo:paragraph-rsid="019437e3" style:font-size-asian="10pt" style:font-style-asian="normal" style:font-weight-asian="normal" style:font-size-complex="12pt"/>
    </style:style>
    <style:style style:name="P48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90b63f" officeooo:paragraph-rsid="019437e3" style:font-size-asian="10pt" style:font-style-asian="normal" style:font-weight-asian="normal" style:font-size-complex="12pt"/>
    </style:style>
    <style:style style:name="P49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90b63f" officeooo:paragraph-rsid="0196beb4" style:font-size-asian="10pt" style:font-style-asian="normal" style:font-weight-asian="normal" style:font-size-complex="12pt"/>
    </style:style>
    <style:style style:name="P50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90b63f" officeooo:paragraph-rsid="0197b675" style:font-size-asian="10pt" style:font-style-asian="normal" style:font-weight-asian="normal" style:font-size-complex="12pt"/>
    </style:style>
    <style:style style:name="P51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97b675" officeooo:paragraph-rsid="0199b31a" style:font-size-asian="10pt" style:font-style-asian="normal" style:font-weight-asian="normal" style:font-size-complex="12pt"/>
    </style:style>
    <style:style style:name="P52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90b63f" officeooo:paragraph-rsid="0199b31a" style:font-size-asian="10pt" style:font-style-asian="normal" style:font-weight-asian="normal" style:font-size-complex="12pt"/>
    </style:style>
    <style:style style:name="P53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9a4209" officeooo:paragraph-rsid="019a4209" style:font-size-asian="10pt" style:font-style-asian="normal" style:font-weight-asian="normal" style:font-size-complex="12pt"/>
    </style:style>
    <style:style style:name="P54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9b25d8" officeooo:paragraph-rsid="019b25d8" style:font-size-asian="10pt" style:font-style-asian="normal" style:font-weight-asian="normal" style:font-size-complex="12pt"/>
    </style:style>
    <style:style style:name="P55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a0135c" officeooo:paragraph-rsid="01a0135c" style:font-size-asian="10pt" style:font-style-asian="normal" style:font-weight-asian="normal" style:font-size-complex="12pt"/>
    </style:style>
    <style:style style:name="P56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a20eab" officeooo:paragraph-rsid="01a20eab" style:font-size-asian="10pt" style:font-style-asian="normal" style:font-weight-asian="normal" style:font-size-complex="12pt"/>
    </style:style>
    <style:style style:name="P57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9b25d8" officeooo:paragraph-rsid="01a20eab" style:font-size-asian="10pt" style:font-style-asian="normal" style:font-weight-asian="normal" style:font-size-complex="12pt"/>
    </style:style>
    <style:style style:name="P58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a20eab" officeooo:paragraph-rsid="01ab5921" style:font-size-asian="10pt" style:font-style-asian="normal" style:font-weight-asian="normal" style:font-size-complex="12pt"/>
    </style:style>
    <style:style style:name="P59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ab6c08" officeooo:paragraph-rsid="01ad2108" style:font-size-asian="10pt" style:font-style-asian="normal" style:font-weight-asian="normal" style:font-size-complex="12pt"/>
    </style:style>
    <style:style style:name="P60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ab5921" officeooo:paragraph-rsid="01ab5921" style:font-size-asian="10pt" style:font-style-asian="normal" style:font-weight-asian="normal" style:font-size-complex="12pt"/>
    </style:style>
    <style:style style:name="P61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ab6c08" officeooo:paragraph-rsid="01ab6c08" style:font-size-asian="10pt" style:font-style-asian="normal" style:font-weight-asian="normal" style:font-size-complex="12pt"/>
    </style:style>
    <style:style style:name="P62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b1d916" officeooo:paragraph-rsid="01b1d916" style:font-size-asian="10pt" style:font-style-asian="normal" style:font-weight-asian="normal" style:font-size-complex="12pt"/>
    </style:style>
    <style:style style:name="P63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ba91b3" officeooo:paragraph-rsid="01ba91b3" style:font-size-asian="10pt" style:font-style-asian="normal" style:font-weight-asian="normal" style:font-size-complex="12pt"/>
    </style:style>
    <style:style style:name="P64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bbd138" officeooo:paragraph-rsid="01bbd138" style:font-size-asian="10pt" style:font-style-asian="normal" style:font-weight-asian="normal" style:font-size-complex="12pt"/>
    </style:style>
    <style:style style:name="P65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bce807" officeooo:paragraph-rsid="01bce807" style:font-size-asian="10pt" style:font-style-asian="normal" style:font-weight-asian="normal" style:font-size-complex="12pt"/>
    </style:style>
    <style:style style:name="P66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c00511" officeooo:paragraph-rsid="01c00511" style:font-size-asian="10pt" style:font-style-asian="normal" style:font-weight-asian="normal" style:font-size-complex="12pt"/>
    </style:style>
    <style:style style:name="P67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c52dc1" officeooo:paragraph-rsid="01c52dc1" style:font-size-asian="10pt" style:font-style-asian="normal" style:font-weight-asian="normal" style:font-size-complex="12pt"/>
    </style:style>
    <style:style style:name="P68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c5ac77" officeooo:paragraph-rsid="01c5ac77" style:font-size-asian="10pt" style:font-style-asian="normal" style:font-weight-asian="normal" style:font-size-complex="12pt"/>
    </style:style>
    <style:style style:name="P69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c6b9d3" officeooo:paragraph-rsid="01c6b9d3" style:font-size-asian="10pt" style:font-style-asian="normal" style:font-weight-asian="normal" style:font-size-complex="12pt"/>
    </style:style>
    <style:style style:name="P70" style:family="paragraph" style:parent-style-name="Standard">
      <style:text-properties fo:color="#000000" loext:opacity="100%" style:font-name="JetBrains Mono" fo:font-size="10pt" fo:font-style="normal" style:text-underline-style="none" fo:font-weight="bold" officeooo:rsid="01c8143f" officeooo:paragraph-rsid="01c8143f" style:font-size-asian="10pt" style:font-style-asian="normal" style:font-weight-asian="bold" style:font-size-complex="12pt" style:font-weight-complex="bold"/>
    </style:style>
    <style:style style:name="P71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c8143f" officeooo:paragraph-rsid="01c8143f" style:font-size-asian="10pt" style:font-style-asian="normal" style:font-weight-asian="normal" style:font-size-complex="12pt" style:font-weight-complex="normal"/>
    </style:style>
    <style:style style:name="P72" style:family="paragraph" style:parent-style-name="Standard">
      <style:text-properties fo:color="#000000" loext:opacity="100%" style:font-name="JetBrains Mono" fo:font-size="10pt" fo:font-style="normal" style:text-underline-style="none" fo:font-weight="normal" officeooo:rsid="01c8143f" officeooo:paragraph-rsid="01c8143f" style:font-size-asian="10pt" style:font-style-asian="normal" style:font-weight-asian="normal" style:font-size-complex="12pt"/>
    </style:style>
    <style:style style:name="T1" style:family="text">
      <style:text-properties officeooo:rsid="0150035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officeooo:rsid="015ad769"/>
    </style:style>
    <style:style style:name="T11" style:family="text">
      <style:text-properties officeooo:rsid="016fb6e8"/>
    </style:style>
    <style:style style:name="T12" style:family="text">
      <style:text-properties officeooo:rsid="01701345"/>
    </style:style>
    <style:style style:name="T13" style:family="text">
      <style:text-properties officeooo:rsid="01658885"/>
    </style:style>
    <style:style style:name="T14" style:family="text">
      <style:text-properties officeooo:rsid="0169e569"/>
    </style:style>
    <style:style style:name="T15" style:family="text">
      <style:text-properties officeooo:rsid="0173a707"/>
    </style:style>
    <style:style style:name="T16" style:family="text">
      <style:text-properties officeooo:rsid="0171c275"/>
    </style:style>
    <style:style style:name="T17" style:family="text">
      <style:text-properties officeooo:rsid="017a5214"/>
    </style:style>
    <style:style style:name="T18" style:family="text">
      <style:text-properties officeooo:rsid="0183d8af"/>
    </style:style>
    <style:style style:name="T19" style:family="text">
      <style:text-properties officeooo:rsid="0199b31a"/>
    </style:style>
    <style:style style:name="T20" style:family="text">
      <style:text-properties officeooo:rsid="01b7965f"/>
    </style:style>
    <style:style style:name="T21" style:family="text">
      <style:text-properties officeooo:rsid="01af97fc"/>
    </style:style>
    <style:style style:name="T22" style:family="text">
      <style:text-properties officeooo:rsid="01b26824"/>
    </style:style>
    <style:style style:name="T23" style:family="text">
      <style:text-properties officeooo:rsid="01b3b81f"/>
    </style:style>
    <style:style style:name="T24" style:family="text">
      <style:text-properties officeooo:rsid="01a5ec29"/>
    </style:style>
    <style:style style:name="T25" style:family="text">
      <style:text-properties officeooo:rsid="01a99b05"/>
    </style:style>
    <style:style style:name="T26" style:family="text">
      <style:text-properties officeooo:rsid="01b8aa07"/>
    </style:style>
    <style:style style:name="T27" style:family="text">
      <style:text-properties officeooo:rsid="01b4d75e"/>
    </style:style>
    <style:style style:name="T28" style:family="text">
      <style:text-properties officeooo:rsid="01b67468"/>
    </style:style>
    <style:style style:name="T29" style:family="text">
      <style:text-properties officeooo:rsid="01ab6c08"/>
    </style:style>
    <style:style style:name="T30" style:family="text">
      <style:text-properties officeooo:rsid="01ac35f7"/>
    </style:style>
    <style:style style:name="T31" style:family="text">
      <style:text-properties officeooo:rsid="01b8243d"/>
    </style:style>
    <style:style style:name="T32" style:family="text">
      <style:text-properties officeooo:rsid="019a4209"/>
    </style:style>
    <style:style style:name="T33" style:family="text">
      <style:text-properties officeooo:rsid="01c696b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 </text:p>
      <text:p text:style-name="P1">Національний технічний університет України  </text:p>
      <text:p text:style-name="P1">«Київський політехнічний інститут ім. Ігоря Сікорського» </text:p>
      <text:p text:style-name="P1">Факультет інформатики та обчислювальної техніки </text:p>
      <text:p text:style-name="P1">Кафедра обчислювальної техніки </text:p>
      <text:p text:style-name="P1"><text:s/></text:p>
      <text:p text:style-name="P1"><text:s/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>ЛАБОРАТОРНА РОБОТА № <text:span text:style-name="T1">5</text:span></text:p>
      <text:p text:style-name="P1">з дисципліни «Прикладні задачі машинного навчання» </text:p>
      <text:p text:style-name="P1"/>
      <text:p text:style-name="P2">на тему «Проектування та навчання штучної нейронної мережi для задач</text:p>
      <text:p text:style-name="P2">класифiкацiї»</text:p>
      <text:p text:style-name="P1"/>
      <text:p text:style-name="P1"><text:s/></text:p>
      <text:p text:style-name="P1"><text:s/></text:p>
      <text:p text:style-name="P1"><text:s/></text:p>
      <text:p text:style-name="P1"/>
      <text:p text:style-name="P1"/>
      <text:p text:style-name="P1"/>
      <text:p text:style-name="P1"><text:s/></text:p>
      <text:p text:style-name="P1"><text:s/></text:p>
      <text:p text:style-name="P3"><text:s/></text:p>
      <text:p text:style-name="P3">Виконав: <text:s text:c="75"/></text:p>
      <text:p text:style-name="P3">Студент 2 курсу ФІОТ-у <text:s text:c="49"/></text:p>
      <text:p text:style-name="P3">групи ІМ-42 </text:p>
      <text:p text:style-name="P3">Ватолкін Михайло Андрійович</text:p>
      <text:p text:style-name="P3">Номер у списку групи - 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їв <text:s text:c="2"/>2026</text:p>
      <text:p text:style-name="P1"/>
      <text:p text:style-name="Preformatted_20_Text"/>
      <text:p text:style-name="Preformatted_20_Text"><text:soft-page-break/></text:p>
      <text:p text:style-name="P4"/>
      <text:p text:style-name="P5">Постановка завдання</text:p>
      <text:p text:style-name="P6"/>
      <text:p text:style-name="P7">Завдання:</text:p>
      <text:p text:style-name="P7"/>
      <text:p text:style-name="P7">1. Виконати завдання iз прикладу i отримати файл iз</text:p>
      <text:p text:style-name="P7">навченою моделлю для розпiзнавання рукописних цифр. В будь якому</text:p>
      <text:p text:style-name="P7">графiчному редакторi створити файл iз рукописною цифрою i</text:p>
      <text:p text:style-name="P7">розпiзнати її. Пояснити результат.</text:p>
      <text:p text:style-name="P7"/>
      <text:p text:style-name="P7">2. Спроектувати i розробити нейронну мережу на основi таких</text:p>
      <text:p text:style-name="P7">наборiв даних iмплементованих в Keras:</text:p>
      <text:p text:style-name="P7"/>
      <text:p text:style-name="P8">1)Cifar10</text:p>
      <text:p text:style-name="P8"/>
      <text:p text:style-name="P8">2)FMNIST</text:p>
      <text:p text:style-name="P6"/>
      <text:p text:style-name="P6">Потрiбно розробити архiтектуру нейронної мережi, навчити її на</text:p>
      <text:p text:style-name="P6">тестових прикладах, i продемонструвати її роботу на кiлькох</text:p>
      <text:p text:style-name="P6">зображеннях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0">Виконання:</text:p>
      <text:p text:style-name="P10"/>
      <text:p text:style-name="P11"><text:span text:style-name="T2">Пункт 1</text:span>:</text:p>
      <text:p text:style-name="P11"/>
      <text:p text:style-name="P12">Візуалізую дані та відформатую:</text:p>
      <text:p text:style-name="P11"/>
      <text:p text:style-name="P13" loext:marker-style-name="T3"><text:span text:style-name="T4">import </text:span><text:span text:style-name="T3">os<text:line-break/>os.environ[</text:span><text:span text:style-name="T5">"KERAS_BACKEND"</text:span><text:span text:style-name="T3">] = </text:span><text:span text:style-name="T5">"torch"<text:line-break/><text:line-break/></text:span><text:span text:style-name="T4">from </text:span><text:span text:style-name="T3">keras.datasets </text:span><text:span text:style-name="T4">import </text:span><text:span text:style-name="T3">mnist<text:line-break/></text:span><text:span text:style-name="T4">from </text:span><text:span text:style-name="T3">keras.utils </text:span><text:span text:style-name="T4">import </text:span><text:span text:style-name="T3">to_categorical<text:line-break/></text:span><text:span text:style-name="T4">import </text:span><text:span text:style-name="T3">matplotlib.pyplot </text:span><text:span text:style-name="T4">as </text:span><text:span text:style-name="T3">plt<text:line-break/></text:span><text:span text:style-name="T4">import </text:span><text:span text:style-name="T3">numpy </text:span><text:span text:style-name="T4">as </text:span><text:span text:style-name="T3">np<text:line-break/><text:line-break/></text:span><text:span text:style-name="T6">#load data<text:line-break/></text:span><text:span text:style-name="T3">(train_images, train_labels), (test_images, test_labels) = mnist.load_data()<text:line-break/><text:line-break/></text:span><text:span text:style-name="T6">#check data<text:line-break/></text:span><text:span text:style-name="T3">plt.figure(</text:span><text:span text:style-name="T7">figsize</text:span><text:span text:style-name="T3">=(</text:span><text:span text:style-name="T8">10</text:span><text:span text:style-name="T3">,</text:span><text:span text:style-name="T8">10</text:span><text:span text:style-name="T3">))<text:line-break/></text:span><text:span text:style-name="T4">for </text:span><text:span text:style-name="T3">i </text:span><text:span text:style-name="T4">in </text:span><text:span text:style-name="T9">range</text:span><text:span text:style-name="T3">(</text:span><text:span text:style-name="T8">25</text:span><text:span text:style-name="T3">):<text:line-break/> <text:s text:c="3"/>plt.subplot(</text:span><text:span text:style-name="T8">5</text:span><text:span text:style-name="T3">,</text:span><text:span text:style-name="T8">5</text:span><text:span text:style-name="T3">,i+</text:span><text:span text:style-name="T8">1</text:span><text:span text:style-name="T3">)<text:line-break/> <text:s text:c="3"/>plt.xticks([])<text:line-break/> <text:s text:c="3"/>plt.yticks([])<text:line-break/> <text:s text:c="3"/>plt.grid(</text:span><text:span text:style-name="T4">False</text:span><text:span text:style-name="T3">)<text:line-break/> <text:s text:c="3"/>plt.imshow(train_images[i], </text:span><text:span text:style-name="T7">cmap</text:span><text:span text:style-name="T3">=</text:span><text:span text:style-name="T5">'gray'</text:span><text:span text:style-name="T3">)<text:line-break/> <text:s text:c="3"/>plt.xlabel(train_labels[i])<text:line-break/>plt.savefig(</text:span><text:span text:style-name="T5">'./plots/check_data.png'</text:span><text:span text:style-name="T3">)<text:line-break/>plt.close()<text:line-break/><text:line-break/></text:span><text:span text:style-name="T6">#format data<text:line-break/></text:span><text:span text:style-name="T3">train_images = train_images.reshape((</text:span><text:span text:style-name="T8">60000</text:span><text:span text:style-name="T3">, </text:span><text:span text:style-name="T8">784</text:span><text:span text:style-name="T3">))<text:line-break/>train_images = train_images.astype(</text:span><text:span text:style-name="T5">'float32'</text:span><text:span text:style-name="T3">) / </text:span><text:span text:style-name="T8">255<text:line-break/></text:span><text:span text:style-name="T3">test_images = test_images.reshape((</text:span><text:span text:style-name="T8">10000</text:span><text:span text:style-name="T3">, </text:span><text:span text:style-name="T8">784</text:span><text:span text:style-name="T3">))<text:line-break/>test_images = test_images.astype(</text:span><text:span text:style-name="T5">'float32'</text:span><text:span text:style-name="T3">) / </text:span><text:span text:style-name="T8">255<text:line-break/><text:line-break/></text:span><text:span text:style-name="T3">train_labels = to_categorical(train_labels)<text:line-break/>test_labels = to_categorical(test_labels)<text:line-break/><text:line-break/>np.savez(</text:span><text:span text:style-name="T5">"data/datasets.npz"</text:span><text:span text:style-name="T3">,<text:line-break/> <text:s text:c="8"/></text:span><text:span text:style-name="T7">train_images</text:span><text:span text:style-name="T3">=train_images,<text:line-break/> <text:s text:c="8"/></text:span><text:span text:style-name="T7">test_images</text:span><text:span text:style-name="T3">=test_images,<text:line-break/> <text:s text:c="8"/></text:span><text:span text:style-name="T7">train_labels</text:span><text:span text:style-name="T3">=train_labels,<text:line-break/> <text:s text:c="8"/></text:span><text:span text:style-name="T7">test_labels</text:span><text:span text:style-name="T3">=test_labels)</text:span></text:p>
      <text:p text:style-name="P14" loext:marker-style-name="T3"/>
      <text:p text:style-name="P15"/>
      <text:p text:style-name="P16">В якості бекенду важу PyTorch через конфлікти версій пайтона.</text:p>
      <text:p text:style-name="P17">Імпортую бібліотеки і завантажу дані. Після цього рекомендованим способом візуалізую перші 25 зображень 28x28 з тренувального набору.</text:p>
      <text:p text:style-name="P18">Відформатую <text:span text:style-name="T10">представлення зображень з двовимірного в вектор, нормалізую значення кожного пікселя в межі від 0 до 1. <text:s/>Значення міток відформатую так, щоб кожне цифра позначалась масивом, 9 елементів були 0, а елемент з індексом, що відповідає числу мав</text:span></text:p>
      <text:p text:style-name="P19"/>
      <text:p text:style-name="P19"><text:soft-page-break/>значення 1.</text:p>
      <text:p text:style-name="P17"/>
      <text:p text:style-name="P17">Збережу тренувальні й тестові дані в архіві npz.</text:p>
      <text:p text:style-name="P17"/>
      <text:p text:style-name="P17">---</text:p>
      <text:p text:style-name="P17"/>
      <text:p text:style-name="P19">Створене зображення:</text:p>
      <text:p text:style-name="P19"/>
      <text:p text:style-name="P19"><draw:frame draw:style-name="fr1" draw:name="Image1" text:anchor-type="as-char" svg:width="11.208cm" svg:height="11.208cm" draw:z-index="0"><draw:image xlink:href="Pictures/10000001000003E8000003E8B84D9A38.png" xlink:type="simple" xlink:show="embed" xlink:actuate="onLoad" draw:mime-type="image/png"/></draw:frame></text:p>
      <text:p text:style-name="P19"/>
      <text:p text:style-name="P19">---</text:p>
      <text:p text:style-name="P19"/>
      <text:p text:style-name="P20">Створю і навчу нейронну мережу</text:p>
      <text:p text:style-name="P19"/>
      <text:p text:style-name="P13" loext:marker-style-name="T3"><text:span text:style-name="T4">import </text:span><text:span text:style-name="T3">os<text:line-break/>os.environ[</text:span><text:span text:style-name="T5">"KERAS_BACKEND"</text:span><text:span text:style-name="T3">] = </text:span><text:span text:style-name="T5">"torch"<text:line-break/><text:line-break/></text:span><text:span text:style-name="T4">import </text:span><text:span text:style-name="T3">numpy </text:span><text:span text:style-name="T4">as </text:span><text:span text:style-name="T3">np<text:line-break/></text:span><text:span text:style-name="T4">from </text:span><text:span text:style-name="T3">keras </text:span><text:span text:style-name="T4">import </text:span><text:span text:style-name="T3">models<text:line-break/></text:span><text:span text:style-name="T4">from </text:span><text:span text:style-name="T3">keras </text:span><text:span text:style-name="T4">import </text:span><text:span text:style-name="T3">layers<text:line-break/><text:line-break/>data = np.load(</text:span><text:span text:style-name="T5">"data/datasets.npz"</text:span><text:span text:style-name="T3">)<text:line-break/><text:line-break/>train_images = data[</text:span><text:span text:style-name="T5">"train_images"</text:span><text:span text:style-name="T3">]<text:line-break/>train_labels = data[</text:span><text:span text:style-name="T5">"train_labels"</text:span><text:span text:style-name="T3">]<text:line-break/><text:line-break/>network = models.Sequential()<text:line-break/><text:line-break/>network.add(layers.Dense(</text:span><text:span text:style-name="T8">512</text:span><text:span text:style-name="T3">, </text:span><text:span text:style-name="T7">activation</text:span><text:span text:style-name="T3">=</text:span><text:span text:style-name="T5">'relu'</text:span><text:span text:style-name="T3">))<text:line-break/>network.add(layers.Dense(</text:span><text:span text:style-name="T8">10</text:span><text:span text:style-name="T3">, </text:span><text:span text:style-name="T7">activation</text:span><text:span text:style-name="T3">=</text:span><text:span text:style-name="T5">'softmax'</text:span><text:span text:style-name="T3">))<text:line-break/><text:line-break/></text:span><text:soft-page-break/><text:span text:style-name="T3">network.compile(</text:span><text:span text:style-name="T7">optimizer</text:span><text:span text:style-name="T3">=</text:span><text:span text:style-name="T5">'rmsprop'</text:span><text:span text:style-name="T3">, </text:span><text:span text:style-name="T7">loss </text:span><text:span text:style-name="T3">= </text:span><text:span text:style-name="T5">'categorical_crossentropy'</text:span><text:span text:style-name="T3">,</text:span><text:span text:style-name="T7">metrics</text:span><text:span text:style-name="T3">=[</text:span><text:span text:style-name="T5">'accuracy'</text:span><text:span text:style-name="T3">])<text:line-break/><text:line-break/>network.fit(train_images,train_labels,</text:span><text:span text:style-name="T7">epochs</text:span><text:span text:style-name="T3">=</text:span><text:span text:style-name="T8">5</text:span><text:span text:style-name="T3">,</text:span><text:span text:style-name="T7">batch_size</text:span><text:span text:style-name="T3">=</text:span><text:span text:style-name="T8">128</text:span><text:span text:style-name="T3">)<text:line-break/><text:line-break/>network.save(</text:span><text:span text:style-name="T5">"model/mnist_model.keras"</text:span><text:span text:style-name="T3">)</text:span></text:p>
      <text:p text:style-name="P19"/>
      <text:p text:style-name="P21">Після імпортування бібліотек і завантаження попереденьо збережених даних ініціалізую Sequential модель <text:span text:style-name="T11">(найпростіший тип)</text:span>, <text:span text:style-name="T12">до якої додам </text:span>прихований шар з 512 нейронами і вихідний шар з 10 нейронами, функції активації яких relu і softmax відповідно. <text:span text:style-name="T12">Кількість нейронів вхідного шару автоматично визначиться з тренувальних даних.</text:span> <text:span text:style-name="T13">Скомпілюю дану мережу з оптимізатором rmsprop і функцією втрат <text:s/>categorical_crossentropy. Навчання пройде у 5 епох, </text:span><text:span text:style-name="T14">беручи за раз жменю з 128 входженнями</text:span><text:span text:style-name="T13">. Збережу дану мережу в окрему папку.</text:span></text:p>
      <text:p text:style-name="P22"/>
      <text:p text:style-name="P22">Виконання коду:</text:p>
      <text:p text:style-name="P22"/>
      <text:p text:style-name="P22">---</text:p>
      <text:p text:style-name="P22"/>
      <text:p text:style-name="P22">/home/misha/Documents/2sem26/ml/.venv/bin/python /home/misha/Documents/2sem26/ml/lab5/1-mnist/2-mnist_model.py </text:p>
      <text:p text:style-name="P22">Epoch 1/5</text:p>
      <text:p text:style-name="P22">469/469 ━━━━━━━━━━━━━━━━━━━━ 6s 12ms/step - accuracy: 0.9240 - loss: 0.2626</text:p>
      <text:p text:style-name="P22">Epoch 2/5</text:p>
      <text:p text:style-name="P22">469/469 ━━━━━━━━━━━━━━━━━━━━ 6s 12ms/step - accuracy: 0.9685 - loss: 0.1068</text:p>
      <text:p text:style-name="P22">Epoch 3/5</text:p>
      <text:p text:style-name="P22">469/469 ━━━━━━━━━━━━━━━━━━━━ 6s 12ms/step - accuracy: 0.9792 - loss: 0.0697</text:p>
      <text:p text:style-name="P22">Epoch 4/5</text:p>
      <text:p text:style-name="P22">469/469 ━━━━━━━━━━━━━━━━━━━━ 6s 12ms/step - accuracy: 0.9851 - loss: 0.0512</text:p>
      <text:p text:style-name="P22">Epoch 5/5</text:p>
      <text:p text:style-name="P22">469/469 ━━━━━━━━━━━━━━━━━━━━ 6s 12ms/step - accuracy: 0.9887 - loss: 0.0382</text:p>
      <text:p text:style-name="P22"/>
      <text:p text:style-name="P22">---</text:p>
      <text:p text:style-name="P22"/>
      <text:p text:style-name="P23">Під час навчання можемо побачити відслідковувати етапи навчання по епохам. Мережа бачить навчальні дані, в цьому випадку, 5 разів, щоразу покращуючи значення середн<text:span text:style-name="T15">ої</text:span> точності і функці<text:span text:style-name="T16">ї</text:span> втрат.</text:p>
      <text:p text:style-name="P23"/>
      <text:p text:style-name="P24">Тепер протестуємо модель на тестовій вибірці</text:p>
      <text:p text:style-name="P23"/>
      <text:p text:style-name="P25" loext:marker-style-name="T3"><text:span text:style-name="T4">import </text:span><text:span text:style-name="T3">os<text:line-break/>os.environ[</text:span><text:span text:style-name="T5">"KERAS_BACKEND"</text:span><text:span text:style-name="T3">] = </text:span><text:span text:style-name="T5">"torch"<text:line-break/><text:line-break/></text:span><text:span text:style-name="T4">from </text:span><text:span text:style-name="T3">keras.models </text:span><text:span text:style-name="T4">import </text:span><text:span text:style-name="T3">load_model<text:line-break/></text:span><text:span text:style-name="T4">import </text:span><text:span text:style-name="T3">numpy </text:span><text:span text:style-name="T4">as </text:span><text:span text:style-name="T3">np<text:line-break/><text:line-break/>data = np.load(</text:span><text:span text:style-name="T5">"data/datasets.npz"</text:span><text:span text:style-name="T3">)<text:line-break/><text:line-break/>test_images = data[</text:span><text:span text:style-name="T5">"test_images"</text:span><text:span text:style-name="T3">]<text:line-break/>test_labels = data[</text:span><text:span text:style-name="T5">"test_labels"</text:span><text:span text:style-name="T3">]<text:line-break/><text:line-break/>mnist_model = load_model(</text:span><text:span text:style-name="T5">"model/mnist_model.keras"</text:span><text:span text:style-name="T3">)<text:line-break/><text:line-break/>test_loss, test_acc = mnist_model.evaluate(test_images,test_labels)<text:line-break/><text:line-break/></text:span><text:soft-page-break/><text:span text:style-name="T9">print</text:span><text:span text:style-name="T3">(</text:span><text:span text:style-name="T5">"</text:span><text:span text:style-name="T4">\n</text:span><text:span text:style-name="T5">Test accuracy:"</text:span><text:span text:style-name="T3">, test_acc)<text:line-break/></text:span><text:span text:style-name="T9">print</text:span><text:span text:style-name="T3">(</text:span><text:span text:style-name="T5">"Test loss:"</text:span><text:span text:style-name="T3">, test_loss)</text:span></text:p>
      <text:p text:style-name="P14" loext:marker-style-name="T3"/>
      <text:p text:style-name="P23"/>
      <text:p text:style-name="P24">Результат тесту:</text:p>
      <text:p text:style-name="P24"/>
      <text:p text:style-name="P24">---</text:p>
      <text:p text:style-name="P24">/home/misha/Documents/2sem26/ml/.venv/bin/python /home/misha/Documents/2sem26/ml/lab5/1-mnist/3-mnist_test.py </text:p>
      <text:p text:style-name="P24">313/313 ━━━━━━━━━━━━━━━━━━━━ 2s 7ms/step - accuracy: 0.9809 - loss: 0.0604</text:p>
      <text:p text:style-name="P24"/>
      <text:p text:style-name="P24">Test accuracy: 0.98089998960495</text:p>
      <text:p text:style-name="P24">Test loss: 0.06036713719367981</text:p>
      <text:p text:style-name="P24"/>
      <text:p text:style-name="P24">Process finished with exit code 0</text:p>
      <text:p text:style-name="P24">---</text:p>
      <text:p text:style-name="P24"/>
      <text:p text:style-name="P26">Протестуємо модель на власноруч створених зображеннях:</text:p>
      <text:p text:style-name="P26"/>
      <text:p text:style-name="P26"><draw:frame draw:style-name="fr1" draw:name="Image3" text:anchor-type="as-char" svg:width="4.366cm" svg:height="3.276cm" draw:z-index="5"><draw:image xlink:href="Pictures/10000001000003200000025848B6D63B.png" xlink:type="simple" xlink:show="embed" xlink:actuate="onLoad" draw:mime-type="image/png"/></draw:frame><text:s text:c="2"/><draw:frame draw:style-name="fr1" draw:name="Image2" text:anchor-type="as-char" svg:width="4.436cm" svg:height="3.327cm" draw:z-index="1"><draw:image xlink:href="Pictures/1000000100000320000002583C693A05.png" xlink:type="simple" xlink:show="embed" xlink:actuate="onLoad" draw:mime-type="image/png"/></draw:frame><text:s/></text:p>
      <text:p text:style-name="P26"><draw:frame draw:style-name="fr2" draw:name="Image4" text:anchor-type="as-char" svg:width="4.399cm" svg:height="3.3cm" draw:z-index="3"><draw:image xlink:href="Pictures/1000000100000320000002586FECAD69.png" xlink:type="simple" xlink:show="embed" xlink:actuate="onLoad" draw:mime-type="image/png"/></draw:frame><text:s text:c="2"/><draw:frame draw:style-name="fr2" draw:name="Image5" text:anchor-type="as-char" svg:width="4.39cm" svg:height="3.293cm" draw:z-index="4"><draw:image xlink:href="Pictures/100000010000032000000258BFA2D73E.png" xlink:type="simple" xlink:show="embed" xlink:actuate="onLoad" draw:mime-type="image/png"/></draw:frame><text:s/></text:p>
      <text:p text:style-name="P26"/>
      <text:p text:style-name="P27">Використаю для тесту код:</text:p>
      <text:p text:style-name="P27"/>
      <text:p text:style-name="P13" loext:marker-style-name="T3"><text:span text:style-name="T4">import </text:span><text:span text:style-name="T3">os<text:line-break/>os.environ[</text:span><text:span text:style-name="T5">"KERAS_BACKEND"</text:span><text:span text:style-name="T3">] = </text:span><text:span text:style-name="T5">"torch"<text:line-break/><text:line-break/></text:span><text:span text:style-name="T4">from </text:span><text:span text:style-name="T3">keras.models </text:span><text:span text:style-name="T4">import </text:span><text:span text:style-name="T3">load_model<text:line-break/></text:span><text:span text:style-name="T4">import </text:span><text:span text:style-name="T3">cv2<text:line-break/></text:span><text:span text:style-name="T4">import </text:span><text:span text:style-name="T3">numpy </text:span><text:span text:style-name="T4">as </text:span><text:span text:style-name="T3">np<text:line-break/></text:span><text:span text:style-name="T4">import </text:span><text:span text:style-name="T3">matplotlib.pyplot </text:span><text:span text:style-name="T4">as </text:span><text:span text:style-name="T3">plt<text:line-break/><text:line-break/>mnist_model = load_model(</text:span><text:span text:style-name="T5">"mnist/model/mnist_model.keras"</text:span><text:span text:style-name="T3">)<text:line-break/><text:line-break/>file_names = [</text:span><text:span text:style-name="T5">'entry2.png'</text:span><text:span text:style-name="T3">, </text:span><text:span text:style-name="T5">'entry5.png'</text:span><text:span text:style-name="T3">, </text:span><text:span text:style-name="T5">'entry3.png'</text:span><text:span text:style-name="T3">, </text:span><text:span text:style-name="T5">'entry7.png'</text:span><text:span text:style-name="T3">]<text:line-break/>nums = [</text:span><text:span text:style-name="T5">"2"</text:span><text:span text:style-name="T3">, </text:span><text:span text:style-name="T5">"5"</text:span><text:span text:style-name="T3">, </text:span><text:span text:style-name="T5">"3"</text:span><text:span text:style-name="T3">, </text:span><text:span text:style-name="T5">"7"</text:span><text:span text:style-name="T3">]<text:line-break/>processed = []<text:line-break/><text:line-break/></text:span><text:span text:style-name="T4">for </text:span><text:span text:style-name="T3">name </text:span><text:span text:style-name="T4">in </text:span><text:span text:style-name="T3">file_names:<text:line-break/> full_path = os.path.join(</text:span><text:span text:style-name="T5">'mnist/data/handw/'</text:span><text:span text:style-name="T3">, name)<text:line-break/><text:line-break/></text:span><text:soft-page-break/><text:span text:style-name="T3"> <text:s text:c="3"/>tst = </text:span><text:span text:style-name="T8">255 </text:span><text:span text:style-name="T3">- cv2.imread(full_path, </text:span><text:span text:style-name="T8">0</text:span><text:span text:style-name="T3">)<text:line-break/> <text:s text:c="3"/>tst = cv2.resize(tst, (</text:span><text:span text:style-name="T8">28</text:span><text:span text:style-name="T3">, </text:span><text:span text:style-name="T8">28</text:span><text:span text:style-name="T3">))<text:line-break/> <text:s text:c="3"/>tst = tst.reshape((</text:span><text:span text:style-name="T8">1</text:span><text:span text:style-name="T3">,</text:span><text:span text:style-name="T8">784</text:span><text:span text:style-name="T3">))<text:line-break/> <text:s text:c="3"/>tst = tst.astype(</text:span><text:span text:style-name="T5">'float32'</text:span><text:span text:style-name="T3">) / </text:span><text:span text:style-name="T8">255<text:line-break/><text:line-break/> <text:s text:c="3"/></text:span><text:span text:style-name="T3">processed.append(tst)<text:line-break/><text:line-break/></text:span><text:span text:style-name="T4">for </text:span><text:span text:style-name="T3">tst, num </text:span><text:span text:style-name="T4">in </text:span><text:span text:style-name="T9">zip</text:span><text:span text:style-name="T3">(processed, nums):<text:line-break/> <text:s text:c="3"/>predictions = mnist_model.predict(tst, </text:span><text:span text:style-name="T7">verbose</text:span><text:span text:style-name="T3">=</text:span><text:span text:style-name="T8">0</text:span><text:span text:style-name="T3">)<text:line-break/> <text:s text:c="3"/>prediction = np.argmax(predictions)<text:line-break/> <text:s text:c="3"/>confidence = np.max(predictions) * </text:span><text:span text:style-name="T8">100<text:line-break/><text:line-break/> <text:s text:c="3"/></text:span><text:span text:style-name="T9">print</text:span><text:span text:style-name="T3">(</text:span><text:span text:style-name="T5">f"Predicted: </text:span><text:span text:style-name="T4">{</text:span><text:span text:style-name="T3">prediction</text:span><text:span text:style-name="T4">}</text:span><text:span text:style-name="T5"> | Real: </text:span><text:span text:style-name="T4">{</text:span><text:span text:style-name="T3">num</text:span><text:span text:style-name="T4">}</text:span><text:span text:style-name="T5"> | Confidence: </text:span><text:span text:style-name="T4">{</text:span><text:span text:style-name="T3">confidence</text:span><text:span text:style-name="T4">:</text:span><text:span text:style-name="T5">.2f</text:span><text:span text:style-name="T4">}</text:span><text:span text:style-name="T5">%"</text:span><text:span text:style-name="T3">)<text:line-break/><text:line-break/></text:span><text:span text:style-name="T6">#check data<text:line-break/></text:span><text:span text:style-name="T3">plt.figure(</text:span><text:span text:style-name="T7">figsize</text:span><text:span text:style-name="T3">=(</text:span><text:span text:style-name="T8">10</text:span><text:span text:style-name="T3">, </text:span><text:span text:style-name="T8">5</text:span><text:span text:style-name="T3">))<text:line-break/></text:span><text:span text:style-name="T4">for </text:span><text:span text:style-name="T3">i </text:span><text:span text:style-name="T4">in </text:span><text:span text:style-name="T9">range</text:span><text:span text:style-name="T3">(</text:span><text:span text:style-name="T8">4</text:span><text:span text:style-name="T3">):<text:line-break/> <text:s text:c="3"/>plt.subplot(</text:span><text:span text:style-name="T8">1</text:span><text:span text:style-name="T3">, </text:span><text:span text:style-name="T8">4</text:span><text:span text:style-name="T3">, i+</text:span><text:span text:style-name="T8">1</text:span><text:span text:style-name="T3">) </text:span><text:span text:style-name="T6"><text:line-break/> <text:s text:c="3"/></text:span><text:span text:style-name="T3">plt.xticks([])<text:line-break/> <text:s text:c="3"/>plt.yticks([])<text:line-break/> <text:s text:c="3"/>plt.grid(</text:span><text:span text:style-name="T4">False</text:span><text:span text:style-name="T3">)<text:line-break/><text:line-break/> <text:s text:c="3"/>display_img = processed[i].reshape(</text:span><text:span text:style-name="T8">28</text:span><text:span text:style-name="T3">, </text:span><text:span text:style-name="T8">28</text:span><text:span text:style-name="T3">)<text:line-break/><text:line-break/> <text:s text:c="3"/>plt.imshow(display_img, </text:span><text:span text:style-name="T7">cmap</text:span><text:span text:style-name="T3">=</text:span><text:span text:style-name="T5">'gray'</text:span><text:span text:style-name="T3">)<text:line-break/> <text:s text:c="3"/>plt.xlabel(</text:span><text:span text:style-name="T5">f"Real: </text:span><text:span text:style-name="T4">{</text:span><text:span text:style-name="T3">nums[i]</text:span><text:span text:style-name="T4">}</text:span><text:span text:style-name="T5">"</text:span><text:span text:style-name="T3">)<text:line-break/>plt.tight_layout()<text:line-break/>plt.savefig(</text:span><text:span text:style-name="T5">'./plots/formatted_hndw.png'</text:span><text:span text:style-name="T3">)<text:line-break/>plt.close()</text:span></text:p>
      <text:p text:style-name="P14" loext:marker-style-name="T3"/>
      <text:p text:style-name="P14" loext:marker-style-name="T3"/>
      <text:p text:style-name="P27"/>
      <text:p text:style-name="P28">Отже, після завантаження бібліотек і моделі дістанемо в циклом всі зображення і відформатуємо їх для аналізу моделлю: Світлі пікселлі стають темними і навпаки, далі розкриваємо кожне зображення в вектор і нормалізуємо.</text:p>
      <text:p text:style-name="P28">Циклом виводимо передбачення, реальне число і також впевненість моделі в своїй відповіді.</text:p>
      <text:p text:style-name="P28">Виведу відформатовані зображення для аналізу помилок моделі.</text:p>
      <text:p text:style-name="P28"/>
      <text:p text:style-name="P29">Результат тестування:</text:p>
      <text:p text:style-name="P29"/>
      <text:p text:style-name="P29">---</text:p>
      <text:p text:style-name="P29">/home/misha/Documents/2sem26/ml/.venv/bin/python /home/misha/Documents/2sem26/ml/lab5/1-mnist/4-mnist_test2.py </text:p>
      <text:p text:style-name="P29">Predicted: 7 | Real: 2 | Confidence: 23.74%</text:p>
      <text:p text:style-name="P29">Predicted: 5 | Real: 5 | Confidence: 71.60%</text:p>
      <text:p text:style-name="P29">Predicted: 2 | Real: 3 | Confidence: 25.98%</text:p>
      <text:p text:style-name="P29">Predicted: 7 | Real: 7 | Confidence: 57.21%</text:p>
      <text:p text:style-name="P29"/>
      <text:p text:style-name="P29">Process finished with exit code 0</text:p>
      <text:p text:style-name="P29">---</text:p>
      <text:p text:style-name="P29"/>
      <text:p text:style-name="P30">Погляньмо на відформатовані зображення:</text:p>
      <text:p text:style-name="P30"/>
      <text:p text:style-name="P30"><text:soft-page-break/></text:p>
      <text:p text:style-name="P30">---</text:p>
      <text:p text:style-name="P30"><draw:frame draw:style-name="fr3" draw:name="Image6" text:anchor-type="char" svg:width="17cm" svg:height="8.5cm" draw:z-index="2"><draw:image xlink:href="Pictures/10000001000003E8000001F4F2BA8E2C.png" xlink:type="simple" xlink:show="embed" xlink:actuate="onLoad" draw:mime-type="image/png"/></draw:frame></text:p>
      <text:p text:style-name="P30">---</text:p>
      <text:p text:style-name="P31">Не дивно, що модель не точна, така якість зображення залишає лише бажати удачі моделі в більшості випадків. Число 2 (було прийнято за 7) для моделі з Dense шарами – просто шум.</text:p>
      <text:p text:style-name="P31">Зі схожою причини 3 було прийнято за 5 – модель просто аналізує окремі пікселі, не намагаючись зрозуміти зображення загалом через власну архітектуру. В обох випадках впевненість була низькою. Число сім було вгадане, бо шуми, якими я намагався заплутати модель, взагалі не збереглися.Однак впевненість невисока, як я гадаю, через не цілісність <text:span text:style-name="T17">числа на</text:span> зображенн<text:span text:style-name="T17">і</text:span>. Число 5 також було вгадане з високою впевненістю.</text:p>
      <text:p text:style-name="P31"/>
      <text:p text:style-name="P32">Пункт 2:</text:p>
      <text:p text:style-name="P32"/>
      <text:p text:style-name="P33">1) FMNIST</text:p>
      <text:p text:style-name="P33">Цей набір даних схожий з попереднім, але замість чисел – елементи одягу. Формат зображень і представлення даних ідентичний. Надалі коди, що повторюються, буду надавати, але пояснювати лише відмінні від вже показаних елементи.</text:p>
      <text:p text:style-name="P33"/>
      <text:p text:style-name="P34">Код для форматування і виведення даних:</text:p>
      <text:p text:style-name="P34"/>
      <text:p text:style-name="P13" loext:marker-style-name="T3"><text:span text:style-name="T4">import </text:span><text:span text:style-name="T3">os<text:line-break/>os.environ[</text:span><text:span text:style-name="T5">"KERAS_BACKEND"</text:span><text:span text:style-name="T3">] = </text:span><text:span text:style-name="T5">"torch"<text:line-break/><text:line-break/></text:span><text:span text:style-name="T4">from </text:span><text:span text:style-name="T3">keras.datasets </text:span><text:span text:style-name="T4">import </text:span><text:span text:style-name="T3">fashion_mnist<text:line-break/></text:span><text:span text:style-name="T4">from </text:span><text:span text:style-name="T3">keras.utils </text:span><text:span text:style-name="T4">import </text:span><text:span text:style-name="T3">to_categorical<text:line-break/></text:span><text:span text:style-name="T4">import </text:span><text:span text:style-name="T3">matplotlib.pyplot </text:span><text:span text:style-name="T4">as </text:span><text:span text:style-name="T3">plt<text:line-break/></text:span><text:span text:style-name="T4">import </text:span><text:span text:style-name="T3">numpy </text:span><text:span text:style-name="T4">as </text:span><text:span text:style-name="T3">np<text:line-break/><text:line-break/></text:span><text:span text:style-name="T6">#load data<text:line-break/></text:span><text:span text:style-name="T3">(train_images, train_labels), (test_images, test_labels) = fashion_mnist.load_data()<text:line-break/><text:line-break/></text:span><text:span text:style-name="T6">#check data<text:line-break/></text:span><text:span text:style-name="T3">plt.figure(</text:span><text:span text:style-name="T7">figsize</text:span><text:span text:style-name="T3">=(</text:span><text:span text:style-name="T8">10</text:span><text:span text:style-name="T3">,</text:span><text:span text:style-name="T8">10</text:span><text:span text:style-name="T3">))<text:line-break/></text:span><text:span text:style-name="T4">for </text:span><text:span text:style-name="T3">i </text:span><text:span text:style-name="T4">in </text:span><text:span text:style-name="T9">range</text:span><text:span text:style-name="T3">(</text:span><text:span text:style-name="T8">25</text:span><text:span text:style-name="T3">):<text:line-break/></text:span><text:soft-page-break/><text:span text:style-name="T3"> <text:s text:c="3"/>plt.subplot(</text:span><text:span text:style-name="T8">5</text:span><text:span text:style-name="T3">,</text:span><text:span text:style-name="T8">5</text:span><text:span text:style-name="T3">,i+</text:span><text:span text:style-name="T8">1</text:span><text:span text:style-name="T3">)<text:line-break/> <text:s text:c="3"/>plt.xticks([])<text:line-break/> <text:s text:c="3"/>plt.yticks([])<text:line-break/> <text:s text:c="3"/>plt.grid(</text:span><text:span text:style-name="T4">False</text:span><text:span text:style-name="T3">)<text:line-break/> <text:s text:c="3"/>plt.imshow(train_images[i], </text:span><text:span text:style-name="T7">cmap</text:span><text:span text:style-name="T3">=</text:span><text:span text:style-name="T5">'gray'</text:span><text:span text:style-name="T3">)<text:line-break/> <text:s text:c="3"/>plt.xlabel(train_labels[i])<text:line-break/>plt.savefig(</text:span><text:span text:style-name="T5">'./plots/check_data.png'</text:span><text:span text:style-name="T3">)<text:line-break/>plt.close()<text:line-break/><text:line-break/></text:span><text:span text:style-name="T6">#format data<text:line-break/></text:span><text:span text:style-name="T3">train_images = train_images.reshape((</text:span><text:span text:style-name="T8">60000</text:span><text:span text:style-name="T3">, </text:span><text:span text:style-name="T8">784</text:span><text:span text:style-name="T3">))<text:line-break/>train_images = train_images.astype(</text:span><text:span text:style-name="T5">'float32'</text:span><text:span text:style-name="T3">) / </text:span><text:span text:style-name="T8">255<text:line-break/></text:span><text:span text:style-name="T3">test_images = test_images.reshape((</text:span><text:span text:style-name="T8">10000</text:span><text:span text:style-name="T3">, </text:span><text:span text:style-name="T8">784</text:span><text:span text:style-name="T3">))<text:line-break/>test_images = test_images.astype(</text:span><text:span text:style-name="T5">'float32'</text:span><text:span text:style-name="T3">) / </text:span><text:span text:style-name="T8">255<text:line-break/><text:line-break/></text:span><text:span text:style-name="T3">train_labels = to_categorical(train_labels)<text:line-break/>test_labels = to_categorical(test_labels)<text:line-break/><text:line-break/>np.savez(</text:span><text:span text:style-name="T5">"data/datasets.npz"</text:span><text:span text:style-name="T3">,<text:line-break/> <text:s text:c="8"/></text:span><text:span text:style-name="T7">train_images</text:span><text:span text:style-name="T3">=train_images,<text:line-break/> <text:s text:c="8"/></text:span><text:span text:style-name="T7">test_images</text:span><text:span text:style-name="T3">=test_images,<text:line-break/> <text:s text:c="8"/></text:span><text:span text:style-name="T7">train_labels</text:span><text:span text:style-name="T3">=train_labels,<text:line-break/> <text:s text:c="8"/></text:span><text:span text:style-name="T7">test_labels</text:span><text:span text:style-name="T3">=test_labels)</text:span></text:p>
      <text:p text:style-name="P14" loext:marker-style-name="T3"/>
      <text:p text:style-name="P34"/>
      <text:p text:style-name="P34">Зображення з даними:</text:p>
      <text:p text:style-name="P34"/>
      <text:p text:style-name="P34">---</text:p>
      <text:p text:style-name="P34"><draw:frame draw:style-name="fr1" draw:name="Image7" text:anchor-type="as-char" svg:width="7.994cm" svg:height="7.994cm" draw:z-index="6"><draw:image xlink:href="Pictures/10000001000003E8000003E84E9C9400.png" xlink:type="simple" xlink:show="embed" xlink:actuate="onLoad" draw:mime-type="image/png"/></draw:frame></text:p>
      <text:p text:style-name="P34">---</text:p>
      <text:p text:style-name="P35">Спеціально вивів зображення без підписів словами, щоб було видно – модель не сприйматиме зображення словами, а лише категоризуватиме за номерами. Тобто якщо будується апка навколо подібної моделі – інтерперитація результатів залишається програмною реалізацією на стороні розробників.</text:p>
      <text:p text:style-name="P35"/>
      <text:p text:style-name="P35"/>
      <text:p text:style-name="P35"/>
      <text:p text:style-name="P35"><text:soft-page-break/></text:p>
      <text:p text:style-name="P35">Тепер створимо й навчимо модель:</text:p>
      <text:p text:style-name="P35"/>
      <text:p text:style-name="P13" loext:marker-style-name="T3"><text:span text:style-name="T4">import </text:span><text:span text:style-name="T3">os<text:line-break/>os.environ[</text:span><text:span text:style-name="T5">"KERAS_BACKEND"</text:span><text:span text:style-name="T3">] = </text:span><text:span text:style-name="T5">"torch"<text:line-break/><text:line-break/></text:span><text:span text:style-name="T4">import </text:span><text:span text:style-name="T3">numpy </text:span><text:span text:style-name="T4">as </text:span><text:span text:style-name="T3">np<text:line-break/></text:span><text:span text:style-name="T4">from </text:span><text:span text:style-name="T3">keras </text:span><text:span text:style-name="T4">import </text:span><text:span text:style-name="T3">models<text:line-break/></text:span><text:span text:style-name="T4">from </text:span><text:span text:style-name="T3">keras </text:span><text:span text:style-name="T4">import </text:span><text:span text:style-name="T3">layers<text:line-break/><text:line-break/>data = np.load(</text:span><text:span text:style-name="T5">"data/datasets.npz"</text:span><text:span text:style-name="T3">)<text:line-break/><text:line-break/>train_images = data[</text:span><text:span text:style-name="T5">"train_images"</text:span><text:span text:style-name="T3">]<text:line-break/>train_labels = data[</text:span><text:span text:style-name="T5">"train_labels"</text:span><text:span text:style-name="T3">]<text:line-break/><text:line-break/>network = models.Sequential()<text:line-break/><text:line-break/>network.add(layers.Dense(</text:span><text:span text:style-name="T8">512</text:span><text:span text:style-name="T3">, </text:span><text:span text:style-name="T7">activation</text:span><text:span text:style-name="T3">=</text:span><text:span text:style-name="T5">'relu'</text:span><text:span text:style-name="T3">))<text:line-break/>network.add(layers.Dense(</text:span><text:span text:style-name="T8">10</text:span><text:span text:style-name="T3">, </text:span><text:span text:style-name="T7">activation</text:span><text:span text:style-name="T3">=</text:span><text:span text:style-name="T5">'softmax'</text:span><text:span text:style-name="T3">))<text:line-break/><text:line-break/>network.compile(</text:span><text:span text:style-name="T7">optimizer</text:span><text:span text:style-name="T3">=</text:span><text:span text:style-name="T5">'adam'</text:span><text:span text:style-name="T3">,</text:span><text:span text:style-name="T7">loss </text:span><text:span text:style-name="T3">= </text:span><text:span text:style-name="T5">'categorical_crossentropy'</text:span><text:span text:style-name="T3">,</text:span><text:span text:style-name="T7">metrics</text:span><text:span text:style-name="T3">=[</text:span><text:span text:style-name="T5">'accuracy'</text:span><text:span text:style-name="T3">])<text:line-break/><text:line-break/>network.fit(train_images,train_labels,</text:span><text:span text:style-name="T7">epochs</text:span><text:span text:style-name="T3">=</text:span><text:span text:style-name="T8">10</text:span><text:span text:style-name="T3">,</text:span><text:span text:style-name="T7">batch_size</text:span><text:span text:style-name="T3">=</text:span><text:span text:style-name="T8">128</text:span><text:span text:style-name="T3">)<text:line-break/><text:line-break/>network.save(</text:span><text:span text:style-name="T5">"model/fmnist_model.keras"</text:span><text:span text:style-name="T3">)</text:span></text:p>
      <text:p text:style-name="P14" loext:marker-style-name="T3"/>
      <text:p text:style-name="P35"/>
      <text:p text:style-name="P36">На відміну від минулої моделі, ця має оптимізатор adam, так як на даний момент він, як я зрозумів, є індустральним стандартом. Загалом я поекспериментував з різними кількостями нейронів і шарів, але нічого кращого за архітектуру з минулого пунтку не знайшов. <text:span text:style-name="T18">Також збільшив кіькість епох.</text:span></text:p>
      <text:p text:style-name="P36"/>
      <text:p text:style-name="P37">Вивід в консоль під час навчання:</text:p>
      <text:p text:style-name="P37"/>
      <text:p text:style-name="P37">---</text:p>
      <text:p text:style-name="P37">/home/misha/Documents/2sem26/ml/.venv/bin/python /home/misha/Documents/2sem26/ml/lab5/2-fmnist/2-fmnist_model.py </text:p>
      <text:p text:style-name="P37">Epoch 1/10</text:p>
      <text:p text:style-name="P37">469/469 ━━━━━━━━━━━━━━━━━━━━ 6s 13ms/step - accuracy: 0.8226 - loss: 0.5051</text:p>
      <text:p text:style-name="P37">Epoch 2/10</text:p>
      <text:p text:style-name="P37">469/469 ━━━━━━━━━━━━━━━━━━━━ 7s 14ms/step - accuracy: 0.8644 - loss: 0.3776</text:p>
      <text:p text:style-name="P37">Epoch 3/10</text:p>
      <text:p text:style-name="P37">469/469 ━━━━━━━━━━━━━━━━━━━━ 7s 14ms/step - accuracy: 0.8788 - loss: 0.3354</text:p>
      <text:p text:style-name="P37">Epoch 4/10</text:p>
      <text:p text:style-name="P37">469/469 ━━━━━━━━━━━━━━━━━━━━ 7s 14ms/step - accuracy: 0.8859 - loss: 0.3098</text:p>
      <text:p text:style-name="P37">Epoch 5/10</text:p>
      <text:p text:style-name="P37">469/469 ━━━━━━━━━━━━━━━━━━━━ 7s 14ms/step - accuracy: 0.8944 - loss: 0.2881</text:p>
      <text:p text:style-name="P37">Epoch 6/10</text:p>
      <text:p text:style-name="P37">469/469 ━━━━━━━━━━━━━━━━━━━━ 7s 14ms/step - accuracy: 0.8986 - loss: 0.2741</text:p>
      <text:p text:style-name="P37">Epoch 7/10</text:p>
      <text:p text:style-name="P37">469/469 ━━━━━━━━━━━━━━━━━━━━ 7s 14ms/step - accuracy: 0.9046 - loss: 0.2604</text:p>
      <text:p text:style-name="P37">Epoch 8/10</text:p>
      <text:p text:style-name="P37">469/469 ━━━━━━━━━━━━━━━━━━━━ 7s 14ms/step - accuracy: 0.9089 - loss: 0.2475</text:p>
      <text:p text:style-name="P37"><text:soft-page-break/>Epoch 9/10</text:p>
      <text:p text:style-name="P37">469/469 ━━━━━━━━━━━━━━━━━━━━ 7s 15ms/step - accuracy: 0.9120 - loss: 0.2385</text:p>
      <text:p text:style-name="P37">Epoch 10/10</text:p>
      <text:p text:style-name="P37">469/469 ━━━━━━━━━━━━━━━━━━━━ 6s 14ms/step - accuracy: 0.9138 - loss: 0.2296</text:p>
      <text:p text:style-name="P37"/>
      <text:p text:style-name="P37">Process finished with exit code 0</text:p>
      <text:p text:style-name="P37">---</text:p>
      <text:p text:style-name="P37"/>
      <text:p text:style-name="P38">Тестування на тестовій вибірці:</text:p>
      <text:p text:style-name="P38"/>
      <text:p text:style-name="P13" loext:marker-style-name="T3"><text:span text:style-name="T4">import </text:span><text:span text:style-name="T3">os<text:line-break/>os.environ[</text:span><text:span text:style-name="T5">"KERAS_BACKEND"</text:span><text:span text:style-name="T3">] = </text:span><text:span text:style-name="T5">"torch"<text:line-break/><text:line-break/></text:span><text:span text:style-name="T4">from </text:span><text:span text:style-name="T3">keras.models </text:span><text:span text:style-name="T4">import </text:span><text:span text:style-name="T3">load_model<text:line-break/></text:span><text:span text:style-name="T4">import </text:span><text:span text:style-name="T3">numpy </text:span><text:span text:style-name="T4">as </text:span><text:span text:style-name="T3">np<text:line-break/><text:line-break/>data = np.load(</text:span><text:span text:style-name="T5">"data/datasets.npz"</text:span><text:span text:style-name="T3">)<text:line-break/><text:line-break/>test_images = data[</text:span><text:span text:style-name="T5">"test_images"</text:span><text:span text:style-name="T3">]<text:line-break/>test_labels = data[</text:span><text:span text:style-name="T5">"test_labels"</text:span><text:span text:style-name="T3">]<text:line-break/><text:line-break/>fmnist_model = load_model(</text:span><text:span text:style-name="T5">"model/fmnist_model.keras"</text:span><text:span text:style-name="T3">)<text:line-break/><text:line-break/>test_loss, test_acc = fmnist_model.evaluate(test_images, test_labels)<text:line-break/><text:line-break/></text:span><text:span text:style-name="T9">print</text:span><text:span text:style-name="T3">(</text:span><text:span text:style-name="T5">"</text:span><text:span text:style-name="T4">\n</text:span><text:span text:style-name="T5">Test accuracy:"</text:span><text:span text:style-name="T3">, test_acc)<text:line-break/></text:span><text:span text:style-name="T9">print</text:span><text:span text:style-name="T3">(</text:span><text:span text:style-name="T5">"Test loss:"</text:span><text:span text:style-name="T3">, test_loss)</text:span></text:p>
      <text:p text:style-name="P14" loext:marker-style-name="T3"/>
      <text:p text:style-name="P38"/>
      <text:p text:style-name="P39">Результат:</text:p>
      <text:p text:style-name="P39">---</text:p>
      <text:p text:style-name="P39">/home/misha/Documents/2sem26/ml/.venv/bin/python /home/misha/Documents/2sem26/ml/lab5/2-fmnist/3-fmnist_test.py </text:p>
      <text:p text:style-name="P39">313/313 ━━━━━━━━━━━━━━━━━━━━ 2s 6ms/step - accuracy: 0.8811 - loss: 0.3292</text:p>
      <text:p text:style-name="P39"/>
      <text:p text:style-name="P39">Test accuracy: 0.8810999989509583</text:p>
      <text:p text:style-name="P39">Test loss: 0.3292371928691864</text:p>
      <text:p text:style-name="P39"/>
      <text:p text:style-name="P39">Process finished with exit code 0</text:p>
      <text:p text:style-name="P39">---</text:p>
      <text:p text:style-name="P39"/>
      <text:p text:style-name="P40">Результат тестування значно гірший, ніж в mnist моделі. На цьому етапі видно, що потужність повнов’язних мереже зменшується зі зростанням складності і сирості зображення.</text:p>
      <text:p text:style-name="P40"/>
      <text:p text:style-name="P41">Перевіримо на вручну створених зображенях:</text:p>
      <text:p text:style-name="P41"/>
      <text:p text:style-name="P41"><draw:frame draw:style-name="fr1" draw:name="Image8" text:anchor-type="as-char" svg:width="4.262cm" svg:height="3.196cm" draw:z-index="7"><draw:image xlink:href="Pictures/1000000100000320000002584B777C69.png" xlink:type="simple" xlink:show="embed" xlink:actuate="onLoad" draw:mime-type="image/png"/></draw:frame><text:s/><draw:frame draw:style-name="fr4" draw:name="Image9" text:anchor-type="as-char" svg:y="-3.168cm" svg:width="4.242cm" svg:height="3.182cm" draw:z-index="8"><draw:image xlink:href="Pictures/100000010000032000000258366CFDD6.png" xlink:type="simple" xlink:show="embed" xlink:actuate="onLoad" draw:mime-type="image/png"/></draw:frame><text:s text:c="2"/><draw:frame draw:style-name="fr4" draw:name="Image10" text:anchor-type="as-char" svg:y="-3.143cm" svg:width="4.156cm" svg:height="3.117cm" draw:z-index="9"><draw:image xlink:href="Pictures/100000010000032000000258B0F96186.png" xlink:type="simple" xlink:show="embed" xlink:actuate="onLoad" draw:mime-type="image/png"/></draw:frame></text:p>
      <text:p text:style-name="P41"><text:soft-page-break/></text:p>
      <text:p text:style-name="P42">Хоч малювання й не було ніколи моєю сильною стороною, цього для моделі має бути достатньо (в теорії).</text:p>
      <text:p text:style-name="P42"/>
      <text:p text:style-name="P42">Код для тестування:</text:p>
      <text:p text:style-name="P42"/>
      <text:p text:style-name="P13" loext:marker-style-name="T3"><text:span text:style-name="T4">import </text:span><text:span text:style-name="T3">os<text:line-break/>os.environ[</text:span><text:span text:style-name="T5">"KERAS_BACKEND"</text:span><text:span text:style-name="T3">] = </text:span><text:span text:style-name="T5">"torch"<text:line-break/><text:line-break/></text:span><text:span text:style-name="T4">from </text:span><text:span text:style-name="T3">keras.models </text:span><text:span text:style-name="T4">import </text:span><text:span text:style-name="T3">load_model<text:line-break/></text:span><text:span text:style-name="T4">import </text:span><text:span text:style-name="T3">cv2<text:line-break/></text:span><text:span text:style-name="T4">import </text:span><text:span text:style-name="T3">numpy </text:span><text:span text:style-name="T4">as </text:span><text:span text:style-name="T3">np<text:line-break/></text:span><text:span text:style-name="T4">import </text:span><text:span text:style-name="T3">matplotlib.pyplot </text:span><text:span text:style-name="T4">as </text:span><text:span text:style-name="T3">plt<text:line-break/><text:line-break/>mnist_model = load_model(</text:span><text:span text:style-name="T5">"model/fmnist_model.keras"</text:span><text:span text:style-name="T3">)<text:line-break/><text:line-break/>file_names = [</text:span><text:span text:style-name="T5">'tshort.png'</text:span><text:span text:style-name="T3">, </text:span><text:span text:style-name="T5">'pants.png'</text:span><text:span text:style-name="T3">, </text:span><text:span text:style-name="T5">'shorts.png'</text:span><text:span text:style-name="T3">]<text:line-break/>real = [</text:span><text:span text:style-name="T5">"T-shirt/top"</text:span><text:span text:style-name="T3">, </text:span><text:span text:style-name="T5">"Trouser"</text:span><text:span text:style-name="T3">, </text:span><text:span text:style-name="T5">"Pullover"</text:span><text:span text:style-name="T3">, </text:span><text:span text:style-name="T5">"Dress"</text:span><text:span text:style-name="T3">, </text:span><text:span text:style-name="T5">"Coat"</text:span><text:span text:style-name="T3">, </text:span><text:span text:style-name="T5">"Sandal"</text:span><text:span text:style-name="T3">, </text:span><text:span text:style-name="T5">"Shirt"</text:span><text:span text:style-name="T3">, </text:span><text:span text:style-name="T5">"Sneaker"</text:span><text:span text:style-name="T3">, </text:span><text:span text:style-name="T5">"Bag"</text:span><text:span text:style-name="T3">, </text:span><text:span text:style-name="T5">"Ankle boot"</text:span><text:span text:style-name="T3">]<text:line-break/>items = [</text:span><text:span text:style-name="T5">"Футболка"</text:span><text:span text:style-name="T3">, </text:span><text:span text:style-name="T5">"Штани"</text:span><text:span text:style-name="T3">, </text:span><text:span text:style-name="T5">"Шорти"</text:span><text:span text:style-name="T3">]<text:line-break/>processed = []<text:line-break/><text:line-break/></text:span><text:span text:style-name="T4">for </text:span><text:span text:style-name="T3">name </text:span><text:span text:style-name="T4">in </text:span><text:span text:style-name="T3">file_names:<text:line-break/> full_path = os.path.join(</text:span><text:span text:style-name="T5">'data/handw/'</text:span><text:span text:style-name="T3">, name)<text:line-break/><text:line-break/> tst = </text:span><text:span text:style-name="T8">255 </text:span><text:span text:style-name="T3">- cv2.imread(full_path, </text:span><text:span text:style-name="T8">0</text:span><text:span text:style-name="T3">)<text:line-break/> tst = cv2.resize(tst, (</text:span><text:span text:style-name="T8">28</text:span><text:span text:style-name="T3">, </text:span><text:span text:style-name="T8">28</text:span><text:span text:style-name="T3">))<text:line-break/> tst = tst.reshape((</text:span><text:span text:style-name="T8">1</text:span><text:span text:style-name="T3">,</text:span><text:span text:style-name="T8">784</text:span><text:span text:style-name="T3">))<text:line-break/> tst = tst.astype(</text:span><text:span text:style-name="T5">'float32'</text:span><text:span text:style-name="T3">) / </text:span><text:span text:style-name="T8">255<text:line-break/><text:line-break/> </text:span><text:span text:style-name="T3">processed.append(tst)<text:line-break/><text:line-break/></text:span><text:span text:style-name="T4">for </text:span><text:span text:style-name="T3">tst, item </text:span><text:span text:style-name="T4">in </text:span><text:span text:style-name="T9">zip</text:span><text:span text:style-name="T3">(processed, items):<text:line-break/> predictions = mnist_model.predict(tst, </text:span><text:span text:style-name="T7">verbose</text:span><text:span text:style-name="T3">=</text:span><text:span text:style-name="T8">0</text:span><text:span text:style-name="T3">)<text:line-break/> prediction = np.argmax(predictions)<text:line-break/> confidence = np.max(predictions) * </text:span><text:span text:style-name="T8">100<text:line-break/><text:line-break/> </text:span><text:span text:style-name="T9">print</text:span><text:span text:style-name="T3">(</text:span><text:span text:style-name="T5">f"Predicted: </text:span><text:span text:style-name="T4">{</text:span><text:span text:style-name="T3">real[prediction]</text:span><text:span text:style-name="T4">}</text:span><text:span text:style-name="T5"> | Real: </text:span><text:span text:style-name="T4">{</text:span><text:span text:style-name="T3">item</text:span><text:span text:style-name="T4">}</text:span><text:span text:style-name="T5"> | Confidence: </text:span><text:span text:style-name="T4">{</text:span><text:span text:style-name="T3">confidence</text:span><text:span text:style-name="T4">:</text:span><text:span text:style-name="T5">.2f</text:span><text:span text:style-name="T4">}</text:span><text:span text:style-name="T5">%"</text:span><text:span text:style-name="T3">)<text:line-break/><text:line-break/></text:span><text:span text:style-name="T6">#check data<text:line-break/></text:span><text:span text:style-name="T3">plt.figure(</text:span><text:span text:style-name="T7">figsize</text:span><text:span text:style-name="T3">=(</text:span><text:span text:style-name="T8">10</text:span><text:span text:style-name="T3">, </text:span><text:span text:style-name="T8">5</text:span><text:span text:style-name="T3">))<text:line-break/></text:span><text:span text:style-name="T4">for </text:span><text:span text:style-name="T3">i </text:span><text:span text:style-name="T4">in </text:span><text:span text:style-name="T9">range</text:span><text:span text:style-name="T3">(</text:span><text:span text:style-name="T8">3</text:span><text:span text:style-name="T3">):<text:line-break/> plt.subplot(</text:span><text:span text:style-name="T8">1</text:span><text:span text:style-name="T3">, </text:span><text:span text:style-name="T8">4</text:span><text:span text:style-name="T3">, i+</text:span><text:span text:style-name="T8">1</text:span><text:span text:style-name="T3">)</text:span><text:span text:style-name="T6"><text:line-break/> </text:span><text:span text:style-name="T3">plt.xticks([])<text:line-break/> plt.yticks([])<text:line-break/> plt.grid(</text:span><text:span text:style-name="T4">False</text:span><text:span text:style-name="T3">)<text:line-break/><text:line-break/> display_img = processed[i].reshape(</text:span><text:span text:style-name="T8">28</text:span><text:span text:style-name="T3">, </text:span><text:span text:style-name="T8">28</text:span><text:span text:style-name="T3">)<text:line-break/><text:line-break/> plt.imshow(display_img, </text:span><text:span text:style-name="T7">cmap</text:span><text:span text:style-name="T3">=</text:span><text:span text:style-name="T5">'gray'</text:span><text:span text:style-name="T3">)<text:line-break/> plt.xlabel(</text:span><text:span text:style-name="T5">f"Real: </text:span><text:span text:style-name="T4">{</text:span><text:span text:style-name="T3">items[i]</text:span><text:span text:style-name="T4">}</text:span><text:span text:style-name="T5">"</text:span><text:span text:style-name="T3">)<text:line-break/>plt.tight_layout()<text:line-break/>plt.savefig(</text:span><text:span text:style-name="T5">'./plots/formatted_hndw.png'</text:span><text:span text:style-name="T3">)<text:line-break/></text:span><text:soft-page-break/><text:span text:style-name="T3">plt.close()</text:span></text:p>
      <text:p text:style-name="P14" loext:marker-style-name="T3"/>
      <text:p text:style-name="P14" loext:marker-style-name="T3"/>
      <text:p text:style-name="P42"/>
      <text:p text:style-name="P42">Додано мапинг відповіді в слово – клас одягу.</text:p>
      <text:p text:style-name="P42"/>
      <text:p text:style-name="P42">Результат:</text:p>
      <text:p text:style-name="P42"/>
      <text:p text:style-name="P43">---</text:p>
      <text:p text:style-name="P43">/home/misha/Documents/2sem26/ml/.venv/bin/python /home/misha/Documents/2sem26/ml/lab5/2-fmnist/4-fmnist_test2.py </text:p>
      <text:p text:style-name="P43">Predicted: T-shirt/top | Real: Футболка | Confidence: 96.71%</text:p>
      <text:p text:style-name="P43">Predicted: Coat | Real: Штани | Confidence: 59.12%</text:p>
      <text:p text:style-name="P43">Predicted: Pullover | Real: Шорти | Confidence: 40.47%</text:p>
      <text:p text:style-name="P43"/>
      <text:p text:style-name="P43">Process finished with exit code 0</text:p>
      <text:p text:style-name="P44">---</text:p>
      <text:p text:style-name="P44"/>
      <text:p text:style-name="P45">Модель вгадала тільки футболку, а в штанах і шортах помилилась (мав бути один і той самий клас trausers)</text:p>
      <text:p text:style-name="P46"/>
      <text:p text:style-name="P47">Відформатовані зображення:</text:p>
      <text:p text:style-name="P48"/>
      <text:p text:style-name="P48">---</text:p>
      <text:p text:style-name="P49"><draw:frame draw:style-name="fr1" draw:name="Image11" text:anchor-type="as-char" svg:width="12.873cm" svg:height="6.436cm" draw:z-index="10"><draw:image xlink:href="Pictures/10000001000003E8000001F448A8991B.png" xlink:type="simple" xlink:show="embed" xlink:actuate="onLoad" draw:mime-type="image/png"/></draw:frame></text:p>
      <text:p text:style-name="P50">---</text:p>
      <text:p text:style-name="P50"/>
      <text:p text:style-name="P51">Цього разу зображення достатньо нормальні, але архітектура моделі занадто проста. Наступна модель точно має бути складнішою, особливо враховуючи набір cifar10.</text:p>
      <text:p text:style-name="P52"/>
      <text:p text:style-name="P52"><text:span text:style-name="T19">2) Cifar10</text:span></text:p>
      <text:p text:style-name="P52"/>
      <text:p text:style-name="P53">Завантажимо дані:</text:p>
      <text:p text:style-name="P53"/>
      <text:p text:style-name="P13" loext:marker-style-name="T3"><text:span text:style-name="T4">import </text:span><text:span text:style-name="T3">os<text:line-break/>os.environ[</text:span><text:span text:style-name="T5">"KERAS_BACKEND"</text:span><text:span text:style-name="T3">] = </text:span><text:span text:style-name="T5">"torch"<text:line-break/><text:line-break/></text:span><text:span text:style-name="T4">from </text:span><text:span text:style-name="T3">keras.datasets </text:span><text:span text:style-name="T4">import </text:span><text:span text:style-name="T3">cifar10<text:line-break/></text:span><text:span text:style-name="T4">from </text:span><text:span text:style-name="T3">keras.utils </text:span><text:span text:style-name="T4">import </text:span><text:span text:style-name="T3">to_categorical<text:line-break/></text:span><text:span text:style-name="T4">import </text:span><text:span text:style-name="T3">matplotlib.pyplot </text:span><text:span text:style-name="T4">as </text:span><text:span text:style-name="T3">plt<text:line-break/></text:span><text:span text:style-name="T4">import </text:span><text:span text:style-name="T3">numpy </text:span><text:span text:style-name="T4">as </text:span><text:span text:style-name="T3">np<text:line-break/></text:span><text:soft-page-break/><text:span text:style-name="T3"><text:line-break/></text:span><text:span text:style-name="T6">#load data<text:line-break/></text:span><text:span text:style-name="T3">(train_images, train_labels), (test_images, test_labels) = cifar10.load_data()<text:line-break/><text:line-break/></text:span><text:span text:style-name="T6">#check data<text:line-break/></text:span><text:span text:style-name="T3">plt.figure(</text:span><text:span text:style-name="T7">figsize</text:span><text:span text:style-name="T3">=(</text:span><text:span text:style-name="T8">10</text:span><text:span text:style-name="T3">,</text:span><text:span text:style-name="T8">10</text:span><text:span text:style-name="T3">))<text:line-break/></text:span><text:span text:style-name="T4">for </text:span><text:span text:style-name="T3">i </text:span><text:span text:style-name="T4">in </text:span><text:span text:style-name="T9">range</text:span><text:span text:style-name="T3">(</text:span><text:span text:style-name="T8">25</text:span><text:span text:style-name="T3">):<text:line-break/> <text:s text:c="3"/>plt.subplot(</text:span><text:span text:style-name="T8">5</text:span><text:span text:style-name="T3">,</text:span><text:span text:style-name="T8">5</text:span><text:span text:style-name="T3">,i+</text:span><text:span text:style-name="T8">1</text:span><text:span text:style-name="T3">)<text:line-break/> <text:s text:c="3"/>plt.xticks([])<text:line-break/> <text:s text:c="3"/>plt.yticks([])<text:line-break/> <text:s text:c="3"/>plt.grid(</text:span><text:span text:style-name="T4">False</text:span><text:span text:style-name="T3">)<text:line-break/> <text:s text:c="3"/>plt.imshow(train_images[i])<text:line-break/> <text:s text:c="3"/>plt.xlabel(train_labels[i])<text:line-break/>plt.savefig(</text:span><text:span text:style-name="T5">'./plots/check_data.png'</text:span><text:span text:style-name="T3">)<text:line-break/>plt.close()<text:line-break/><text:line-break/></text:span><text:span text:style-name="T6">#format data<text:line-break/></text:span><text:span text:style-name="T3">train_images = train_images.astype(</text:span><text:span text:style-name="T5">'float32'</text:span><text:span text:style-name="T3">) / </text:span><text:span text:style-name="T8">255<text:line-break/></text:span><text:span text:style-name="T3">test_images = test_images.astype(</text:span><text:span text:style-name="T5">'float32'</text:span><text:span text:style-name="T3">) / </text:span><text:span text:style-name="T8">255<text:line-break/><text:line-break/></text:span><text:span text:style-name="T3">train_labels = to_categorical(train_labels)<text:line-break/>test_labels = to_categorical(test_labels)<text:line-break/><text:line-break/>np.savez(</text:span><text:span text:style-name="T5">"data/datasets.npz"</text:span><text:span text:style-name="T3">,<text:line-break/> <text:s text:c="8"/></text:span><text:span text:style-name="T7">train_images</text:span><text:span text:style-name="T3">=train_images,<text:line-break/> <text:s text:c="8"/></text:span><text:span text:style-name="T7">test_images</text:span><text:span text:style-name="T3">=test_images,<text:line-break/> <text:s text:c="8"/></text:span><text:span text:style-name="T7">train_labels</text:span><text:span text:style-name="T3">=train_labels,<text:line-break/> <text:s text:c="8"/></text:span><text:span text:style-name="T7">test_labels</text:span><text:span text:style-name="T3">=test_labels)</text:span></text:p>
      <text:p text:style-name="P14" loext:marker-style-name="T3"/>
      <text:p text:style-name="P53"/>
      <text:p text:style-name="P54">Цього разу решейп зайвий, модель буде опрацовавати дані в початковому вигляді. Достатньо нормалізувати значення кольорів зображень і катигоризувати лейбли.</text:p>
      <text:p text:style-name="P54"/>
      <text:p text:style-name="P55">Приклад даних з набору cifar10:</text:p>
      <text:p text:style-name="P55">---</text:p>
      <text:p text:style-name="P55"><draw:frame draw:style-name="fr2" draw:name="Image12" text:anchor-type="as-char" svg:width="7.527cm" svg:height="7.527cm" draw:z-index="11"><draw:image xlink:href="Pictures/10000001000003E8000003E8E4A5AE79.png" xlink:type="simple" xlink:show="embed" xlink:actuate="onLoad" draw:mime-type="image/png"/></draw:frame></text:p>
      <text:p text:style-name="P55">---</text:p>
      <text:p text:style-name="P55"/>
      <text:p text:style-name="P55"><text:soft-page-break/></text:p>
      <text:p text:style-name="P56">Створю й навчу модель:</text:p>
      <text:p text:style-name="P56"/>
      <text:p text:style-name="P14" loext:marker-style-name="T3">import os</text:p>
      <text:p text:style-name="P14" loext:marker-style-name="T3">os.environ["CUDA_VISIBLE_DEVICES"] = "-1"</text:p>
      <text:p text:style-name="P14" loext:marker-style-name="T3">os.environ["KERAS_BACKEND"] = "torch"</text:p>
      <text:p text:style-name="P14" loext:marker-style-name="T3"/>
      <text:p text:style-name="P14" loext:marker-style-name="T3">import numpy as np</text:p>
      <text:p text:style-name="P14" loext:marker-style-name="T3">from keras import models</text:p>
      <text:p text:style-name="P14" loext:marker-style-name="T3">from keras import layers</text:p>
      <text:p text:style-name="P14" loext:marker-style-name="T3"/>
      <text:p text:style-name="P14" loext:marker-style-name="T3">data = np.load("data/datasets.npz")</text:p>
      <text:p text:style-name="P14" loext:marker-style-name="T3"/>
      <text:p text:style-name="P14" loext:marker-style-name="T3">train_images = data["train_images"]</text:p>
      <text:p text:style-name="P14" loext:marker-style-name="T3">train_labels = data["train_labels"]</text:p>
      <text:p text:style-name="P14" loext:marker-style-name="T3"/>
      <text:p text:style-name="P14" loext:marker-style-name="T3">network = models.Sequential()</text:p>
      <text:p text:style-name="P14" loext:marker-style-name="T3"/>
      <text:p text:style-name="P14" loext:marker-style-name="T3">#l1</text:p>
      <text:p text:style-name="P14" loext:marker-style-name="T3">network.add(layers.Conv2D(32, (3, 3),padding="same", activation='relu'))</text:p>
      <text:p text:style-name="P14" loext:marker-style-name="T3">network.add(layers.BatchNormalization())</text:p>
      <text:p text:style-name="P14" loext:marker-style-name="T3">network.add(layers.MaxPooling2D((2, 2)))</text:p>
      <text:p text:style-name="P14" loext:marker-style-name="T3">network.add(layers.Dropout(0.<text:span text:style-name="T20">3</text:span>))</text:p>
      <text:p text:style-name="P14" loext:marker-style-name="T3"/>
      <text:p text:style-name="P14" loext:marker-style-name="T3">#l2</text:p>
      <text:p text:style-name="P14" loext:marker-style-name="T3">network.add(layers.Conv2D(64, (3, 3), padding="same", activation='relu'))</text:p>
      <text:p text:style-name="P14" loext:marker-style-name="T3">network.add(layers.BatchNormalization())</text:p>
      <text:p text:style-name="P14" loext:marker-style-name="T3">network.add(layers.MaxPooling2D((2, 2)))</text:p>
      <text:p text:style-name="P14" loext:marker-style-name="T3">network.add(layers.Dropout(0.<text:span text:style-name="T20">3</text:span>))</text:p>
      <text:p text:style-name="P14" loext:marker-style-name="T3"/>
      <text:p text:style-name="P14" loext:marker-style-name="T3">#l3</text:p>
      <text:p text:style-name="P14" loext:marker-style-name="T3">network.add(layers.Conv2D(128, (3, 3), padding="same", activation='relu'))</text:p>
      <text:p text:style-name="P14" loext:marker-style-name="T3">network.add(layers.BatchNormalization())</text:p>
      <text:p text:style-name="P14" loext:marker-style-name="T3">network.add(layers.MaxPooling2D((2, 2)))</text:p>
      <text:p text:style-name="P14" loext:marker-style-name="T3">network.add(layers.Dropout(0.<text:span text:style-name="T20">3</text:span>))</text:p>
      <text:p text:style-name="P14" loext:marker-style-name="T3"/>
      <text:p text:style-name="P14" loext:marker-style-name="T3">#l4</text:p>
      <text:p text:style-name="P14" loext:marker-style-name="T3">network.add(layers.Conv2D(256, (3, 3), padding="same", activation='relu'))</text:p>
      <text:p text:style-name="P14" loext:marker-style-name="T3">network.add(layers.BatchNormalization())</text:p>
      <text:p text:style-name="P14" loext:marker-style-name="T3">network.add(layers.MaxPooling2D((2, 2)))</text:p>
      <text:p text:style-name="P14" loext:marker-style-name="T3">network.add(layers.Dropout(0.<text:span text:style-name="T20">3</text:span>))</text:p>
      <text:p text:style-name="P14" loext:marker-style-name="T3"/>
      <text:p text:style-name="P14" loext:marker-style-name="T3">#l5</text:p>
      <text:p text:style-name="P14" loext:marker-style-name="T3">network.add(layers.Flatten())</text:p>
      <text:p text:style-name="P14" loext:marker-style-name="T3">network.add(layers.Dense(256, activation='relu'))</text:p>
      <text:p text:style-name="P14" loext:marker-style-name="T3">network.add(layers.BatchNormalization())</text:p>
      <text:p text:style-name="P14" loext:marker-style-name="T3">network.add(layers.Dropout(0.<text:span text:style-name="T20">4</text:span>))</text:p>
      <text:p text:style-name="P14" loext:marker-style-name="T3">network.add(layers.Dense(10, activation='softmax'))</text:p>
      <text:p text:style-name="P14" loext:marker-style-name="T3"/>
      <text:p text:style-name="P14" loext:marker-style-name="T3">network.compile(optimizer='adam', loss='categorical_crossentropy', metrics=['accuracy'])</text:p>
      <text:p text:style-name="P14" loext:marker-style-name="T3"/>
      <text:p text:style-name="P14" loext:marker-style-name="T3">network.fit(train_images, train_labels, epochs=20, batch_size=64)</text:p>
      <text:p text:style-name="P14" loext:marker-style-name="T3"/>
      <text:p text:style-name="P14" loext:marker-style-name="T3"><text:soft-page-break/>network.save("model/cifar_model.keras")</text:p>
      <text:p text:style-name="P14" loext:marker-style-name="T3"/>
      <text:p text:style-name="P14" loext:marker-style-name="T3"/>
      <text:p text:style-name="P57"/>
      <text:p text:style-name="P58">Тут вже архітектура значно складніша. Маємо <text:span text:style-name="T21">4</text:span> згурткові шари (32, 64, 128 <text:span text:style-name="T21">і 256</text:span> <text:span text:style-name="T22">фільтри</text:span>) і 2 повнов’язні шари, один з функцією активації relu, інший – softmax (<text:span text:style-name="T23">256</text:span> і 10 нейронів відповідно). Ще один, найперший шар, буде визначено при навчанні (матиме 32*32 нейрони). <text:span text:style-name="T24">Крім цього маємо допоміжні шари.</text:span></text:p>
      <text:p text:style-name="P58"><text:span text:style-name="T24">Drop</text:span><text:span text:style-name="T25">o</text:span><text:span text:style-name="T24">ut шар вимикає випадкові </text:span><text:span text:style-name="T26">3</text:span><text:span text:style-name="T24">0% нейронів з минулого шару, занюляючи і перериваючи їх зв’язок з наступним шаром, </text:span><text:span text:style-name="T21">це допомагає уникнути перенавчання</text:span><text:span text:style-name="T24">.</text:span></text:p>
      <text:p text:style-name="P59">Використавується Dense шари в кінці для остаточного визначення.</text:p>
      <text:p text:style-name="P60">MaxPooling2D зменшує роздільну здатність з<text:span text:style-name="T27">ображення </text:span><text:span text:style-name="T28">інформації</text:span> в 4 рази <text:span text:style-name="T29">після кожного шару нормалізації</text:span>.</text:p>
      <text:p text:style-name="P61">BatchNormalization – <text:span text:style-name="T30">нормалізація відповіді з минулого шару, </text:span><text:span text:style-name="T21">допомагає уникнути перенавчання і оптимізувати процес.</text:span></text:p>
      <text:p text:style-name="P62">Така архітектура є поширеною для аналізу зображень. <text:span text:style-name="T31">Перші шари шукають прості структури, наступні – складніші.</text:span></text:p>
      <text:p text:style-name="P62"/>
      <text:p text:style-name="P63">Процес навчання:</text:p>
      <text:p text:style-name="P63"/>
      <text:p text:style-name="P63">---</text:p>
      <text:p text:style-name="P63">/home/mike/PyProjs/mlLabs/.venv/bin/python /home/mike/PyProjs/mlLabs/lab5/3-cifar/2-cifar_model.py </text:p>
      <text:p text:style-name="P63">Epoch 1/20</text:p>
      <text:p text:style-name="P63">782/782 ━━━━━━━━━━━━━━━━━━━━ 37s 47ms/step - accuracy: 0.4163 - loss: 1.6923</text:p>
      <text:p text:style-name="P63">Epoch 2/20</text:p>
      <text:p text:style-name="P63">782/782 ━━━━━━━━━━━━━━━━━━━━ 36s 46ms/step - accuracy: 0.5624 - loss: 1.2211</text:p>
      <text:p text:style-name="P63">Epoch 3/20</text:p>
      <text:p text:style-name="P63">782/782 ━━━━━━━━━━━━━━━━━━━━ 36s 45ms/step - accuracy: 0.6263 - loss: 1.0541</text:p>
      <text:p text:style-name="P63">Epoch 4/20</text:p>
      <text:p text:style-name="P63">782/782 ━━━━━━━━━━━━━━━━━━━━ 36s 45ms/step - accuracy: 0.6666 - loss: 0.9481</text:p>
      <text:p text:style-name="P63">Epoch 5/20</text:p>
      <text:p text:style-name="P63">782/782 ━━━━━━━━━━━━━━━━━━━━ 36s 45ms/step - accuracy: 0.6937 - loss: 0.8734</text:p>
      <text:p text:style-name="P63">Epoch 6/20</text:p>
      <text:p text:style-name="P63">782/782 ━━━━━━━━━━━━━━━━━━━━ 35s 45ms/step - accuracy: 0.7102 - loss: 0.8269</text:p>
      <text:p text:style-name="P63">Epoch 7/20</text:p>
      <text:p text:style-name="P63">782/782 ━━━━━━━━━━━━━━━━━━━━ 36s 46ms/step - accuracy: 0.7236 - loss: 0.7848</text:p>
      <text:p text:style-name="P63">Epoch 8/20</text:p>
      <text:p text:style-name="P63">782/782 ━━━━━━━━━━━━━━━━━━━━ 36s 46ms/step - accuracy: 0.7402 - loss: 0.7476</text:p>
      <text:p text:style-name="P63">Epoch 9/20</text:p>
      <text:p text:style-name="P63">782/782 ━━━━━━━━━━━━━━━━━━━━ 36s 46ms/step - accuracy: 0.7495 - loss: 0.7203</text:p>
      <text:p text:style-name="P63">Epoch 10/20</text:p>
      <text:p text:style-name="P63">782/782 ━━━━━━━━━━━━━━━━━━━━ 36s 46ms/step - accuracy: 0.7591 - loss: 0.6874</text:p>
      <text:p text:style-name="P63">Epoch 11/20</text:p>
      <text:p text:style-name="P63">782/782 ━━━━━━━━━━━━━━━━━━━━ 35s 45ms/step - accuracy: 0.7709 - loss: 0.6625</text:p>
      <text:p text:style-name="P63">Epoch 12/20</text:p>
      <text:p text:style-name="P63">782/782 ━━━━━━━━━━━━━━━━━━━━ 36s 46ms/step - accuracy: 0.7747 - loss: 0.6458</text:p>
      <text:p text:style-name="P63">Epoch 13/20</text:p>
      <text:p text:style-name="P63">782/782 ━━━━━━━━━━━━━━━━━━━━ 35s 45ms/step - accuracy: 0.7797 - loss: 0.6305</text:p>
      <text:p text:style-name="P63">Epoch 14/20</text:p>
      <text:p text:style-name="P63">782/782 ━━━━━━━━━━━━━━━━━━━━ 36s 45ms/step - accuracy: 0.7852 - loss: 0.6080</text:p>
      <text:p text:style-name="P63">Epoch 15/20</text:p>
      <text:p text:style-name="P63">782/782 ━━━━━━━━━━━━━━━━━━━━ 36s 45ms/step - accuracy: 0.7924 - loss: 0.5921</text:p>
      <text:p text:style-name="P63"><text:soft-page-break/>Epoch 16/20</text:p>
      <text:p text:style-name="P63">782/782 ━━━━━━━━━━━━━━━━━━━━ 36s 46ms/step - accuracy: 0.7970 - loss: 0.5809</text:p>
      <text:p text:style-name="P63">Epoch 17/20</text:p>
      <text:p text:style-name="P63">782/782 ━━━━━━━━━━━━━━━━━━━━ 36s 46ms/step - accuracy: 0.8001 - loss: 0.5694</text:p>
      <text:p text:style-name="P63">Epoch 18/20</text:p>
      <text:p text:style-name="P63">782/782 ━━━━━━━━━━━━━━━━━━━━ 36s 46ms/step - accuracy: 0.8052 - loss: 0.5527</text:p>
      <text:p text:style-name="P63">Epoch 19/20</text:p>
      <text:p text:style-name="P63">782/782 ━━━━━━━━━━━━━━━━━━━━ 36s 46ms/step - accuracy: 0.8082 - loss: 0.5425</text:p>
      <text:p text:style-name="P63">Epoch 20/20</text:p>
      <text:p text:style-name="P63">782/782 ━━━━━━━━━━━━━━━━━━━━ 39s 49ms/step - accuracy: 0.8106 - loss: 0.5356</text:p>
      <text:p text:style-name="P63"/>
      <text:p text:style-name="P63">Process finished with exit code 0</text:p>
      <text:p text:style-name="P63">---</text:p>
      <text:p text:style-name="P63"/>
      <text:p text:style-name="P64">Тестування:</text:p>
      <text:p text:style-name="P64"/>
      <text:p text:style-name="P13" loext:marker-style-name="T3"><text:span text:style-name="T4">import </text:span><text:span text:style-name="T3">os<text:line-break/>os.environ[</text:span><text:span text:style-name="T5">"KERAS_BACKEND"</text:span><text:span text:style-name="T3">] = </text:span><text:span text:style-name="T5">"torch"<text:line-break/><text:line-break/></text:span><text:span text:style-name="T4">from </text:span><text:span text:style-name="T3">keras.models </text:span><text:span text:style-name="T4">import </text:span><text:span text:style-name="T3">load_model<text:line-break/></text:span><text:span text:style-name="T4">import </text:span><text:span text:style-name="T3">numpy </text:span><text:span text:style-name="T4">as </text:span><text:span text:style-name="T3">np<text:line-break/><text:line-break/>data = np.load(</text:span><text:span text:style-name="T5">"data/datasets.npz"</text:span><text:span text:style-name="T3">)<text:line-break/><text:line-break/>test_images = data[</text:span><text:span text:style-name="T5">"test_images"</text:span><text:span text:style-name="T3">]<text:line-break/>test_labels = data[</text:span><text:span text:style-name="T5">"test_labels"</text:span><text:span text:style-name="T3">]<text:line-break/><text:line-break/>cifar_model = load_model(</text:span><text:span text:style-name="T5">"model/cifar_model.keras"</text:span><text:span text:style-name="T3">)<text:line-break/><text:line-break/>test_loss, test_acc = cifar_model.evaluate(test_images, test_labels)<text:line-break/><text:line-break/></text:span><text:span text:style-name="T9">print</text:span><text:span text:style-name="T3">(</text:span><text:span text:style-name="T5">"Test accuracy:"</text:span><text:span text:style-name="T3">, test_acc)<text:line-break/></text:span><text:span text:style-name="T9">print</text:span><text:span text:style-name="T3">(</text:span><text:span text:style-name="T5">"</text:span><text:span text:style-name="T4">\n</text:span><text:span text:style-name="T5">Test loss:"</text:span><text:span text:style-name="T3">, test_loss)</text:span></text:p>
      <text:p text:style-name="P14" loext:marker-style-name="T3"/>
      <text:p text:style-name="P64"/>
      <text:p text:style-name="P64">Результать:</text:p>
      <text:p text:style-name="P64"/>
      <text:p text:style-name="P64">---</text:p>
      <text:p text:style-name="P64">/home/mike/PyProjs/mlLabs/.venv/bin/python /home/mike/PyProjs/mlLabs/lab5/3-cifar/3-cifar_test.py </text:p>
      <text:p text:style-name="P64">313/313 ━━━━━━━━━━━━━━━━━━━━ 4s 13ms/step - accuracy: 0.8035 - loss: 0.5827</text:p>
      <text:p text:style-name="P64"/>
      <text:p text:style-name="P64">Test accuracy: 0.8034999966621399</text:p>
      <text:p text:style-name="P64">Test loss: 0.5826779007911682</text:p>
      <text:p text:style-name="P64"/>
      <text:p text:style-name="P64">Process finished with exit code 0</text:p>
      <text:p text:style-name="P64">---</text:p>
      <text:p text:style-name="P64"/>
      <text:p text:style-name="P65">81% на навчанні і 80% на тесті. Нехай тестування і дуже просте, схоже перенавчання вдалося уникнути.</text:p>
      <text:p text:style-name="P65"/>
      <text:p text:style-name="P65"/>
      <text:p text:style-name="P65"/>
      <text:p text:style-name="P65"/>
      <text:p text:style-name="P65"><text:soft-page-break/></text:p>
      <text:p text:style-name="P66">Тепер протестуємо модель, взявши картинки з інтернету:</text:p>
      <text:p text:style-name="P66"/>
      <text:p text:style-name="P66"><draw:frame draw:style-name="fr1" draw:name="Image13" text:anchor-type="as-char" svg:width="5.472cm" svg:height="4.105cm" draw:z-index="12"><draw:image xlink:href="Pictures/10000000000003640000028B06C8C82A.png" xlink:type="simple" xlink:show="embed" xlink:actuate="onLoad" draw:mime-type="image/png"/></draw:frame><text:s text:c="3"/><text:span text:style-name="T32"><draw:frame draw:style-name="fr4" draw:name="Image14" text:anchor-type="as-char" svg:y="-4.089cm" svg:width="6.133cm" svg:height="4.089cm" draw:z-index="13"><draw:image xlink:href="Pictures/10000000000001DA0000013C0FE38469.png" xlink:type="simple" xlink:show="embed" xlink:actuate="onLoad" draw:mime-type="image/png"/></draw:frame></text:span><text:span text:style-name="T32"><text:s text:c="2"/></text:span><text:span text:style-name="T32"><draw:frame draw:style-name="fr2" draw:name="Image15" text:anchor-type="as-char" svg:width="5.505cm" svg:height="3.101cm" draw:z-index="14"><draw:image xlink:href="Pictures/10000000000001DA0000010BA4EEB0C2.png" xlink:type="simple" xlink:show="embed" xlink:actuate="onLoad" draw:mime-type="image/png"/></draw:frame></text:span></text:p>
      <text:p text:style-name="P66"/>
      <text:p text:style-name="P67">Код для тесту:</text:p>
      <text:p text:style-name="P67"/>
      <text:p text:style-name="P13" loext:marker-style-name="T3"><text:span text:style-name="T4">import </text:span><text:span text:style-name="T3">os<text:line-break/>os.environ[</text:span><text:span text:style-name="T5">"CUDA_VISIBLE_DEVICES"</text:span><text:span text:style-name="T3">] = </text:span><text:span text:style-name="T5">"-1"<text:line-break/></text:span><text:span text:style-name="T3">os.environ[</text:span><text:span text:style-name="T5">"KERAS_BACKEND"</text:span><text:span text:style-name="T3">] = </text:span><text:span text:style-name="T5">"torch"<text:line-break/><text:line-break/></text:span><text:span text:style-name="T4">from </text:span><text:span text:style-name="T3">keras.models </text:span><text:span text:style-name="T4">import </text:span><text:span text:style-name="T3">load_model<text:line-break/></text:span><text:span text:style-name="T4">import </text:span><text:span text:style-name="T3">cv2<text:line-break/></text:span><text:span text:style-name="T4">import </text:span><text:span text:style-name="T3">numpy </text:span><text:span text:style-name="T4">as </text:span><text:span text:style-name="T3">np<text:line-break/></text:span><text:span text:style-name="T4">import </text:span><text:span text:style-name="T3">matplotlib.pyplot </text:span><text:span text:style-name="T4">as </text:span><text:span text:style-name="T3">plt<text:line-break/><text:line-break/>cifar_model = load_model(</text:span><text:span text:style-name="T5">"model/cifar_model.keras"</text:span><text:span text:style-name="T3">)<text:line-break/><text:line-break/>file_names = [</text:span><text:span text:style-name="T5">'frog.png'</text:span><text:span text:style-name="T3">, </text:span><text:span text:style-name="T5">'plane.png'</text:span><text:span text:style-name="T3">, </text:span><text:span text:style-name="T5">'car.png'</text:span><text:span text:style-name="T3">]<text:line-break/>items = [</text:span><text:span text:style-name="T5">'frog'</text:span><text:span text:style-name="T3">, </text:span><text:span text:style-name="T5">'airplane'</text:span><text:span text:style-name="T3">, </text:span><text:span text:style-name="T5">'automobile'</text:span><text:span text:style-name="T3">]<text:line-break/>labels = [</text:span><text:span text:style-name="T5">'airplane'</text:span><text:span text:style-name="T3">, </text:span><text:span text:style-name="T5">'automobile'</text:span><text:span text:style-name="T3">, </text:span><text:span text:style-name="T5">'bird'</text:span><text:span text:style-name="T3">, </text:span><text:span text:style-name="T5">'cat'</text:span><text:span text:style-name="T3">, </text:span><text:span text:style-name="T5">'deer'</text:span><text:span text:style-name="T3">,<text:line-break/> </text:span><text:span text:style-name="T5">'dog'</text:span><text:span text:style-name="T3">, </text:span><text:span text:style-name="T5">'frog'</text:span><text:span text:style-name="T3">, </text:span><text:span text:style-name="T5">'horse'</text:span><text:span text:style-name="T3">, </text:span><text:span text:style-name="T5">'ship'</text:span><text:span text:style-name="T3">, </text:span><text:span text:style-name="T5">'truck'</text:span><text:span text:style-name="T3">]<text:line-break/>processed = []<text:line-break/><text:line-break/></text:span><text:span text:style-name="T4">for </text:span><text:span text:style-name="T3">name </text:span><text:span text:style-name="T4">in </text:span><text:span text:style-name="T3">file_names:<text:line-break/> full_path = os.path.join(</text:span><text:span text:style-name="T5">'data/handw/'</text:span><text:span text:style-name="T3">, name)<text:line-break/><text:line-break/> tst = cv2.imread(full_path)<text:line-break/> tst = cv2.cvtColor(tst, cv2.COLOR_BGR2RGB)<text:line-break/> tst = cv2.resize(tst, (</text:span><text:span text:style-name="T8">32</text:span><text:span text:style-name="T3">, </text:span><text:span text:style-name="T8">32</text:span><text:span text:style-name="T3">))<text:line-break/> tst = tst.astype(</text:span><text:span text:style-name="T5">'float32'</text:span><text:span text:style-name="T3">) / </text:span><text:span text:style-name="T8">255<text:line-break/> </text:span><text:span text:style-name="T3">tst = np.expand_dims(tst, </text:span><text:span text:style-name="T7">axis</text:span><text:span text:style-name="T3">=</text:span><text:span text:style-name="T8">0</text:span><text:span text:style-name="T3">)<text:line-break/><text:line-break/> processed.append(tst)<text:line-break/><text:line-break/></text:span><text:span text:style-name="T4">for </text:span><text:span text:style-name="T3">tst, item </text:span><text:span text:style-name="T4">in </text:span><text:span text:style-name="T9">zip</text:span><text:span text:style-name="T3">(processed, items):<text:line-break/> predictions = cifar_model.predict(tst, </text:span><text:span text:style-name="T7">verbose</text:span><text:span text:style-name="T3">=</text:span><text:span text:style-name="T8">0</text:span><text:span text:style-name="T3">)<text:line-break/> prediction = np.argmax(predictions)<text:line-break/> confidence = np.max(predictions) * </text:span><text:span text:style-name="T8">100<text:line-break/></text:span><text:soft-page-break/><text:span text:style-name="T8"><text:line-break/> <text:s text:c="3"/></text:span><text:span text:style-name="T9">print</text:span><text:span text:style-name="T3">(</text:span><text:span text:style-name="T5">f"Predicted: </text:span><text:span text:style-name="T4">{</text:span><text:span text:style-name="T3">labels[prediction]</text:span><text:span text:style-name="T4">}</text:span><text:span text:style-name="T5"> | Real: </text:span><text:span text:style-name="T4">{</text:span><text:span text:style-name="T3">item</text:span><text:span text:style-name="T4">}</text:span><text:span text:style-name="T5"> | Confidence: </text:span><text:span text:style-name="T4">{</text:span><text:span text:style-name="T3">confidence</text:span><text:span text:style-name="T4">:</text:span><text:span text:style-name="T5">.2f</text:span><text:span text:style-name="T4">}</text:span><text:span text:style-name="T5">%"</text:span><text:span text:style-name="T3">)<text:line-break/><text:line-break/></text:span><text:span text:style-name="T6">#check data<text:line-break/></text:span><text:span text:style-name="T3">plt.figure(</text:span><text:span text:style-name="T7">figsize</text:span><text:span text:style-name="T3">=(</text:span><text:span text:style-name="T8">10</text:span><text:span text:style-name="T3">, </text:span><text:span text:style-name="T8">5</text:span><text:span text:style-name="T3">))<text:line-break/></text:span><text:span text:style-name="T4">for </text:span><text:span text:style-name="T3">i </text:span><text:span text:style-name="T4">in </text:span><text:span text:style-name="T9">range</text:span><text:span text:style-name="T3">(</text:span><text:span text:style-name="T8">3</text:span><text:span text:style-name="T3">):<text:line-break/> <text:s text:c="3"/>plt.subplot(</text:span><text:span text:style-name="T8">1</text:span><text:span text:style-name="T3">, </text:span><text:span text:style-name="T8">3</text:span><text:span text:style-name="T3">, i+</text:span><text:span text:style-name="T8">1</text:span><text:span text:style-name="T3">)<text:line-break/> <text:s text:c="3"/>plt.xticks([])<text:line-break/> <text:s text:c="3"/>plt.yticks([])<text:line-break/> <text:s text:c="3"/>plt.grid(</text:span><text:span text:style-name="T4">False</text:span><text:span text:style-name="T3">)<text:line-break/><text:line-break/> <text:s text:c="3"/>display_img = processed[i][</text:span><text:span text:style-name="T8">0</text:span><text:span text:style-name="T3">]<text:line-break/><text:line-break/> <text:s text:c="3"/>plt.imshow(display_img, </text:span><text:span text:style-name="T7">cmap</text:span><text:span text:style-name="T3">=</text:span><text:span text:style-name="T5">'gray'</text:span><text:span text:style-name="T3">)<text:line-break/> <text:s text:c="3"/>plt.xlabel(</text:span><text:span text:style-name="T5">f"Real: </text:span><text:span text:style-name="T4">{</text:span><text:span text:style-name="T3">labels[i]</text:span><text:span text:style-name="T4">}</text:span><text:span text:style-name="T5">"</text:span><text:span text:style-name="T3">)<text:line-break/>plt.tight_layout()<text:line-break/>plt.savefig(</text:span><text:span text:style-name="T5">'./plots/formatted_hndw.png'</text:span><text:span text:style-name="T3">)<text:line-break/>plt.close()</text:span></text:p>
      <text:p text:style-name="P14" loext:marker-style-name="T3"/>
      <text:p text:style-name="P14" loext:marker-style-name="T3"/>
      <text:p text:style-name="P67"/>
      <text:p text:style-name="P68">Логіка коду в порівнянні з минулими минулим підпунктом незмінна, просто підігнав деякі місця під інший формат.</text:p>
      <text:p text:style-name="P68"/>
      <text:p text:style-name="P68">Результат:</text:p>
      <text:p text:style-name="P68"/>
      <text:p text:style-name="P68">---</text:p>
      <text:p text:style-name="P68">/home/mike/PyProjs/mlLabs/.venv/bin/python /home/mike/PyProjs/mlLabs/lab5/3-cifar/4-mnist_test2.py </text:p>
      <text:p text:style-name="P68">Predicted: frog | Real: frog | Confidence: 99.71%</text:p>
      <text:p text:style-name="P68">Predicted: airplane | Real: <text:span text:style-name="T33">air</text:span>plane | Confidence: 93.15%</text:p>
      <text:p text:style-name="P68">Predicted: truck | Real: <text:span text:style-name="T33">automobile</text:span> | Confidence: 61.47%</text:p>
      <text:p text:style-name="P68"/>
      <text:p text:style-name="P68">Process finished with exit code 0</text:p>
      <text:p text:style-name="P68">---</text:p>
      <text:p text:style-name="P53"/>
      <text:p text:style-name="P69">Результат хороший. Модель сплутала машину з truck, і на це є причина. Глянемо на форматовані зображення:</text:p>
      <text:p text:style-name="P69"/>
      <text:p text:style-name="P69"><draw:frame draw:style-name="fr2" draw:name="Image16" text:anchor-type="as-char" svg:width="9.162cm" svg:height="4.583cm" draw:z-index="15"><draw:image xlink:href="Pictures/10000000000003E8000001F4DA16E8AA.png" xlink:type="simple" xlink:show="embed" xlink:actuate="onLoad" draw:mime-type="image/png"/></draw:frame></text:p>
      <text:p text:style-name="P69"/>
      <text:p text:style-name="P69">Машину достатньо легко переплутати з вантажівкою, таке враження неначе на фоні видно великий білий причіп.</text:p>
      <text:p text:style-name="P69"/>
      <text:p text:style-name="P69"><text:soft-page-break/></text:p>
      <text:p text:style-name="P70">Висновки:</text:p>
      <text:p text:style-name="P71">В ході виконання роботи я навчився створювати й налагоджувати нейронні мережі різної архітектури. На прості задачі достатньо використовувати нейронки з простою архітектурою, без оверінжинірингу. На складніших задачах такі нейронки можуть бути заслабкими. Найскладнішою частиною була побудова моделі роботи з кольоровими зображеннями. Також роботу цих моделей було протестовано на власноруч створених або завантажених з інтернету зображеннях. Найбільшою проблемую для моделей була значна втрата початкової якості зображення, а разом з тим – потенційно важливих даних. </text:p>
      <text:p text:style-name="P7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01T07:30:40.330276875</dc:date>
    <meta:editing-duration>PT12H34M18S</meta:editing-duration>
    <meta:editing-cycles>357</meta:editing-cycles>
    <meta:generator>LibreOffice/25.8.6.2$Linux_X86_64 LibreOffice_project/580$Build-2</meta:generator>
    <meta:print-date>2026-04-17T10:50:25.581233006</meta:print-date>
    <meta:printed-by>PDF files</meta:printed-by>
    <meta:document-statistic meta:table-count="0" meta:image-count="16" meta:object-count="0" meta:page-count="20" meta:paragraph-count="298" meta:word-count="2517" meta:character-count="23056" meta:non-whitespace-character-count="20245"/>
  </office:meta>
</office:document-meta>
</file>