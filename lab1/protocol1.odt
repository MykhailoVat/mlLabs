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4A0D9426.png" manifest:media-type="image/png"/>
  <manifest:file-entry manifest:full-path="Pictures/1000000100000280000001E0716D0DBB.png" manifest:media-type="image/png"/>
  <manifest:file-entry manifest:full-path="Pictures/1000000100000280000001E00268277C.png" manifest:media-type="image/png"/>
  <manifest:file-entry manifest:full-path="Pictures/1000000100000280000001E047B9D252.png" manifest:media-type="image/png"/>
  <manifest:file-entry manifest:full-path="Pictures/1000000100000280000001E0B0B4FE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технічний університет України  </text:p>
      <text:p text:style-name="P1">«Київський політехнічний інститут ім. Ігоря Сікорського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ЛАБОРАТОРНА РОБОТА № 1 </text:p>
      <text:p text:style-name="P1">з дисципліни «Прикладні задачі машинного навчання» </text:p>
      <text:p text:style-name="P1">на тему «Введення в data science»</text:p>
      <text:p text:style-name="P1"/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2"><text:s/></text:p>
      <text:p text:style-name="P2">Виконав: <text:s text:c="75"/></text:p>
      <text:p text:style-name="P2">Студент 2 курсу ФІОТ-у <text:s text:c="49"/></text:p>
      <text:p text:style-name="P2">групи ІМ-42 </text:p>
      <text:p text:style-name="P2">Ватолкін Михайло Андрійович</text:p>
      <text:p text:style-name="P2">Номер у списку групи -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<text:s text:c="2"/>2026</text:p>
      <text:p text:style-name="P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Постановка завдання</text:p>
      <text:p text:style-name="Preformatted_20_Text"/>
      <text:p text:style-name="Preformatted_20_Text">1. На сайті http://www.ukrstat.gov.ua/ обрати дані які для Вас є</text:p>
      <text:p text:style-name="Preformatted_20_Text">цікавими. Або можна використати будь-який інший ресурс з</text:p>
      <text:p text:style-name="Preformatted_20_Text">відкритими даними, та завантажте дані.</text:p>
      <text:p text:style-name="Preformatted_20_Text"/>
      <text:p text:style-name="Preformatted_20_Text">2. Виконати первинну обробку даних. Якщо завантажені дані</text:p>
      <text:p text:style-name="Preformatted_20_Text">не потребують обробки – виконати первинну обробку на самостійно</text:p>
      <text:p text:style-name="Preformatted_20_Text">згенерованих тестових даних.</text:p>
      <text:p text:style-name="Preformatted_20_Text"/>
      <text:p text:style-name="Preformatted_20_Text">3. Знайти математичне сподівання, медіану, моду, дисперсію,</text:p>
      <text:p text:style-name="Preformatted_20_Text">середньоквадратичне відхилення (поясніть їх зміст).</text:p>
      <text:p text:style-name="Preformatted_20_Text"/>
      <text:p text:style-name="Preformatted_20_Text">4. Створити гістограми для всіх можливих параметрів даних.</text:p>
      <text:p text:style-name="Preformatted_20_Text"/>
      <text:p text:style-name="Preformatted_20_Text">5. Для цих даних проробити всі дії з пункту колекції Series і</text:p>
      <text:p text:style-name="Preformatted_20_Text">DataFrame бібліотеки pandas.</text:p>
      <text:p text:style-name="Preformatted_20_Text"/>
      <text:p text:style-name="Preformatted_20_Text">6. Прочитати набір даних катастрофи «Титаніка».</text:p>
      <text:p text:style-name="Preformatted_20_Text"/>
      <text:p text:style-name="Preformatted_20_Text">7. Завантажити набір даних катастрофи «Титаніка» за URL-</text:p>
      <text:p text:style-name="Preformatted_20_Text">адресою.</text:p>
      <text:p text:style-name="Preformatted_20_Text"/>
      <text:p text:style-name="Preformatted_20_Text">8. Переглянути рядки набору даних катастрофи «Титаніка»</text:p>
      <text:p text:style-name="Preformatted_20_Text"/>
      <text:p text:style-name="Preformatted_20_Text">9. Налаштувати назви стовпців</text:p>
      <text:p text:style-name="Preformatted_20_Text">Замініть 'Unnamed: 0' на 'name' і скоротіть 'passengerClass' до 'class'</text:p>
      <text:p text:style-name="Preformatted_20_Text"/>
      <text:p text:style-name="Preformatted_20_Text"/>
      <text:p text:style-name="Preformatted_20_Text">10. Провести простий аналіз даних: визначте наймолодшого</text:p>
      <text:p text:style-name="Preformatted_20_Text">пасажира, найстаршого, який був середній вік пасажирів та статистику по</text:p>
      <text:p text:style-name="Preformatted_20_Text">пасажирам які вижили. Відсортуйте всіх жінок з кают 1-го класу, знайдіть</text:p>
      <text:p text:style-name="Preformatted_20_Text">наймолодшу та найстаршу серед них, кількість вцілілих.</text:p>
      <text:p text:style-name="Preformatted_20_Text"/>
      <text:p text:style-name="Preformatted_20_Text">11. Побудувати гістограму віку пасажирів.</text:p>
      <text:p text:style-name="Preformatted_20_Text"/>
      <text:p text:style-name="Preformatted_20_Text">Виконання роботи</text:p>
      <text:p text:style-name="Preformatted_20_Text"/>
      <text:p text:style-name="Preformatted_20_Text">1. Знайшов статистику про заклади дошкільної освіти в Україні з 1990 по 2024.</text:p>
      <text:p text:style-name="Preformatted_20_Text"/>
      <text:p text:style-name="Preformatted_20_Text">2. Завантажений файл мав формат .xls. Дані були майже в порядку, в табличці було 2 пропуски в колонці «Охоплення дітей закладами дошкільної освіти, відсотків до кількості дітей відповідного віку» за 2023 та 2024 роки. Проаналізувавши динаміку цього показника з 2014 року, помітив, що в роки 2014 - 2022 показник або залишався без змін, або мінявся на +2%. Оскільки у 2022 році показник становив 53%, було прийнято рішення записати в пусті колонки 55% і 57% (2023 і 2024 відповідно). Далі колонки були перейменовані, а файл був конвертований в формат .csv з використанням ssconverter <text:s/>(на linux). <text:s/>В результаті отримано файл з наступним змістом:</text:p>
      <text:p text:style-name="Preformatted_20_Text"/>
      <text:p text:style-name="Preformatted_20_Text">Year,Number of institutions(thsd),Number of places(thsd),Number of persons(thsd),Coverage of children(%)</text:p>
      <text:p text:style-name="Preformatted_20_Text">1990,24.5,2277,2428,57</text:p>
      <text:p text:style-name="Preformatted_20_Text">1991,24.4,2243,2268,55</text:p>
      <text:p text:style-name="Preformatted_20_Text">1992,23.8,2216,2063,51</text:p>
      <text:p text:style-name="Preformatted_20_Text">1993,23.2,2189,1918,49</text:p>
      <text:p text:style-name="Preformatted_20_Text">1994,22.3,2101,1736,47</text:p>
      <text:p text:style-name="Preformatted_20_Text">1995,21.4,2014,1536,44</text:p>
      <text:p text:style-name="Preformatted_20_Text">1996,20.2,1856,1342,41</text:p>
      <text:p text:style-name="Preformatted_20_Text">1997,18.4,1770,1172,38</text:p>
      <text:p text:style-name="Preformatted_20_Text">1998,17.6,1638,1103,38</text:p>
      <text:p text:style-name="Preformatted_20_Text">1999,17.2,1216,1055,39</text:p>
      <text:p text:style-name="Preformatted_20_Text">2000,16.3,1117,983,40</text:p>
      <text:p text:style-name="Preformatted_20_Text"><text:soft-page-break/>2001,15.7,1077,968,41</text:p>
      <text:p text:style-name="Preformatted_20_Text">2002,15.3,1060,973,48</text:p>
      <text:p text:style-name="Preformatted_20_Text">2003,15,1053,977,49</text:p>
      <text:p text:style-name="Preformatted_20_Text">2004,14.9,1040,996,50</text:p>
      <text:p text:style-name="Preformatted_20_Text">2005,15.1,1056,1032,51</text:p>
      <text:p text:style-name="Preformatted_20_Text">2006,15.1,1063,1081,53</text:p>
      <text:p text:style-name="Preformatted_20_Text">2007,15.3,1084,1137,54</text:p>
      <text:p text:style-name="Preformatted_20_Text">2008,15.4,1110,1195,54</text:p>
      <text:p text:style-name="Preformatted_20_Text">2009,15.5,1121,1214,53</text:p>
      <text:p text:style-name="Preformatted_20_Text">2010,15.6,1136,1273,53</text:p>
      <text:p text:style-name="Preformatted_20_Text">2011,16.1,1171,1354,55</text:p>
      <text:p text:style-name="Preformatted_20_Text">2012,16.4,1204,1428,57</text:p>
      <text:p text:style-name="Preformatted_20_Text">2013,16.7,1236,1471,61</text:p>
      <text:p text:style-name="Preformatted_20_Text">2014,15,1077,1295,55</text:p>
      <text:p text:style-name="Preformatted_20_Text">2015,14.8,1105,1291,55</text:p>
      <text:p text:style-name="Preformatted_20_Text">2016,14.9,1125,1300,57</text:p>
      <text:p text:style-name="Preformatted_20_Text">2017,14.9,1141,1304,59</text:p>
      <text:p text:style-name="Preformatted_20_Text">2018,14.9,1156,1278,61</text:p>
      <text:p text:style-name="Preformatted_20_Text">2019,14.8,1155,1230,63</text:p>
      <text:p text:style-name="Preformatted_20_Text">2020,15.3,1153,1151,63</text:p>
      <text:p text:style-name="Preformatted_20_Text">2021,15,1138,1111,65</text:p>
      <text:p text:style-name="Preformatted_20_Text">2022,13.9,1047,934,53</text:p>
      <text:p text:style-name="Preformatted_20_Text">2023,13.5,1010,862,55</text:p>
      <text:p text:style-name="Preformatted_20_Text">2024,12.9,961,781,57</text:p>
      <text:p text:style-name="Preformatted_20_Text"/>
      <text:p text:style-name="Preformatted_20_Text">3. Використовуючи мову програмування Python було знайдено математичне сподівання, медіану, моду, дисперсію та середньоквадратичне відхилення даних кожної з колонок, для чого використався наступний код:</text:p>
      <text:p text:style-name="Preformatted_20_Text"/>
      <text:p text:style-name="Preformatted_20_Text">see_params.py:</text:p>
      <text:p text:style-name="Preformatted_20_Text">from lab1.tools.get_data_column import get_data_column</text:p>
      <text:p text:style-name="Preformatted_20_Text">from lab1.tools.custom_describe import <text:s/>c_describe</text:p>
      <text:p text:style-name="Preformatted_20_Text"/>
      <text:p text:style-name="Preformatted_20_Text">c_describe("Number of institutes(thsd)", get_data_column(1))</text:p>
      <text:p text:style-name="Preformatted_20_Text">c_describe("Number of places(thsd)", get_data_column(2))</text:p>
      <text:p text:style-name="Preformatted_20_Text">c_describe("Number of persons(thsd)", get_data_column(3))</text:p>
      <text:p text:style-name="Preformatted_20_Text">c_describe("Coverage of children(%)", get_data_column(4))</text:p>
      <text:p text:style-name="Preformatted_20_Text"/>
      <text:p text:style-name="Preformatted_20_Text"/>
      <text:p text:style-name="Preformatted_20_Text"/>
      <text:p text:style-name="Preformatted_20_Text">get_data_column.py:</text:p>
      <text:p text:style-name="Preformatted_20_Text">import csv</text:p>
      <text:p text:style-name="Preformatted_20_Text"/>
      <text:p text:style-name="Preformatted_20_Text">def get_data_column(i_column):</text:p>
      <text:p text:style-name="Preformatted_20_Text"><text:s text:c="5"/>with open("../data_zdo/zdo_data.csv", 'r', newline='') as data:</text:p>
      <text:p text:style-name="Preformatted_20_Text"><text:s text:c="9"/>reader = csv.reader(data)</text:p>
      <text:p text:style-name="Preformatted_20_Text"><text:s text:c="9"/>next(reader)</text:p>
      <text:p text:style-name="Preformatted_20_Text"/>
      <text:p text:style-name="Preformatted_20_Text"><text:s text:c="9"/>values = []</text:p>
      <text:p text:style-name="Preformatted_20_Text"><text:s text:c="9"/>for row in reader:</text:p>
      <text:p text:style-name="Preformatted_20_Text"><text:s text:c="13"/>value = float(row[i_column])</text:p>
      <text:p text:style-name="Preformatted_20_Text"><text:s text:c="13"/>values.append(value)</text:p>
      <text:p text:style-name="Preformatted_20_Text"/>
      <text:p text:style-name="Preformatted_20_Text"><text:s text:c="9"/>return values</text:p>
      <text:p text:style-name="Preformatted_20_Text"/>
      <text:p text:style-name="Preformatted_20_Text">custom_describe.py:</text:p>
      <text:p text:style-name="Preformatted_20_Text">import statistics as st</text:p>
      <text:p text:style-name="Preformatted_20_Text"/>
      <text:p text:style-name="Preformatted_20_Text">def c_describe(dataset_name, data):</text:p>
      <text:p text:style-name="Preformatted_20_Text"><text:s text:c="4"/>mean = st.mean(data)</text:p>
      <text:p text:style-name="Preformatted_20_Text"><text:s text:c="4"/>median = st.median(data)</text:p>
      <text:p text:style-name="Preformatted_20_Text"><text:s text:c="4"/>mode = st.multimode(data)</text:p>
      <text:p text:style-name="Preformatted_20_Text"><text:s text:c="4"/>variance = st.pvariance(data)</text:p>
      <text:p text:style-name="Preformatted_20_Text"><text:s text:c="4"/>std = st.pstdev(data)</text:p>
      <text:p text:style-name="Preformatted_20_Text"><text:soft-page-break/><text:s text:c="4"/>print(f"{dataset_name}:")</text:p>
      <text:p text:style-name="Preformatted_20_Text"><text:s text:c="4"/>print(f"mean: {mean}")</text:p>
      <text:p text:style-name="Preformatted_20_Text"><text:s text:c="4"/>print(f"median: {median}")</text:p>
      <text:p text:style-name="Preformatted_20_Text"><text:s text:c="4"/>print(f"mode: {mode}")</text:p>
      <text:p text:style-name="Preformatted_20_Text"><text:s text:c="4"/>print(f"variance: {variance}")</text:p>
      <text:p text:style-name="Preformatted_20_Text"><text:s text:c="4"/>print(f"std: {std}\n")</text:p>
      <text:p text:style-name="Preformatted_20_Text"/>
      <text:p text:style-name="Preformatted_20_Text">Результат виконання файлу see_params.py:</text:p>
      <text:p text:style-name="Preformatted_20_Text">Number of institutes(thsd):</text:p>
      <text:p text:style-name="Preformatted_20_Text">mean: 16.894285714285715</text:p>
      <text:p text:style-name="Preformatted_20_Text">median: 15.4</text:p>
      <text:p text:style-name="Preformatted_20_Text">mode: [14.9]</text:p>
      <text:p text:style-name="Preformatted_20_Text">variance: 10.269681632653059</text:p>
      <text:p text:style-name="Preformatted_20_Text">std: 3.2046343992182726</text:p>
      <text:p text:style-name="Preformatted_20_Text"/>
      <text:p text:style-name="Preformatted_20_Text">Number of places(thsd):</text:p>
      <text:p text:style-name="Preformatted_20_Text">mean: 1346.1714285714286</text:p>
      <text:p text:style-name="Preformatted_20_Text">median: 1138.0</text:p>
      <text:p text:style-name="Preformatted_20_Text">mode: [1077.0]</text:p>
      <text:p text:style-name="Preformatted_20_Text">variance: 178695.91346938774</text:p>
      <text:p text:style-name="Preformatted_20_Text">std: 422.72439422085375</text:p>
      <text:p text:style-name="Preformatted_20_Text"/>
      <text:p text:style-name="Preformatted_20_Text">Number of persons(thsd):</text:p>
      <text:p text:style-name="Preformatted_20_Text">mean: 1292.5714285714287</text:p>
      <text:p text:style-name="Preformatted_20_Text">median: 1214.0</text:p>
      <text:p text:style-name="Preformatted_20_Text">mode: [2428.0, 2268.0, 2063.0, 1918.0, 1736.0, 1536.0, 1342.0, 1172.0, 1103.0, 1055.0, 983.0, 968.0, 973.0, 977.0, 996.0, 1032.0, 1081.0, 1137.0, 1195.0, 1214.0, 1273.0, 1354.0, 1428.0, 1471.0, 1295.0, 1291.0, 1300.0, 1304.0, 1278.0, 1230.0, 1151.0, 1111.0, 934.0, 862.0, 781.0]</text:p>
      <text:p text:style-name="Preformatted_20_Text">variance: 140610.4163265306</text:p>
      <text:p text:style-name="Preformatted_20_Text">std: 374.98055459787594</text:p>
      <text:p text:style-name="Preformatted_20_Text"/>
      <text:p text:style-name="Preformatted_20_Text">Coverage of children(%):</text:p>
      <text:p text:style-name="Preformatted_20_Text">mean: 52.02857142857143</text:p>
      <text:p text:style-name="Preformatted_20_Text">median: 53.0</text:p>
      <text:p text:style-name="Preformatted_20_Text">mode: [55.0]</text:p>
      <text:p text:style-name="Preformatted_20_Text">variance: 52.99918367346939</text:p>
      <text:p text:style-name="Preformatted_20_Text">std: 7.280053823528325</text:p>
      <text:p text:style-name="Preformatted_20_Text"/>
      <text:p text:style-name="Preformatted_20_Text">4. Створено гістограми для всіх колонок, крім років:</text:p>
      <text:p text:style-name="Preformatted_20_Text"/>
      <text:p text:style-name="Preformatted_20_Text">create_plots.py:</text:p>
      <text:p text:style-name="Preformatted_20_Text">import matplotlib.pyplot as plt</text:p>
      <text:p text:style-name="Preformatted_20_Text">from lab1.tools.get_data_column import get_data_column</text:p>
      <text:p text:style-name="Preformatted_20_Text"/>
      <text:p text:style-name="Preformatted_20_Text">#number of rows</text:p>
      <text:p text:style-name="Preformatted_20_Text">BINS = 20</text:p>
      <text:p text:style-name="Preformatted_20_Text"/>
      <text:p text:style-name="Preformatted_20_Text">hists = [</text:p>
      <text:p text:style-name="Preformatted_20_Text"><text:s text:c="4"/>(1,"institutes","institutes(thsd)"),</text:p>
      <text:p text:style-name="Preformatted_20_Text"><text:s text:c="4"/>(2,"places","places(thsd)"),</text:p>
      <text:p text:style-name="Preformatted_20_Text"><text:s text:c="4"/>(3,"persons","persons(thsd)"),</text:p>
      <text:p text:style-name="Preformatted_20_Text"><text:s text:c="4"/>(4,"coverage","coverage(%)")</text:p>
      <text:p text:style-name="Preformatted_20_Text">]</text:p>
      <text:p text:style-name="Preformatted_20_Text"/>
      <text:p text:style-name="Preformatted_20_Text">for col,name,xlb in hists:</text:p>
      <text:p text:style-name="Preformatted_20_Text"><text:s text:c="4"/>plt.hist(get_data_column(col), bins=BINS)</text:p>
      <text:p text:style-name="Preformatted_20_Text"><text:s text:c="4"/>plt.grid(True)</text:p>
      <text:p text:style-name="Preformatted_20_Text"><text:s text:c="4"/>plt.xlabel(xlb)</text:p>
      <text:p text:style-name="Preformatted_20_Text"><text:s text:c="4"/>plt.ylabel("Frequency")</text:p>
      <text:p text:style-name="Preformatted_20_Text"><text:s text:c="4"/>plt.savefig(f"histograms/{name}.png")</text:p>
      <text:p text:style-name="Preformatted_20_Text"><text:s text:c="4"/>plt.clf()</text:p>
      <text:p text:style-name="Preformatted_20_Text"/>
      <text:p text:style-name="Preformatted_20_Text"/>
      <text:p text:style-name="Preformatted_20_Text"><text:soft-page-break/>Гістограми:</text:p>
      <text:p text:style-name="Preformatted_20_Text"/>
      <text:p text:style-name="Preformatted_20_Text"><draw:frame draw:style-name="fr1" draw:name="Image1" text:anchor-type="as-char" svg:width="7.303cm" svg:height="5.477cm" draw:z-index="0"><draw:image xlink:href="Pictures/1000000100000280000001E0B0B4FE72.png" xlink:type="simple" xlink:show="embed" xlink:actuate="onLoad" draw:mime-type="image/png"/></draw:frame></text:p>
      <text:p text:style-name="Preformatted_20_Text"><draw:frame draw:style-name="fr1" draw:name="Image2" text:anchor-type="as-char" svg:width="7.317cm" svg:height="5.487cm" draw:z-index="1"><draw:image xlink:href="Pictures/1000000100000280000001E047B9D252.png" xlink:type="simple" xlink:show="embed" xlink:actuate="onLoad" draw:mime-type="image/png"/></draw:frame></text:p>
      <text:p text:style-name="Preformatted_20_Text"><draw:frame draw:style-name="fr1" draw:name="Image3" text:anchor-type="as-char" svg:width="7.288cm" svg:height="5.466cm" draw:z-index="2"><draw:image xlink:href="Pictures/1000000100000280000001E00268277C.png" xlink:type="simple" xlink:show="embed" xlink:actuate="onLoad" draw:mime-type="image/png"/></draw:frame></text:p>
      <text:p text:style-name="Preformatted_20_Text"><draw:frame draw:style-name="fr1" draw:name="Image4" text:anchor-type="as-char" svg:width="7.311cm" svg:height="5.484cm" draw:z-index="3"><draw:image xlink:href="Pictures/1000000100000280000001E0716D0DBB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5. Було пророблено дії над Series та Dataframe, що зазначені в теоретичних відомостях:</text:p>
      <text:p text:style-name="Preformatted_20_Text"/>
      <text:p text:style-name="Preformatted_20_Text">series.py:</text:p>
      <text:p text:style-name="Preformatted_20_Text">import pandas as pd</text:p>
      <text:p text:style-name="Preformatted_20_Text">from lab1.tools.get_data_column import get_data_column</text:p>
      <text:p text:style-name="Preformatted_20_Text"/>
      <text:p text:style-name="Preformatted_20_Text">#робота з наявними даними:</text:p>
      <text:p text:style-name="Preformatted_20_Text"/>
      <text:p text:style-name="Preformatted_20_Text">data_col = get_data_column(4)</text:p>
      <text:p text:style-name="Preformatted_20_Text">data_col_str = list(map(lambda x: str(x), data_col))</text:p>
      <text:p text:style-name="Preformatted_20_Text"/>
      <text:p text:style-name="Preformatted_20_Text"># Створення Series з індексами за замовчуванням + Виведення колекції Series</text:p>
      <text:p text:style-name="Preformatted_20_Text">coverage = pd.Series(data_col)</text:p>
      <text:p text:style-name="Preformatted_20_Text">print(coverage, "\n")</text:p>
      <text:p text:style-name="Preformatted_20_Text"/>
      <text:p text:style-name="Preformatted_20_Text"># Звернення до елементів Series</text:p>
      <text:p text:style-name="Preformatted_20_Text">print("######"*20)</text:p>
      <text:p text:style-name="Preformatted_20_Text">print(coverage[1], "\n")</text:p>
      <text:p text:style-name="Preformatted_20_Text"/>
      <text:p text:style-name="Preformatted_20_Text"># Обчислення описових статистик для Series</text:p>
      <text:p text:style-name="Preformatted_20_Text">print("######"*20)</text:p>
      <text:p text:style-name="Preformatted_20_Text">print(coverage.count())</text:p>
      <text:p text:style-name="Preformatted_20_Text">print(coverage.mean())</text:p>
      <text:p text:style-name="Preformatted_20_Text">print(coverage.min())</text:p>
      <text:p text:style-name="Preformatted_20_Text">print(coverage.max())</text:p>
      <text:p text:style-name="Preformatted_20_Text">print(coverage.std())</text:p>
      <text:p text:style-name="Preformatted_20_Text">print(coverage.describe(), "\n")</text:p>
      <text:p text:style-name="Preformatted_20_Text"/>
      <text:p text:style-name="Preformatted_20_Text"># Створення колекції Series з нестандартними індексами</text:p>
      <text:p text:style-name="Preformatted_20_Text">print("######"*20)</text:p>
      <text:p text:style-name="Preformatted_20_Text">coverage_unusual_i = pd.Series(data_col, index=range(1990, 2025))</text:p>
      <text:p text:style-name="Preformatted_20_Text">print(coverage_unusual_i, "\n")</text:p>
      <text:p text:style-name="Preformatted_20_Text"/>
      <text:p text:style-name="Preformatted_20_Text"># Звернення до елементів Series з використанням нестандартних індексів</text:p>
      <text:p text:style-name="Preformatted_20_Text">print("######"*20)</text:p>
      <text:p text:style-name="Preformatted_20_Text">print(coverage_unusual_i[1990], "\n")</text:p>
      <text:p text:style-name="Preformatted_20_Text"/>
      <text:p text:style-name="Preformatted_20_Text"># Створення колекції Series із строковими елементами</text:p>
      <text:p text:style-name="Preformatted_20_Text">print("######"*20)</text:p>
      <text:p text:style-name="Preformatted_20_Text">coverage_str = pd.Series(data_col_str)</text:p>
      <text:p text:style-name="Preformatted_20_Text">print(coverage_str, "\n")</text:p>
      <text:p text:style-name="Preformatted_20_Text">print(coverage_str.str.contains("5"),"\n")</text:p>
      <text:p text:style-name="Preformatted_20_Text"/>
      <text:p text:style-name="Preformatted_20_Text">#робота з вигаданими даними:</text:p>
      <text:p text:style-name="Preformatted_20_Text"/>
      <text:p text:style-name="Preformatted_20_Text"># Створення колекції Series з однаковими значеннями</text:p>
      <text:p text:style-name="Preformatted_20_Text">print("######"*20)</text:p>
      <text:p text:style-name="Preformatted_20_Text">print(pd.Series(5,range(5)),"\n")</text:p>
      <text:p text:style-name="Preformatted_20_Text"/>
      <text:p text:style-name="Preformatted_20_Text"># Словники як ініціалізатор</text:p>
      <text:p text:style-name="Preformatted_20_Text">print("######"*20)</text:p>
      <text:p text:style-name="Preformatted_20_Text">dictionary = {"1990":50,"1991":55,"1992":60}</text:p>
      <text:p text:style-name="Preformatted_20_Text">coverage_from_dict = pd.Series(dictionary)</text:p>
      <text:p text:style-name="Preformatted_20_Text">print(coverage_from_dict, "\n"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Результат виконання файлу:</text:p>
      <text:p text:style-name="Preformatted_20_Text"/>
      <text:p text:style-name="Preformatted_20_Text"><text:soft-page-break/>0 <text:s text:c="4"/>57.0</text:p>
      <text:p text:style-name="Preformatted_20_Text">1 <text:s text:c="4"/>55.0</text:p>
      <text:p text:style-name="Preformatted_20_Text">2 <text:s text:c="4"/>51.0</text:p>
      <text:p text:style-name="Preformatted_20_Text">3 <text:s text:c="4"/>49.0</text:p>
      <text:p text:style-name="Preformatted_20_Text">4 <text:s text:c="4"/>47.0</text:p>
      <text:p text:style-name="Preformatted_20_Text">5 <text:s text:c="4"/>44.0</text:p>
      <text:p text:style-name="Preformatted_20_Text">6 <text:s text:c="4"/>41.0</text:p>
      <text:p text:style-name="Preformatted_20_Text">7 <text:s text:c="4"/>38.0</text:p>
      <text:p text:style-name="Preformatted_20_Text">8 <text:s text:c="4"/>38.0</text:p>
      <text:p text:style-name="Preformatted_20_Text">9 <text:s text:c="4"/>39.0</text:p>
      <text:p text:style-name="Preformatted_20_Text">10 <text:s text:c="3"/>40.0</text:p>
      <text:p text:style-name="Preformatted_20_Text">11 <text:s text:c="3"/>41.0</text:p>
      <text:p text:style-name="Preformatted_20_Text">12 <text:s text:c="3"/>48.0</text:p>
      <text:p text:style-name="Preformatted_20_Text">13 <text:s text:c="3"/>49.0</text:p>
      <text:p text:style-name="Preformatted_20_Text">14 <text:s text:c="3"/>50.0</text:p>
      <text:p text:style-name="Preformatted_20_Text">15 <text:s text:c="3"/>51.0</text:p>
      <text:p text:style-name="Preformatted_20_Text">16 <text:s text:c="3"/>53.0</text:p>
      <text:p text:style-name="Preformatted_20_Text">17 <text:s text:c="3"/>54.0</text:p>
      <text:p text:style-name="Preformatted_20_Text">18 <text:s text:c="3"/>54.0</text:p>
      <text:p text:style-name="Preformatted_20_Text">19 <text:s text:c="3"/>53.0</text:p>
      <text:p text:style-name="Preformatted_20_Text">20 <text:s text:c="3"/>53.0</text:p>
      <text:p text:style-name="Preformatted_20_Text">21 <text:s text:c="3"/>55.0</text:p>
      <text:p text:style-name="Preformatted_20_Text">22 <text:s text:c="3"/>57.0</text:p>
      <text:p text:style-name="Preformatted_20_Text">23 <text:s text:c="3"/>61.0</text:p>
      <text:p text:style-name="Preformatted_20_Text">24 <text:s text:c="3"/>55.0</text:p>
      <text:p text:style-name="Preformatted_20_Text">25 <text:s text:c="3"/>55.0</text:p>
      <text:p text:style-name="Preformatted_20_Text">26 <text:s text:c="3"/>57.0</text:p>
      <text:p text:style-name="Preformatted_20_Text">27 <text:s text:c="3"/>59.0</text:p>
      <text:p text:style-name="Preformatted_20_Text">28 <text:s text:c="3"/>61.0</text:p>
      <text:p text:style-name="Preformatted_20_Text">29 <text:s text:c="3"/>63.0</text:p>
      <text:p text:style-name="Preformatted_20_Text">30 <text:s text:c="3"/>63.0</text:p>
      <text:p text:style-name="Preformatted_20_Text">31 <text:s text:c="3"/>65.0</text:p>
      <text:p text:style-name="Preformatted_20_Text">32 <text:s text:c="3"/>53.0</text:p>
      <text:p text:style-name="Preformatted_20_Text">33 <text:s text:c="3"/>55.0</text:p>
      <text:p text:style-name="Preformatted_20_Text">34 <text:s text:c="3"/>57.0</text:p>
      <text:p text:style-name="Preformatted_20_Text">dtype: float64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55.0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35</text:p>
      <text:p text:style-name="Preformatted_20_Text">52.02857142857143</text:p>
      <text:p text:style-name="Preformatted_20_Text">38.0</text:p>
      <text:p text:style-name="Preformatted_20_Text">65.0</text:p>
      <text:p text:style-name="Preformatted_20_Text">7.386337603527022</text:p>
      <text:p text:style-name="Preformatted_20_Text">count <text:s text:c="3"/>35.000000</text:p>
      <text:p text:style-name="Preformatted_20_Text">mean <text:s text:c="4"/>52.028571</text:p>
      <text:p text:style-name="Preformatted_20_Text">std <text:s text:c="6"/>7.386338</text:p>
      <text:p text:style-name="Preformatted_20_Text">min <text:s text:c="5"/>38.000000</text:p>
      <text:p text:style-name="Preformatted_20_Text">25% <text:s text:c="5"/>48.500000</text:p>
      <text:p text:style-name="Preformatted_20_Text">50% <text:s text:c="5"/>53.000000</text:p>
      <text:p text:style-name="Preformatted_20_Text">75% <text:s text:c="5"/>57.000000</text:p>
      <text:p text:style-name="Preformatted_20_Text">max <text:s text:c="5"/>65.000000</text:p>
      <text:p text:style-name="Preformatted_20_Text">dtype: float64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1990 <text:s text:c="3"/>57.0</text:p>
      <text:p text:style-name="Preformatted_20_Text">1991 <text:s text:c="3"/>55.0</text:p>
      <text:p text:style-name="Preformatted_20_Text">1992 <text:s text:c="3"/>51.0</text:p>
      <text:p text:style-name="Preformatted_20_Text">1993 <text:s text:c="3"/>49.0</text:p>
      <text:p text:style-name="Preformatted_20_Text"><text:soft-page-break/>1994 <text:s text:c="3"/>47.0</text:p>
      <text:p text:style-name="Preformatted_20_Text">1995 <text:s text:c="3"/>44.0</text:p>
      <text:p text:style-name="Preformatted_20_Text">1996 <text:s text:c="3"/>41.0</text:p>
      <text:p text:style-name="Preformatted_20_Text">1997 <text:s text:c="3"/>38.0</text:p>
      <text:p text:style-name="Preformatted_20_Text">1998 <text:s text:c="3"/>38.0</text:p>
      <text:p text:style-name="Preformatted_20_Text">1999 <text:s text:c="3"/>39.0</text:p>
      <text:p text:style-name="Preformatted_20_Text">2000 <text:s text:c="3"/>40.0</text:p>
      <text:p text:style-name="Preformatted_20_Text">2001 <text:s text:c="3"/>41.0</text:p>
      <text:p text:style-name="Preformatted_20_Text">2002 <text:s text:c="3"/>48.0</text:p>
      <text:p text:style-name="Preformatted_20_Text">2003 <text:s text:c="3"/>49.0</text:p>
      <text:p text:style-name="Preformatted_20_Text">2004 <text:s text:c="3"/>50.0</text:p>
      <text:p text:style-name="Preformatted_20_Text">2005 <text:s text:c="3"/>51.0</text:p>
      <text:p text:style-name="Preformatted_20_Text">2006 <text:s text:c="3"/>53.0</text:p>
      <text:p text:style-name="Preformatted_20_Text">2007 <text:s text:c="3"/>54.0</text:p>
      <text:p text:style-name="Preformatted_20_Text">2008 <text:s text:c="3"/>54.0</text:p>
      <text:p text:style-name="Preformatted_20_Text">2009 <text:s text:c="3"/>53.0</text:p>
      <text:p text:style-name="Preformatted_20_Text">2010 <text:s text:c="3"/>53.0</text:p>
      <text:p text:style-name="Preformatted_20_Text">2011 <text:s text:c="3"/>55.0</text:p>
      <text:p text:style-name="Preformatted_20_Text">2012 <text:s text:c="3"/>57.0</text:p>
      <text:p text:style-name="Preformatted_20_Text">2013 <text:s text:c="3"/>61.0</text:p>
      <text:p text:style-name="Preformatted_20_Text">2014 <text:s text:c="3"/>55.0</text:p>
      <text:p text:style-name="Preformatted_20_Text">2015 <text:s text:c="3"/>55.0</text:p>
      <text:p text:style-name="Preformatted_20_Text">2016 <text:s text:c="3"/>57.0</text:p>
      <text:p text:style-name="Preformatted_20_Text">2017 <text:s text:c="3"/>59.0</text:p>
      <text:p text:style-name="Preformatted_20_Text">2018 <text:s text:c="3"/>61.0</text:p>
      <text:p text:style-name="Preformatted_20_Text">2019 <text:s text:c="3"/>63.0</text:p>
      <text:p text:style-name="Preformatted_20_Text">2020 <text:s text:c="3"/>63.0</text:p>
      <text:p text:style-name="Preformatted_20_Text">2021 <text:s text:c="3"/>65.0</text:p>
      <text:p text:style-name="Preformatted_20_Text">2022 <text:s text:c="3"/>53.0</text:p>
      <text:p text:style-name="Preformatted_20_Text">2023 <text:s text:c="3"/>55.0</text:p>
      <text:p text:style-name="Preformatted_20_Text">2024 <text:s text:c="3"/>57.0</text:p>
      <text:p text:style-name="Preformatted_20_Text">dtype: float64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57.0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0 <text:s text:c="4"/>57.0</text:p>
      <text:p text:style-name="Preformatted_20_Text">1 <text:s text:c="4"/>55.0</text:p>
      <text:p text:style-name="Preformatted_20_Text">2 <text:s text:c="4"/>51.0</text:p>
      <text:p text:style-name="Preformatted_20_Text">3 <text:s text:c="4"/>49.0</text:p>
      <text:p text:style-name="Preformatted_20_Text">4 <text:s text:c="4"/>47.0</text:p>
      <text:p text:style-name="Preformatted_20_Text">5 <text:s text:c="4"/>44.0</text:p>
      <text:p text:style-name="Preformatted_20_Text">6 <text:s text:c="4"/>41.0</text:p>
      <text:p text:style-name="Preformatted_20_Text">7 <text:s text:c="4"/>38.0</text:p>
      <text:p text:style-name="Preformatted_20_Text">8 <text:s text:c="4"/>38.0</text:p>
      <text:p text:style-name="Preformatted_20_Text">9 <text:s text:c="4"/>39.0</text:p>
      <text:p text:style-name="Preformatted_20_Text">10 <text:s text:c="3"/>40.0</text:p>
      <text:p text:style-name="Preformatted_20_Text">11 <text:s text:c="3"/>41.0</text:p>
      <text:p text:style-name="Preformatted_20_Text">12 <text:s text:c="3"/>48.0</text:p>
      <text:p text:style-name="Preformatted_20_Text">13 <text:s text:c="3"/>49.0</text:p>
      <text:p text:style-name="Preformatted_20_Text">14 <text:s text:c="3"/>50.0</text:p>
      <text:p text:style-name="Preformatted_20_Text">15 <text:s text:c="3"/>51.0</text:p>
      <text:p text:style-name="Preformatted_20_Text">16 <text:s text:c="3"/>53.0</text:p>
      <text:p text:style-name="Preformatted_20_Text">17 <text:s text:c="3"/>54.0</text:p>
      <text:p text:style-name="Preformatted_20_Text">18 <text:s text:c="3"/>54.0</text:p>
      <text:p text:style-name="Preformatted_20_Text">19 <text:s text:c="3"/>53.0</text:p>
      <text:p text:style-name="Preformatted_20_Text">20 <text:s text:c="3"/>53.0</text:p>
      <text:p text:style-name="Preformatted_20_Text">21 <text:s text:c="3"/>55.0</text:p>
      <text:p text:style-name="Preformatted_20_Text">22 <text:s text:c="3"/>57.0</text:p>
      <text:p text:style-name="Preformatted_20_Text">23 <text:s text:c="3"/>61.0</text:p>
      <text:p text:style-name="Preformatted_20_Text">24 <text:s text:c="3"/>55.0</text:p>
      <text:p text:style-name="Preformatted_20_Text"><text:soft-page-break/>25 <text:s text:c="3"/>55.0</text:p>
      <text:p text:style-name="Preformatted_20_Text">26 <text:s text:c="3"/>57.0</text:p>
      <text:p text:style-name="Preformatted_20_Text">27 <text:s text:c="3"/>59.0</text:p>
      <text:p text:style-name="Preformatted_20_Text">28 <text:s text:c="3"/>61.0</text:p>
      <text:p text:style-name="Preformatted_20_Text">29 <text:s text:c="3"/>63.0</text:p>
      <text:p text:style-name="Preformatted_20_Text">30 <text:s text:c="3"/>63.0</text:p>
      <text:p text:style-name="Preformatted_20_Text">31 <text:s text:c="3"/>65.0</text:p>
      <text:p text:style-name="Preformatted_20_Text">32 <text:s text:c="3"/>53.0</text:p>
      <text:p text:style-name="Preformatted_20_Text">33 <text:s text:c="3"/>55.0</text:p>
      <text:p text:style-name="Preformatted_20_Text">34 <text:s text:c="3"/>57.0</text:p>
      <text:p text:style-name="Preformatted_20_Text">dtype: str </text:p>
      <text:p text:style-name="Preformatted_20_Text"/>
      <text:p text:style-name="Preformatted_20_Text">0 <text:s text:c="5"/>True</text:p>
      <text:p text:style-name="Preformatted_20_Text">1 <text:s text:c="5"/>True</text:p>
      <text:p text:style-name="Preformatted_20_Text">2 <text:s text:c="5"/>True</text:p>
      <text:p text:style-name="Preformatted_20_Text">3 <text:s text:c="4"/>False</text:p>
      <text:p text:style-name="Preformatted_20_Text">4 <text:s text:c="4"/>False</text:p>
      <text:p text:style-name="Preformatted_20_Text">5 <text:s text:c="4"/>False</text:p>
      <text:p text:style-name="Preformatted_20_Text">6 <text:s text:c="4"/>False</text:p>
      <text:p text:style-name="Preformatted_20_Text">7 <text:s text:c="4"/>False</text:p>
      <text:p text:style-name="Preformatted_20_Text">8 <text:s text:c="4"/>False</text:p>
      <text:p text:style-name="Preformatted_20_Text">9 <text:s text:c="4"/>False</text:p>
      <text:p text:style-name="Preformatted_20_Text">10 <text:s text:c="3"/>False</text:p>
      <text:p text:style-name="Preformatted_20_Text">11 <text:s text:c="3"/>False</text:p>
      <text:p text:style-name="Preformatted_20_Text">12 <text:s text:c="3"/>False</text:p>
      <text:p text:style-name="Preformatted_20_Text">13 <text:s text:c="3"/>False</text:p>
      <text:p text:style-name="Preformatted_20_Text">14 <text:s text:c="4"/>True</text:p>
      <text:p text:style-name="Preformatted_20_Text">15 <text:s text:c="4"/>True</text:p>
      <text:p text:style-name="Preformatted_20_Text">16 <text:s text:c="4"/>True</text:p>
      <text:p text:style-name="Preformatted_20_Text">17 <text:s text:c="4"/>True</text:p>
      <text:p text:style-name="Preformatted_20_Text">18 <text:s text:c="4"/>True</text:p>
      <text:p text:style-name="Preformatted_20_Text">19 <text:s text:c="4"/>True</text:p>
      <text:p text:style-name="Preformatted_20_Text">20 <text:s text:c="4"/>True</text:p>
      <text:p text:style-name="Preformatted_20_Text">21 <text:s text:c="4"/>True</text:p>
      <text:p text:style-name="Preformatted_20_Text">22 <text:s text:c="4"/>True</text:p>
      <text:p text:style-name="Preformatted_20_Text">23 <text:s text:c="3"/>False</text:p>
      <text:p text:style-name="Preformatted_20_Text">24 <text:s text:c="4"/>True</text:p>
      <text:p text:style-name="Preformatted_20_Text">25 <text:s text:c="4"/>True</text:p>
      <text:p text:style-name="Preformatted_20_Text">26 <text:s text:c="4"/>True</text:p>
      <text:p text:style-name="Preformatted_20_Text">27 <text:s text:c="4"/>True</text:p>
      <text:p text:style-name="Preformatted_20_Text">28 <text:s text:c="3"/>False</text:p>
      <text:p text:style-name="Preformatted_20_Text">29 <text:s text:c="3"/>False</text:p>
      <text:p text:style-name="Preformatted_20_Text">30 <text:s text:c="3"/>False</text:p>
      <text:p text:style-name="Preformatted_20_Text">31 <text:s text:c="4"/>True</text:p>
      <text:p text:style-name="Preformatted_20_Text">32 <text:s text:c="4"/>True</text:p>
      <text:p text:style-name="Preformatted_20_Text">33 <text:s text:c="4"/>True</text:p>
      <text:p text:style-name="Preformatted_20_Text">34 <text:s text:c="4"/>True</text:p>
      <text:p text:style-name="Preformatted_20_Text">dtype: bool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0 <text:s text:c="3"/>5</text:p>
      <text:p text:style-name="Preformatted_20_Text">1 <text:s text:c="3"/>5</text:p>
      <text:p text:style-name="Preformatted_20_Text">2 <text:s text:c="3"/>5</text:p>
      <text:p text:style-name="Preformatted_20_Text">3 <text:s text:c="3"/>5</text:p>
      <text:p text:style-name="Preformatted_20_Text">4 <text:s text:c="3"/>5</text:p>
      <text:p text:style-name="Preformatted_20_Text">dtype: int64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1990 <text:s text:c="3"/>50</text:p>
      <text:p text:style-name="Preformatted_20_Text">1991 <text:s text:c="3"/>55</text:p>
      <text:p text:style-name="Preformatted_20_Text">1992 <text:s text:c="3"/>60</text:p>
      <text:p text:style-name="Preformatted_20_Text">dtype: int64</text:p>
      <text:p text:style-name="Preformatted_20_Text"><text:soft-page-break/></text:p>
      <text:p text:style-name="Preformatted_20_Text">dataframe.py:</text:p>
      <text:p text:style-name="Preformatted_20_Text">import pandas as pd</text:p>
      <text:p text:style-name="Preformatted_20_Text"/>
      <text:p text:style-name="Preformatted_20_Text">#робота з наявними даними:</text:p>
      <text:p text:style-name="Preformatted_20_Text"/>
      <text:p text:style-name="Preformatted_20_Text">pd.set_option('display.max_rows', None)</text:p>
      <text:p text:style-name="Preformatted_20_Text">pd.set_option('display.max_columns', None)</text:p>
      <text:p text:style-name="Preformatted_20_Text">pd.set_option('display.width', None)</text:p>
      <text:p text:style-name="Preformatted_20_Text"/>
      <text:p text:style-name="Preformatted_20_Text">data = pd.read_csv("../data_zdo/zdo_data.csv")</text:p>
      <text:p text:style-name="Preformatted_20_Text"/>
      <text:p text:style-name="Preformatted_20_Text"># Налаштування індексів DataFrame з використанням атрибута index</text:p>
      <text:p text:style-name="Preformatted_20_Text">data_c1 = pd.DataFrame(data)</text:p>
      <text:p text:style-name="Preformatted_20_Text">data_c1.index = [f"row{row}" for row in range(1, 36)]</text:p>
      <text:p text:style-name="Preformatted_20_Text">print(data_c1, "\n")</text:p>
      <text:p text:style-name="Preformatted_20_Text"/>
      <text:p text:style-name="Preformatted_20_Text"># Звернення до стовпців DataFrame</text:p>
      <text:p text:style-name="Preformatted_20_Text">print("######"*20)</text:p>
      <text:p text:style-name="Preformatted_20_Text">print(data.Year, "\n")</text:p>
      <text:p text:style-name="Preformatted_20_Text"/>
      <text:p text:style-name="Preformatted_20_Text"># Вибір рядків з використанням атрибутів loc і iloc</text:p>
      <text:p text:style-name="Preformatted_20_Text">print("######"*20)</text:p>
      <text:p text:style-name="Preformatted_20_Text">print(data_c1.loc['row5'], "\n")</text:p>
      <text:p text:style-name="Preformatted_20_Text">print(data.iloc[4], "\n")</text:p>
      <text:p text:style-name="Preformatted_20_Text">print(data_c1.loc['row5':'row10'], "\n")</text:p>
      <text:p text:style-name="Preformatted_20_Text">print(data.iloc[4:9],"\n", "\n")</text:p>
      <text:p text:style-name="Preformatted_20_Text"/>
      <text:p text:style-name="Preformatted_20_Text"># Вибір підмножин рядків і стовпців</text:p>
      <text:p text:style-name="Preformatted_20_Text">print("######"*20)</text:p>
      <text:p text:style-name="Preformatted_20_Text">print(data_c1.loc['row5':'row10',['Year']], "\n")</text:p>
      <text:p text:style-name="Preformatted_20_Text">print(data_c1.iloc[[1,10],0:3],"\n")</text:p>
      <text:p text:style-name="Preformatted_20_Text"/>
      <text:p text:style-name="Preformatted_20_Text"># Логічне індексування</text:p>
      <text:p text:style-name="Preformatted_20_Text">print("######"*20)</text:p>
      <text:p text:style-name="Preformatted_20_Text">print(data[data != 2005], "\n")</text:p>
      <text:p text:style-name="Preformatted_20_Text"/>
      <text:p text:style-name="Preformatted_20_Text"># Звернення до конкретного осередку DataFrame по рядку і стовпцю</text:p>
      <text:p text:style-name="Preformatted_20_Text">print("######"*20)</text:p>
      <text:p text:style-name="Preformatted_20_Text">print(data_c1.at['row5','Year'], "\n") #= 1990</text:p>
      <text:p text:style-name="Preformatted_20_Text">print(data_c1.iat[2,0],"\n") #= 1990</text:p>
      <text:p text:style-name="Preformatted_20_Text"/>
      <text:p text:style-name="Preformatted_20_Text"># Описова статистика</text:p>
      <text:p text:style-name="Preformatted_20_Text">print("######"*20)</text:p>
      <text:p text:style-name="Preformatted_20_Text">print(data.describe(), "\n")</text:p>
      <text:p text:style-name="Preformatted_20_Text">print(data.median(), "\n")</text:p>
      <text:p text:style-name="Preformatted_20_Text"/>
      <text:p text:style-name="Preformatted_20_Text"># Транспонування DataFrame з використанням атрибута T</text:p>
      <text:p text:style-name="Preformatted_20_Text">print("######"*20)</text:p>
      <text:p text:style-name="Preformatted_20_Text">print(data.T, "\n")</text:p>
      <text:p text:style-name="Preformatted_20_Text"/>
      <text:p text:style-name="Preformatted_20_Text">#Сортування рядків за індексами</text:p>
      <text:p text:style-name="Preformatted_20_Text">print("######"*20)</text:p>
      <text:p text:style-name="Preformatted_20_Text">print(data.sort_index(ascending= False), "\n")</text:p>
      <text:p text:style-name="Preformatted_20_Text">print(data_c1.sort_index(ascending= False), "\n")</text:p>
      <text:p text:style-name="Preformatted_20_Text"/>
      <text:p text:style-name="Preformatted_20_Text"># Сортування за індексами стовпців</text:p>
      <text:p text:style-name="Preformatted_20_Text">print("######"*20)</text:p>
      <text:p text:style-name="Preformatted_20_Text">print(data.sort_index(axis=1), "\n")</text:p>
      <text:p text:style-name="Preformatted_20_Text"/>
      <text:p text:style-name="Preformatted_20_Text"># Сортування за значеннями стовпців</text:p>
      <text:p text:style-name="Preformatted_20_Text">print("######"*20)</text:p>
      <text:p text:style-name="Preformatted_20_Text">print(data.sort_values(1,axis=1,ascending=False), "\n")</text:p>
      <text:p text:style-name="Preformatted_20_Text"/>
      <text:p text:style-name="Preformatted_20_Text"><text:soft-page-break/># робота з вигаданими даними</text:p>
      <text:p text:style-name="Preformatted_20_Text"/>
      <text:p text:style-name="Preformatted_20_Text">#Створення DataFrame на базі словника</text:p>
      <text:p text:style-name="Preformatted_20_Text">print("######"*20)</text:p>
      <text:p text:style-name="Preformatted_20_Text">dict = {"1990":[26,23.4],"1991":[24,22.4],"1992":[22.3,23.454]}</text:p>
      <text:p text:style-name="Preformatted_20_Text">data_2 = pd.DataFrame(dict)</text:p>
      <text:p text:style-name="Preformatted_20_Text">print(data_2)</text:p>
      <text:p text:style-name="Preformatted_20_Text"/>
      <text:p text:style-name="Preformatted_20_Text">Результат виконання файлу:</text:p>
      <text:p text:style-name="Preformatted_20_Text"/>
      <text:p text:style-name="Preformatted_20_Text"/>
      <text:p text:style-name="Preformatted_20_Text"/>
      <text:p text:style-name="Preformatted_20_Text"><text:s text:c="7"/>Year <text:s/>Number of institutions(thsd) <text:s/>Number of places(thsd) <text:s/>Number of persons(thsd) <text:s/>Coverage of children(%)</text:p>
      <text:p text:style-name="Preformatted_20_Text">row1 <text:s text:c="2"/>1990 <text:s text:c="25"/>24.5 <text:s text:c="19"/>2277 <text:s text:c="20"/>2428 <text:s text:c="22"/>57</text:p>
      <text:p text:style-name="Preformatted_20_Text">row2 <text:s text:c="2"/>1991 <text:s text:c="25"/>24.4 <text:s text:c="19"/>2243 <text:s text:c="20"/>2268 <text:s text:c="22"/>55</text:p>
      <text:p text:style-name="Preformatted_20_Text">row3 <text:s text:c="2"/>1992 <text:s text:c="25"/>23.8 <text:s text:c="19"/>2216 <text:s text:c="20"/>2063 <text:s text:c="22"/>51</text:p>
      <text:p text:style-name="Preformatted_20_Text">row4 <text:s text:c="2"/>1993 <text:s text:c="25"/>23.2 <text:s text:c="19"/>2189 <text:s text:c="20"/>1918 <text:s text:c="22"/>49</text:p>
      <text:p text:style-name="Preformatted_20_Text">row5 <text:s text:c="2"/>1994 <text:s text:c="25"/>22.3 <text:s text:c="19"/>2101 <text:s text:c="20"/>1736 <text:s text:c="22"/>47</text:p>
      <text:p text:style-name="Preformatted_20_Text">row6 <text:s text:c="2"/>1995 <text:s text:c="25"/>21.4 <text:s text:c="19"/>2014 <text:s text:c="20"/>1536 <text:s text:c="22"/>44</text:p>
      <text:p text:style-name="Preformatted_20_Text">row7 <text:s text:c="2"/>1996 <text:s text:c="25"/>20.2 <text:s text:c="19"/>1856 <text:s text:c="20"/>1342 <text:s text:c="22"/>41</text:p>
      <text:p text:style-name="Preformatted_20_Text">row8 <text:s text:c="2"/>1997 <text:s text:c="25"/>18.4 <text:s text:c="19"/>1770 <text:s text:c="20"/>1172 <text:s text:c="22"/>38</text:p>
      <text:p text:style-name="Preformatted_20_Text">row9 <text:s text:c="2"/>1998 <text:s text:c="25"/>17.6 <text:s text:c="19"/>1638 <text:s text:c="20"/>1103 <text:s text:c="22"/>38</text:p>
      <text:p text:style-name="Preformatted_20_Text">row10 <text:s/>1999 <text:s text:c="25"/>17.2 <text:s text:c="19"/>1216 <text:s text:c="20"/>1055 <text:s text:c="22"/>39</text:p>
      <text:p text:style-name="Preformatted_20_Text">row11 <text:s/>2000 <text:s text:c="25"/>16.3 <text:s text:c="19"/>1117 <text:s text:c="21"/>983 <text:s text:c="22"/>40</text:p>
      <text:p text:style-name="Preformatted_20_Text">row12 <text:s/>2001 <text:s text:c="25"/>15.7 <text:s text:c="19"/>1077 <text:s text:c="21"/>968 <text:s text:c="22"/>41</text:p>
      <text:p text:style-name="Preformatted_20_Text">row13 <text:s/>2002 <text:s text:c="25"/>15.3 <text:s text:c="19"/>1060 <text:s text:c="21"/>973 <text:s text:c="22"/>48</text:p>
      <text:p text:style-name="Preformatted_20_Text">row14 <text:s/>2003 <text:s text:c="25"/>15.0 <text:s text:c="19"/>1053 <text:s text:c="21"/>977 <text:s text:c="22"/>49</text:p>
      <text:p text:style-name="Preformatted_20_Text">row15 <text:s/>2004 <text:s text:c="25"/>14.9 <text:s text:c="19"/>1040 <text:s text:c="21"/>996 <text:s text:c="22"/>50</text:p>
      <text:p text:style-name="Preformatted_20_Text">row16 <text:s/>2005 <text:s text:c="25"/>15.1 <text:s text:c="19"/>1056 <text:s text:c="20"/>1032 <text:s text:c="22"/>51</text:p>
      <text:p text:style-name="Preformatted_20_Text">row17 <text:s/>2006 <text:s text:c="25"/>15.1 <text:s text:c="19"/>1063 <text:s text:c="20"/>1081 <text:s text:c="22"/>53</text:p>
      <text:p text:style-name="Preformatted_20_Text">row18 <text:s/>2007 <text:s text:c="25"/>15.3 <text:s text:c="19"/>1084 <text:s text:c="20"/>1137 <text:s text:c="22"/>54</text:p>
      <text:p text:style-name="Preformatted_20_Text">row19 <text:s/>2008 <text:s text:c="25"/>15.4 <text:s text:c="19"/>1110 <text:s text:c="20"/>1195 <text:s text:c="22"/>54</text:p>
      <text:p text:style-name="Preformatted_20_Text">row20 <text:s/>2009 <text:s text:c="25"/>15.5 <text:s text:c="19"/>1121 <text:s text:c="20"/>1214 <text:s text:c="22"/>53</text:p>
      <text:p text:style-name="Preformatted_20_Text">row21 <text:s/>2010 <text:s text:c="25"/>15.6 <text:s text:c="19"/>1136 <text:s text:c="20"/>1273 <text:s text:c="22"/>53</text:p>
      <text:p text:style-name="Preformatted_20_Text">row22 <text:s/>2011 <text:s text:c="25"/>16.1 <text:s text:c="19"/>1171 <text:s text:c="20"/>1354 <text:s text:c="22"/>55</text:p>
      <text:p text:style-name="Preformatted_20_Text">row23 <text:s/>2012 <text:s text:c="25"/>16.4 <text:s text:c="19"/>1204 <text:s text:c="20"/>1428 <text:s text:c="22"/>57</text:p>
      <text:p text:style-name="Preformatted_20_Text">row24 <text:s/>2013 <text:s text:c="25"/>16.7 <text:s text:c="19"/>1236 <text:s text:c="20"/>1471 <text:s text:c="22"/>61</text:p>
      <text:p text:style-name="Preformatted_20_Text">row25 <text:s/>2014 <text:s text:c="25"/>15.0 <text:s text:c="19"/>1077 <text:s text:c="20"/>1295 <text:s text:c="22"/>55</text:p>
      <text:p text:style-name="Preformatted_20_Text"><text:soft-page-break/>row26 <text:s/>2015 <text:s text:c="25"/>14.8 <text:s text:c="19"/>1105 <text:s text:c="20"/>1291 <text:s text:c="22"/>55</text:p>
      <text:p text:style-name="Preformatted_20_Text">row27 <text:s/>2016 <text:s text:c="25"/>14.9 <text:s text:c="19"/>1125 <text:s text:c="20"/>1300 <text:s text:c="22"/>57</text:p>
      <text:p text:style-name="Preformatted_20_Text">row28 <text:s/>2017 <text:s text:c="25"/>14.9 <text:s text:c="19"/>1141 <text:s text:c="20"/>1304 <text:s text:c="22"/>59</text:p>
      <text:p text:style-name="Preformatted_20_Text">row29 <text:s/>2018 <text:s text:c="25"/>14.9 <text:s text:c="19"/>1156 <text:s text:c="20"/>1278 <text:s text:c="22"/>61</text:p>
      <text:p text:style-name="Preformatted_20_Text">row30 <text:s/>2019 <text:s text:c="25"/>14.8 <text:s text:c="19"/>1155 <text:s text:c="20"/>1230 <text:s text:c="22"/>63</text:p>
      <text:p text:style-name="Preformatted_20_Text">row31 <text:s/>2020 <text:s text:c="25"/>15.3 <text:s text:c="19"/>1153 <text:s text:c="20"/>1151 <text:s text:c="22"/>63</text:p>
      <text:p text:style-name="Preformatted_20_Text">row32 <text:s/>2021 <text:s text:c="25"/>15.0 <text:s text:c="19"/>1138 <text:s text:c="20"/>1111 <text:s text:c="22"/>65</text:p>
      <text:p text:style-name="Preformatted_20_Text">row33 <text:s/>2022 <text:s text:c="25"/>13.9 <text:s text:c="19"/>1047 <text:s text:c="21"/>934 <text:s text:c="22"/>53</text:p>
      <text:p text:style-name="Preformatted_20_Text">row34 <text:s/>2023 <text:s text:c="25"/>13.5 <text:s text:c="19"/>1010 <text:s text:c="21"/>862 <text:s text:c="22"/>55</text:p>
      <text:p text:style-name="Preformatted_20_Text">row35 <text:s/>2024 <text:s text:c="25"/>12.9 <text:s text:c="20"/>961 <text:s text:c="21"/>781 <text:s text:c="22"/>57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0 <text:s text:c="4"/>1990</text:p>
      <text:p text:style-name="Preformatted_20_Text">1 <text:s text:c="4"/>1991</text:p>
      <text:p text:style-name="Preformatted_20_Text">2 <text:s text:c="4"/>1992</text:p>
      <text:p text:style-name="Preformatted_20_Text">3 <text:s text:c="4"/>1993</text:p>
      <text:p text:style-name="Preformatted_20_Text">4 <text:s text:c="4"/>1994</text:p>
      <text:p text:style-name="Preformatted_20_Text">5 <text:s text:c="4"/>1995</text:p>
      <text:p text:style-name="Preformatted_20_Text">6 <text:s text:c="4"/>1996</text:p>
      <text:p text:style-name="Preformatted_20_Text">7 <text:s text:c="4"/>1997</text:p>
      <text:p text:style-name="Preformatted_20_Text">8 <text:s text:c="4"/>1998</text:p>
      <text:p text:style-name="Preformatted_20_Text">9 <text:s text:c="4"/>1999</text:p>
      <text:p text:style-name="Preformatted_20_Text">10 <text:s text:c="3"/>2000</text:p>
      <text:p text:style-name="Preformatted_20_Text">11 <text:s text:c="3"/>2001</text:p>
      <text:p text:style-name="Preformatted_20_Text">12 <text:s text:c="3"/>2002</text:p>
      <text:p text:style-name="Preformatted_20_Text">13 <text:s text:c="3"/>2003</text:p>
      <text:p text:style-name="Preformatted_20_Text">14 <text:s text:c="3"/>2004</text:p>
      <text:p text:style-name="Preformatted_20_Text">15 <text:s text:c="3"/>2005</text:p>
      <text:p text:style-name="Preformatted_20_Text">16 <text:s text:c="3"/>2006</text:p>
      <text:p text:style-name="Preformatted_20_Text">17 <text:s text:c="3"/>2007</text:p>
      <text:p text:style-name="Preformatted_20_Text">18 <text:s text:c="3"/>2008</text:p>
      <text:p text:style-name="Preformatted_20_Text">19 <text:s text:c="3"/>2009</text:p>
      <text:p text:style-name="Preformatted_20_Text">20 <text:s text:c="3"/>2010</text:p>
      <text:p text:style-name="Preformatted_20_Text">21 <text:s text:c="3"/>2011</text:p>
      <text:p text:style-name="Preformatted_20_Text">22 <text:s text:c="3"/>2012</text:p>
      <text:p text:style-name="Preformatted_20_Text">23 <text:s text:c="3"/>2013</text:p>
      <text:p text:style-name="Preformatted_20_Text">24 <text:s text:c="3"/>2014</text:p>
      <text:p text:style-name="Preformatted_20_Text">25 <text:s text:c="3"/>2015</text:p>
      <text:p text:style-name="Preformatted_20_Text">26 <text:s text:c="3"/>2016</text:p>
      <text:p text:style-name="Preformatted_20_Text">27 <text:s text:c="3"/>2017</text:p>
      <text:p text:style-name="Preformatted_20_Text">28 <text:s text:c="3"/>2018</text:p>
      <text:p text:style-name="Preformatted_20_Text">29 <text:s text:c="3"/>2019</text:p>
      <text:p text:style-name="Preformatted_20_Text">30 <text:s text:c="3"/>2020</text:p>
      <text:p text:style-name="Preformatted_20_Text">31 <text:s text:c="3"/>2021</text:p>
      <text:p text:style-name="Preformatted_20_Text">32 <text:s text:c="3"/>2022</text:p>
      <text:p text:style-name="Preformatted_20_Text">33 <text:s text:c="3"/>2023</text:p>
      <text:p text:style-name="Preformatted_20_Text">34 <text:s text:c="3"/>2024</text:p>
      <text:p text:style-name="Preformatted_20_Text">Name: Year, dtype: int64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Year <text:s text:c="27"/>1994.0</text:p>
      <text:p text:style-name="Preformatted_20_Text">Number of institutions(thsd) <text:s text:c="5"/>22.3</text:p>
      <text:p text:style-name="Preformatted_20_Text"><text:soft-page-break/>Number of places(thsd) <text:s text:c="9"/>2101.0</text:p>
      <text:p text:style-name="Preformatted_20_Text">Number of persons(thsd) <text:s text:c="8"/>1736.0</text:p>
      <text:p text:style-name="Preformatted_20_Text">Coverage of children(%) <text:s text:c="10"/>47.0</text:p>
      <text:p text:style-name="Preformatted_20_Text">Name: row5, dtype: float64 </text:p>
      <text:p text:style-name="Preformatted_20_Text"/>
      <text:p text:style-name="Preformatted_20_Text">Year <text:s text:c="27"/>1994.0</text:p>
      <text:p text:style-name="Preformatted_20_Text">Number of institutions(thsd) <text:s text:c="5"/>22.3</text:p>
      <text:p text:style-name="Preformatted_20_Text">Number of places(thsd) <text:s text:c="9"/>2101.0</text:p>
      <text:p text:style-name="Preformatted_20_Text">Number of persons(thsd) <text:s text:c="8"/>1736.0</text:p>
      <text:p text:style-name="Preformatted_20_Text">Coverage of children(%) <text:s text:c="10"/>47.0</text:p>
      <text:p text:style-name="Preformatted_20_Text">Name: 4, dtype: float64 </text:p>
      <text:p text:style-name="Preformatted_20_Text"/>
      <text:p text:style-name="Preformatted_20_Text"><text:s text:c="7"/>Year <text:s/>Number of institutions(thsd) <text:s/>Number of places(thsd) <text:s/>Number of persons(thsd) <text:s/>Coverage of children(%)</text:p>
      <text:p text:style-name="Preformatted_20_Text">row5 <text:s text:c="2"/>1994 <text:s text:c="25"/>22.3 <text:s text:c="19"/>2101 <text:s text:c="20"/>1736 <text:s text:c="22"/>47</text:p>
      <text:p text:style-name="Preformatted_20_Text">row6 <text:s text:c="2"/>1995 <text:s text:c="25"/>21.4 <text:s text:c="19"/>2014 <text:s text:c="20"/>1536 <text:s text:c="22"/>44</text:p>
      <text:p text:style-name="Preformatted_20_Text">row7 <text:s text:c="2"/>1996 <text:s text:c="25"/>20.2 <text:s text:c="19"/>1856 <text:s text:c="20"/>1342 <text:s text:c="22"/>41</text:p>
      <text:p text:style-name="Preformatted_20_Text">row8 <text:s text:c="2"/>1997 <text:s text:c="25"/>18.4 <text:s text:c="19"/>1770 <text:s text:c="20"/>1172 <text:s text:c="22"/>38</text:p>
      <text:p text:style-name="Preformatted_20_Text">row9 <text:s text:c="2"/>1998 <text:s text:c="25"/>17.6 <text:s text:c="19"/>1638 <text:s text:c="20"/>1103 <text:s text:c="22"/>38</text:p>
      <text:p text:style-name="Preformatted_20_Text">row10 <text:s/>1999 <text:s text:c="25"/>17.2 <text:s text:c="19"/>1216 <text:s text:c="20"/>1055 <text:s text:c="22"/>39 </text:p>
      <text:p text:style-name="Preformatted_20_Text"/>
      <text:p text:style-name="Preformatted_20_Text"><text:s text:c="3"/>Year <text:s/>Number of institutions(thsd) <text:s/>Number of places(thsd) <text:s/>Number of persons(thsd) <text:s/>Coverage of children(%)</text:p>
      <text:p text:style-name="Preformatted_20_Text">4 <text:s/>1994 <text:s text:c="25"/>22.3 <text:s text:c="19"/>2101 <text:s text:c="20"/>1736 <text:s text:c="22"/>47</text:p>
      <text:p text:style-name="Preformatted_20_Text">5 <text:s/>1995 <text:s text:c="25"/>21.4 <text:s text:c="19"/>2014 <text:s text:c="20"/>1536 <text:s text:c="22"/>44</text:p>
      <text:p text:style-name="Preformatted_20_Text">6 <text:s/>1996 <text:s text:c="25"/>20.2 <text:s text:c="19"/>1856 <text:s text:c="20"/>1342 <text:s text:c="22"/>41</text:p>
      <text:p text:style-name="Preformatted_20_Text">7 <text:s/>1997 <text:s text:c="25"/>18.4 <text:s text:c="19"/>1770 <text:s text:c="20"/>1172 <text:s text:c="22"/>38</text:p>
      <text:p text:style-name="Preformatted_20_Text">8 <text:s/>1998 <text:s text:c="25"/>17.6 <text:s text:c="19"/>1638 <text:s text:c="20"/>1103 <text:s text:c="22"/>38 </text:p>
      <text:p text:style-name="Preformatted_20_Text"><text:s/>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<text:s text:c="7"/>Year</text:p>
      <text:p text:style-name="Preformatted_20_Text">row5 <text:s text:c="2"/>1994</text:p>
      <text:p text:style-name="Preformatted_20_Text">row6 <text:s text:c="2"/>1995</text:p>
      <text:p text:style-name="Preformatted_20_Text">row7 <text:s text:c="2"/>1996</text:p>
      <text:p text:style-name="Preformatted_20_Text">row8 <text:s text:c="2"/>1997</text:p>
      <text:p text:style-name="Preformatted_20_Text">row9 <text:s text:c="2"/>1998</text:p>
      <text:p text:style-name="Preformatted_20_Text">row10 <text:s/>1999 </text:p>
      <text:p text:style-name="Preformatted_20_Text"/>
      <text:p text:style-name="Preformatted_20_Text"><text:s text:c="7"/>Year <text:s/>Number of institutions(thsd) <text:s/>Number of places(thsd)</text:p>
      <text:p text:style-name="Preformatted_20_Text">row2 <text:s text:c="2"/>1991 <text:s text:c="25"/>24.4 <text:s text:c="19"/>2243</text:p>
      <text:p text:style-name="Preformatted_20_Text">row11 <text:s/>2000 <text:s text:c="25"/>16.3 <text:s text:c="19"/>1117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<text:s text:c="6"/>Year <text:s/>Number of institutions(thsd) <text:s/>Number of places(thsd) <text:s/>Number of persons(thsd) <text:s/>Coverage of children(%)</text:p>
      <text:p text:style-name="Preformatted_20_Text">0 <text:s text:c="2"/>1990.0 <text:s text:c="25"/>24.5 <text:s text:c="19"/>2277 <text:s text:c="20"/>2428 <text:s text:c="22"/>57</text:p>
      <text:p text:style-name="Preformatted_20_Text">1 <text:s text:c="2"/>1991.0 <text:s text:c="25"/>24.4 <text:s text:c="19"/>2243 <text:s text:c="20"/>2268 <text:s text:c="22"/>55</text:p>
      <text:p text:style-name="Preformatted_20_Text">2 <text:s text:c="2"/>1992.0 <text:s text:c="25"/>23.8 <text:s text:c="19"/>2216 <text:s text:c="20"/><text:soft-page-break/>2063 <text:s text:c="22"/>51</text:p>
      <text:p text:style-name="Preformatted_20_Text">3 <text:s text:c="2"/>1993.0 <text:s text:c="25"/>23.2 <text:s text:c="19"/>2189 <text:s text:c="20"/>1918 <text:s text:c="22"/>49</text:p>
      <text:p text:style-name="Preformatted_20_Text">4 <text:s text:c="2"/>1994.0 <text:s text:c="25"/>22.3 <text:s text:c="19"/>2101 <text:s text:c="20"/>1736 <text:s text:c="22"/>47</text:p>
      <text:p text:style-name="Preformatted_20_Text">5 <text:s text:c="2"/>1995.0 <text:s text:c="25"/>21.4 <text:s text:c="19"/>2014 <text:s text:c="20"/>1536 <text:s text:c="22"/>44</text:p>
      <text:p text:style-name="Preformatted_20_Text">6 <text:s text:c="2"/>1996.0 <text:s text:c="25"/>20.2 <text:s text:c="19"/>1856 <text:s text:c="20"/>1342 <text:s text:c="22"/>41</text:p>
      <text:p text:style-name="Preformatted_20_Text">7 <text:s text:c="2"/>1997.0 <text:s text:c="25"/>18.4 <text:s text:c="19"/>1770 <text:s text:c="20"/>1172 <text:s text:c="22"/>38</text:p>
      <text:p text:style-name="Preformatted_20_Text">8 <text:s text:c="2"/>1998.0 <text:s text:c="25"/>17.6 <text:s text:c="19"/>1638 <text:s text:c="20"/>1103 <text:s text:c="22"/>38</text:p>
      <text:p text:style-name="Preformatted_20_Text">9 <text:s text:c="2"/>1999.0 <text:s text:c="25"/>17.2 <text:s text:c="19"/>1216 <text:s text:c="20"/>1055 <text:s text:c="22"/>39</text:p>
      <text:p text:style-name="Preformatted_20_Text">10 <text:s/>2000.0 <text:s text:c="25"/>16.3 <text:s text:c="19"/>1117 <text:s text:c="21"/>983 <text:s text:c="22"/>40</text:p>
      <text:p text:style-name="Preformatted_20_Text">11 <text:s/>2001.0 <text:s text:c="25"/>15.7 <text:s text:c="19"/>1077 <text:s text:c="21"/>968 <text:s text:c="22"/>41</text:p>
      <text:p text:style-name="Preformatted_20_Text">12 <text:s/>2002.0 <text:s text:c="25"/>15.3 <text:s text:c="19"/>1060 <text:s text:c="21"/>973 <text:s text:c="22"/>48</text:p>
      <text:p text:style-name="Preformatted_20_Text">13 <text:s/>2003.0 <text:s text:c="25"/>15.0 <text:s text:c="19"/>1053 <text:s text:c="21"/>977 <text:s text:c="22"/>49</text:p>
      <text:p text:style-name="Preformatted_20_Text">14 <text:s/>2004.0 <text:s text:c="25"/>14.9 <text:s text:c="19"/>1040 <text:s text:c="21"/>996 <text:s text:c="22"/>50</text:p>
      <text:p text:style-name="Preformatted_20_Text">15 <text:s text:c="4"/>NaN <text:s text:c="25"/>15.1 <text:s text:c="19"/>1056 <text:s text:c="20"/>1032 <text:s text:c="22"/>51</text:p>
      <text:p text:style-name="Preformatted_20_Text">16 <text:s/>2006.0 <text:s text:c="25"/>15.1 <text:s text:c="19"/>1063 <text:s text:c="20"/>1081 <text:s text:c="22"/>53</text:p>
      <text:p text:style-name="Preformatted_20_Text">17 <text:s/>2007.0 <text:s text:c="25"/>15.3 <text:s text:c="19"/>1084 <text:s text:c="20"/>1137 <text:s text:c="22"/>54</text:p>
      <text:p text:style-name="Preformatted_20_Text">18 <text:s/>2008.0 <text:s text:c="25"/>15.4 <text:s text:c="19"/>1110 <text:s text:c="20"/>1195 <text:s text:c="22"/>54</text:p>
      <text:p text:style-name="Preformatted_20_Text">19 <text:s/>2009.0 <text:s text:c="25"/>15.5 <text:s text:c="19"/>1121 <text:s text:c="20"/>1214 <text:s text:c="22"/>53</text:p>
      <text:p text:style-name="Preformatted_20_Text">20 <text:s/>2010.0 <text:s text:c="25"/>15.6 <text:s text:c="19"/>1136 <text:s text:c="20"/>1273 <text:s text:c="22"/>53</text:p>
      <text:p text:style-name="Preformatted_20_Text">21 <text:s/>2011.0 <text:s text:c="25"/>16.1 <text:s text:c="19"/>1171 <text:s text:c="20"/>1354 <text:s text:c="22"/>55</text:p>
      <text:p text:style-name="Preformatted_20_Text">22 <text:s/>2012.0 <text:s text:c="25"/>16.4 <text:s text:c="19"/>1204 <text:s text:c="20"/>1428 <text:s text:c="22"/>57</text:p>
      <text:p text:style-name="Preformatted_20_Text">23 <text:s/>2013.0 <text:s text:c="25"/>16.7 <text:s text:c="19"/>1236 <text:s text:c="20"/>1471 <text:s text:c="22"/>61</text:p>
      <text:p text:style-name="Preformatted_20_Text">24 <text:s/>2014.0 <text:s text:c="25"/>15.0 <text:s text:c="19"/>1077 <text:s text:c="20"/>1295 <text:s text:c="22"/>55</text:p>
      <text:p text:style-name="Preformatted_20_Text">25 <text:s/>2015.0 <text:s text:c="25"/>14.8 <text:s text:c="19"/>1105 <text:s text:c="20"/>1291 <text:s text:c="22"/>55</text:p>
      <text:p text:style-name="Preformatted_20_Text">26 <text:s/>2016.0 <text:s text:c="25"/>14.9 <text:s text:c="19"/>1125 <text:s text:c="20"/>1300 <text:s text:c="22"/>57</text:p>
      <text:p text:style-name="Preformatted_20_Text">27 <text:s/>2017.0 <text:s text:c="25"/>14.9 <text:s text:c="19"/>1141 <text:s text:c="20"/>1304 <text:s text:c="22"/>59</text:p>
      <text:p text:style-name="Preformatted_20_Text">28 <text:s/>2018.0 <text:s text:c="25"/>14.9 <text:s text:c="19"/>1156 <text:s text:c="20"/>1278 <text:s text:c="22"/>61</text:p>
      <text:p text:style-name="Preformatted_20_Text">29 <text:s/>2019.0 <text:s text:c="25"/>14.8 <text:s text:c="19"/>1155 <text:s text:c="20"/>1230 <text:s text:c="22"/>63</text:p>
      <text:p text:style-name="Preformatted_20_Text">30 <text:s/>2020.0 <text:s text:c="25"/>15.3 <text:s text:c="19"/>1153 <text:s text:c="20"/>1151 <text:s text:c="22"/>63</text:p>
      <text:p text:style-name="Preformatted_20_Text">31 <text:s/>2021.0 <text:s text:c="25"/>15.0 <text:s text:c="19"/>1138 <text:s text:c="20"/>1111 <text:s text:c="22"/>65</text:p>
      <text:p text:style-name="Preformatted_20_Text">32 <text:s/>2022.0 <text:s text:c="25"/>13.9 <text:s text:c="19"/>1047 <text:s text:c="21"/>934 <text:s text:c="22"/>53</text:p>
      <text:p text:style-name="Preformatted_20_Text"/>
      <text:p text:style-name="Preformatted_20_Text">33 <text:s/>2023.0 <text:s text:c="25"/>13.5 <text:s text:c="19"/>1010 <text:s text:c="21"/>862 <text:s text:c="22"/>55</text:p>
      <text:p text:style-name="Preformatted_20_Text"><text:soft-page-break/>34 <text:s/>2024.0 <text:s text:c="25"/>12.9 <text:s text:c="20"/>961 <text:s text:c="21"/>781 <text:s text:c="22"/>57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1994 </text:p>
      <text:p text:style-name="Preformatted_20_Text"/>
      <text:p text:style-name="Preformatted_20_Text">1992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<text:s text:c="14"/>Year <text:s/>Number of institutions(thsd) <text:s/>Number of places(thsd) <text:s/>Number of persons(thsd) <text:s/>Coverage of children(%)</text:p>
      <text:p text:style-name="Preformatted_20_Text">count <text:s text:c="3"/>35.000000 <text:s text:c="20"/>35.000000 <text:s text:c="14"/>35.000000 <text:s text:c="15"/>35.000000 <text:s text:c="15"/>35.000000</text:p>
      <text:p text:style-name="Preformatted_20_Text">mean <text:s text:c="2"/>2007.000000 <text:s text:c="20"/>16.894286 <text:s text:c="12"/>1346.171429 <text:s text:c="13"/>1292.571429 <text:s text:c="15"/>52.028571</text:p>
      <text:p text:style-name="Preformatted_20_Text">std <text:s text:c="5"/>10.246951 <text:s text:c="21"/>3.251420 <text:s text:c="13"/>428.895880 <text:s text:c="14"/>380.455013 <text:s text:c="16"/>7.386338</text:p>
      <text:p text:style-name="Preformatted_20_Text">min <text:s text:c="3"/>1990.000000 <text:s text:c="20"/>12.900000 <text:s text:c="13"/>961.000000 <text:s text:c="14"/>781.000000 <text:s text:c="15"/>38.000000</text:p>
      <text:p text:style-name="Preformatted_20_Text">25% <text:s text:c="3"/>1998.500000 <text:s text:c="20"/>14.950000 <text:s text:c="12"/>1077.000000 <text:s text:c="13"/>1043.500000 <text:s text:c="15"/>48.500000</text:p>
      <text:p text:style-name="Preformatted_20_Text">50% <text:s text:c="3"/>2007.000000 <text:s text:c="20"/>15.400000 <text:s text:c="12"/>1138.000000 <text:s text:c="13"/>1214.000000 <text:s text:c="15"/>53.000000</text:p>
      <text:p text:style-name="Preformatted_20_Text">75% <text:s text:c="3"/>2015.500000 <text:s text:c="20"/>17.400000 <text:s text:c="12"/>1437.000000 <text:s text:c="13"/>1348.000000 <text:s text:c="15"/>57.000000</text:p>
      <text:p text:style-name="Preformatted_20_Text">max <text:s text:c="3"/>2024.000000 <text:s text:c="20"/>24.500000 <text:s text:c="12"/>2277.000000 <text:s text:c="13"/>2428.000000 <text:s text:c="15"/>65.000000 </text:p>
      <text:p text:style-name="Preformatted_20_Text"/>
      <text:p text:style-name="Preformatted_20_Text">Year <text:s text:c="27"/>2007.0</text:p>
      <text:p text:style-name="Preformatted_20_Text">Number of institutions(thsd) <text:s text:c="5"/>15.4</text:p>
      <text:p text:style-name="Preformatted_20_Text">Number of places(thsd) <text:s text:c="9"/>1138.0</text:p>
      <text:p text:style-name="Preformatted_20_Text">Number of persons(thsd) <text:s text:c="8"/>1214.0</text:p>
      <text:p text:style-name="Preformatted_20_Text">Coverage of children(%) <text:s text:c="10"/>53.0</text:p>
      <text:p text:style-name="Preformatted_20_Text">dtype: float64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<text:s text:c="34"/>0 <text:s text:c="6"/>1 <text:s text:c="6"/>2 <text:s text:c="6"/>3 <text:s text:c="6"/>4 <text:s text:c="6"/>5 <text:s text:c="6"/>6 <text:s text:c="6"/>7 <text:s text:c="6"/>8 <text:s text:c="6"/>9 <text:s text:c="6"/>10 <text:s text:c="5"/>11 <text:s text:c="5"/>12 <text:s text:c="5"/>13 <text:s text:c="5"/>14 <text:s text:c="5"/>15 <text:s text:c="5"/>16 <text:s text:c="5"/>17 <text:s text:c="5"/>18 <text:s text:c="5"/>19 <text:s text:c="5"/>20 <text:s text:c="5"/>21 <text:s text:c="5"/>22 <text:s text:c="5"/>23 <text:s text:c="5"/>24 <text:s text:c="5"/>25 <text:s text:c="5"/>26 <text:s text:c="5"/>27 <text:s text:c="5"/>28 <text:s text:c="5"/>29 <text:s text:c="5"/>30 <text:s text:c="5"/>31 <text:s text:c="5"/>32 <text:s text:c="5"/>33 <text:s text:c="5"/>34</text:p>
      <text:p text:style-name="Preformatted_20_Text">Year <text:s text:c="25"/>1990.0 <text:s/>1991.0 <text:s/>1992.0 <text:s/>1993.0 <text:s/>1994.0 <text:s/>1995.0 <text:s/>1996.0 <text:s/>1997.0 <text:s/>1998.0 <text:s/>1999.0 <text:s/>2000.0 <text:s/>2001.0 <text:s/>2002.0 <text:s/>2003.0 <text:s/>2004.0 <text:s/>2005.0 <text:s/>2006.0 <text:s/>2007.0 <text:s/>2008.0 <text:s/>2009.0 <text:s/>2010.0 <text:s/>2011.0 <text:s/>2012.0 <text:s/>2013.0 <text:s/>2014.0 <text:s/>2015.0 <text:s/>2016.0 <text:s/>2017.0 <text:s/>2018.0 <text:s/>2019.0 <text:s/>2020.0 <text:s/>2021.0 <text:s/>2022.0 <text:s/>2023.0 <text:s/>2024.0</text:p>
      <text:p text:style-name="Preformatted_20_Text">Number of institutions(thsd) <text:s text:c="3"/>24.5 <text:s text:c="3"/>24.4 <text:s text:c="3"/>23.8 <text:s text:c="3"/>23.2 <text:s text:c="3"/>22.3 <text:s text:c="3"/>21.4 <text:s text:c="3"/>20.2 <text:s text:c="3"/>18.4 <text:s text:c="3"/>17.6 <text:s text:c="3"/>17.2 <text:s text:c="3"/>16.3 <text:s text:c="3"/>15.7 <text:s text:c="3"/>15.3 <text:s text:c="3"/>15.0 <text:s text:c="3"/>14.9 <text:s text:c="3"/>15.1 <text:s text:c="3"/>15.1 <text:s text:c="3"/>15.3 <text:s text:c="3"/>15.4 <text:s text:c="3"/>15.5 <text:s text:c="3"/>15.6 <text:s text:c="3"/>16.1 <text:s text:c="3"/>16.4 <text:s text:c="3"/>16.7 <text:s text:c="3"/>15.0 <text:s text:c="3"/>14.8 <text:s text:c="3"/>14.9 <text:s text:c="3"/>14.9 <text:s text:c="3"/>14.9 <text:s text:c="3"/>14.8 <text:s text:c="3"/>15.3 <text:s text:c="3"/>15.0 <text:s text:c="3"/>13.9 <text:s text:c="3"/>13.5 <text:s text:c="3"/>12.9</text:p>
      <text:p text:style-name="Preformatted_20_Text">Number of places(thsd) <text:s text:c="7"/>2277.0 <text:s/>2243.0 <text:s/>2216.0 <text:s/>2189.0 <text:s/>2101.0 <text:s/>2014.0 <text:s/>1856.0 <text:s/>1770.0 <text:s/>1638.0 <text:s/>1216.0 <text:s/>1117.0 <text:s/>1077.0 <text:s/>1060.0 <text:s/>1053.0 <text:s/>1040.0 <text:s/>1056.0 <text:s/>1063.0 <text:s/>1084.0 <text:s/>1110.0 <text:s/>1121.0 <text:s/>1136.0 <text:s/>1171.0 <text:s/>1204.0 <text:s/>1236.0 <text:s/>1077.0 <text:s/>1105.0 <text:s/>1125.0 <text:s/>1141.0 <text:s/>1156.0 <text:s/>1155.0 <text:s/>1153.0 <text:s/>1138.0 <text:s/>1047.0 <text:s/>1010.0 <text:s text:c="2"/>961.0</text:p>
      <text:p text:style-name="Preformatted_20_Text">Number of persons(thsd) <text:s text:c="6"/>2428.0 <text:s/>2268.0 <text:s/>2063.0 <text:s/>1918.0 <text:s/>1736.0 <text:s/>1536.0 <text:s/>1342.0 <text:s/>1172.0 <text:s/>1103.0 <text:s/>1055.0 <text:s text:c="2"/>983.0 <text:s text:c="2"/>968.0 <text:s text:c="2"/>973.0 <text:s text:c="2"/>977.0 <text:s text:c="2"/>996.0 <text:s/>1032.0 <text:s/>1081.0 <text:s/>1137.0 <text:s/>1195.0 <text:s/>1214.0 <text:s/>1273.0 <text:s/>1354.0 <text:s/>1428.0 <text:s/>1471.0 <text:s/>1295.0 <text:s/>1291.0 <text:s/>1300.0 <text:s/>1304.0 <text:s/>1278.0 <text:s/>1230.0 <text:s/>1151.0 <text:s/>1111.0 <text:s text:c="2"/>934.0 <text:s text:c="2"/>862.0 <text:s text:c="2"/>781.0</text:p>
      <text:p text:style-name="Preformatted_20_Text">Coverage of children(%) <text:s text:c="8"/>57.0 <text:s text:c="3"/>55.0 <text:s text:c="3"/>51.0 <text:s text:c="3"/>49.0 <text:s text:c="3"/>47.0 <text:s text:c="3"/>44.0 <text:s text:c="3"/>41.0 <text:s text:c="3"/>38.0 <text:s text:c="3"/>38.0 <text:s text:c="3"/>39.0 <text:s text:c="3"/>40.0 <text:s text:c="3"/>41.0 <text:s text:c="3"/>48.0 49.0 <text:s text:c="3"/>50.0 <text:s text:c="3"/>51.0 <text:s text:c="3"/>53.0 <text:s text:c="3"/>54.0 <text:s text:c="3"/>54.0 <text:s text:c="3"/>53.0 <text:s text:c="3"/>53.0 <text:s text:c="3"/>55.0 <text:s text:c="3"/>57.0 <text:s text:c="3"/>61.0 <text:s text:c="3"/>55.0 <text:s text:c="3"/>55.0 <text:s text:c="3"/>57.0 <text:s text:c="3"/>59.0 <text:s text:c="3"/>61.0 <text:s text:c="3"/>63.0 63.0 <text:s text:c="3"/>65.0 <text:s text:c="3"/>53.0 <text:s text:c="3"/>55.0 <text:s text:c="3"/>57.0</text:p>
      <text:p text:style-name="Preformatted_20_Text"/>
      <text:p text:style-name="Preformatted_20_Text"><text:soft-page-break/>########################################################################################################################</text:p>
      <text:p text:style-name="Preformatted_20_Text"><text:s text:c="4"/>Year <text:s/>Number of institutions(thsd) <text:s/>Number of places(thsd) <text:s/>Number of persons(thsd) <text:s/>Coverage of children(%)</text:p>
      <text:p text:style-name="Preformatted_20_Text">34 <text:s/>2024 <text:s text:c="25"/>12.9 <text:s text:c="20"/>961 <text:s text:c="21"/>781 <text:s text:c="22"/>57</text:p>
      <text:p text:style-name="Preformatted_20_Text">33 <text:s/>2023 <text:s text:c="25"/>13.5 <text:s text:c="19"/>1010 <text:s text:c="21"/>862 <text:s text:c="22"/>55</text:p>
      <text:p text:style-name="Preformatted_20_Text">32 <text:s/>2022 <text:s text:c="25"/>13.9 <text:s text:c="19"/>1047 <text:s text:c="21"/>934 <text:s text:c="22"/>53</text:p>
      <text:p text:style-name="Preformatted_20_Text">31 <text:s/>2021 <text:s text:c="25"/>15.0 <text:s text:c="19"/>1138 <text:s text:c="20"/>1111 <text:s text:c="22"/>65</text:p>
      <text:p text:style-name="Preformatted_20_Text">30 <text:s/>2020 <text:s text:c="25"/>15.3 <text:s text:c="19"/>1153 <text:s text:c="20"/>1151 <text:s text:c="22"/>63</text:p>
      <text:p text:style-name="Preformatted_20_Text">29 <text:s/>2019 <text:s text:c="25"/>14.8 <text:s text:c="19"/>1155 <text:s text:c="20"/>1230 <text:s text:c="22"/>63</text:p>
      <text:p text:style-name="Preformatted_20_Text">28 <text:s/>2018 <text:s text:c="25"/>14.9 <text:s text:c="19"/>1156 <text:s text:c="20"/>1278 <text:s text:c="22"/>61</text:p>
      <text:p text:style-name="Preformatted_20_Text">27 <text:s/>2017 <text:s text:c="25"/>14.9 <text:s text:c="19"/>1141 <text:s text:c="20"/>1304 <text:s text:c="22"/>59</text:p>
      <text:p text:style-name="Preformatted_20_Text">26 <text:s/>2016 <text:s text:c="25"/>14.9 <text:s text:c="19"/>1125 <text:s text:c="20"/>1300 <text:s text:c="22"/>57</text:p>
      <text:p text:style-name="Preformatted_20_Text">25 <text:s/>2015 <text:s text:c="25"/>14.8 <text:s text:c="19"/>1105 <text:s text:c="20"/>1291 <text:s text:c="22"/>55</text:p>
      <text:p text:style-name="Preformatted_20_Text">24 <text:s/>2014 <text:s text:c="25"/>15.0 <text:s text:c="19"/>1077 <text:s text:c="20"/>1295 <text:s text:c="22"/>55</text:p>
      <text:p text:style-name="Preformatted_20_Text">23 <text:s/>2013 <text:s text:c="25"/>16.7 <text:s text:c="19"/>1236 <text:s text:c="20"/>1471 <text:s text:c="22"/>61</text:p>
      <text:p text:style-name="Preformatted_20_Text">22 <text:s/>2012 <text:s text:c="25"/>16.4 <text:s text:c="19"/>1204 <text:s text:c="20"/>1428 <text:s text:c="22"/>57</text:p>
      <text:p text:style-name="Preformatted_20_Text">21 <text:s/>2011 <text:s text:c="25"/>16.1 <text:s text:c="19"/>1171 <text:s text:c="20"/>1354 <text:s text:c="22"/>55</text:p>
      <text:p text:style-name="Preformatted_20_Text">20 <text:s/>2010 <text:s text:c="25"/>15.6 <text:s text:c="19"/>1136 <text:s text:c="20"/>1273 <text:s text:c="22"/>53</text:p>
      <text:p text:style-name="Preformatted_20_Text">19 <text:s/>2009 <text:s text:c="25"/>15.5 <text:s text:c="19"/>1121 <text:s text:c="20"/>1214 <text:s text:c="22"/>53</text:p>
      <text:p text:style-name="Preformatted_20_Text">18 <text:s/>2008 <text:s text:c="25"/>15.4 <text:s text:c="19"/>1110 <text:s text:c="20"/>1195 <text:s text:c="22"/>54</text:p>
      <text:p text:style-name="Preformatted_20_Text">17 <text:s/>2007 <text:s text:c="25"/>15.3 <text:s text:c="19"/>1084 <text:s text:c="20"/>1137 <text:s text:c="22"/>54</text:p>
      <text:p text:style-name="Preformatted_20_Text">16 <text:s/>2006 <text:s text:c="25"/>15.1 <text:s text:c="19"/>1063 <text:s text:c="20"/>1081 <text:s text:c="22"/>53</text:p>
      <text:p text:style-name="Preformatted_20_Text">15 <text:s/>2005 <text:s text:c="25"/>15.1 <text:s text:c="19"/>1056 <text:s text:c="20"/>1032 <text:s text:c="22"/>51</text:p>
      <text:p text:style-name="Preformatted_20_Text">14 <text:s/>2004 <text:s text:c="25"/>14.9 <text:s text:c="19"/>1040 <text:s text:c="21"/>996 <text:s text:c="22"/>50</text:p>
      <text:p text:style-name="Preformatted_20_Text">13 <text:s/>2003 <text:s text:c="25"/>15.0 <text:s text:c="19"/>1053 <text:s text:c="21"/>977 <text:s text:c="22"/>49</text:p>
      <text:p text:style-name="Preformatted_20_Text">12 <text:s/>2002 <text:s text:c="25"/>15.3 <text:s text:c="19"/>1060 <text:s text:c="21"/>973 <text:s text:c="22"/>48</text:p>
      <text:p text:style-name="Preformatted_20_Text">11 <text:s/>2001 <text:s text:c="25"/>15.7 <text:s text:c="19"/>1077 <text:s text:c="21"/>968 <text:s text:c="22"/>41</text:p>
      <text:p text:style-name="Preformatted_20_Text">10 <text:s/>2000 <text:s text:c="25"/>16.3 <text:s text:c="19"/>1117 <text:s text:c="21"/>983 <text:s text:c="22"/>40</text:p>
      <text:p text:style-name="Preformatted_20_Text">9 <text:s text:c="2"/>1999 <text:s text:c="25"/>17.2 <text:s text:c="19"/>1216 <text:s text:c="20"/>1055 <text:s text:c="22"/>39</text:p>
      <text:p text:style-name="Preformatted_20_Text">8 <text:s text:c="2"/>1998 <text:s text:c="25"/>17.6 <text:s text:c="19"/>1638 <text:s text:c="20"/>1103 <text:s text:c="22"/>38</text:p>
      <text:p text:style-name="Preformatted_20_Text">7 <text:s text:c="2"/>1997 <text:s text:c="25"/>18.4 <text:s text:c="19"/>1770 <text:s text:c="20"/>1172 <text:s text:c="22"/>38</text:p>
      <text:p text:style-name="Preformatted_20_Text">6 <text:s text:c="2"/>1996 <text:s text:c="25"/>20.2 <text:s text:c="19"/>1856 <text:s text:c="20"/>1342 <text:s text:c="22"/>41</text:p>
      <text:p text:style-name="Preformatted_20_Text">5 <text:s text:c="2"/>1995 <text:s text:c="25"/>21.4 <text:s text:c="19"/>2014 <text:s text:c="20"/>1536 <text:s text:c="22"/>44</text:p>
      <text:p text:style-name="Preformatted_20_Text"><text:soft-page-break/>4 <text:s text:c="2"/>1994 <text:s text:c="25"/>22.3 <text:s text:c="19"/>2101 <text:s text:c="20"/>1736 <text:s text:c="22"/>47</text:p>
      <text:p text:style-name="Preformatted_20_Text">3 <text:s text:c="2"/>1993 <text:s text:c="25"/>23.2 <text:s text:c="19"/>2189 <text:s text:c="20"/>1918 <text:s text:c="22"/>49</text:p>
      <text:p text:style-name="Preformatted_20_Text">2 <text:s text:c="2"/>1992 <text:s text:c="25"/>23.8 <text:s text:c="19"/>2216 <text:s text:c="20"/>2063 <text:s text:c="22"/>51</text:p>
      <text:p text:style-name="Preformatted_20_Text">1 <text:s text:c="2"/>1991 <text:s text:c="25"/>24.4 <text:s text:c="19"/>2243 <text:s text:c="20"/>2268 <text:s text:c="22"/>55</text:p>
      <text:p text:style-name="Preformatted_20_Text">0 <text:s text:c="2"/>1990 <text:s text:c="25"/>24.5 <text:s text:c="19"/>2277 <text:s text:c="20"/>2428 <text:s text:c="22"/>57 </text:p>
      <text:p text:style-name="Preformatted_20_Text"/>
      <text:p text:style-name="Preformatted_20_Text"><text:s text:c="7"/>Year <text:s/>Number of institutions(thsd) <text:s/>Number of places(thsd) <text:s/>Number of persons(thsd) <text:s/>Coverage of children(%)</text:p>
      <text:p text:style-name="Preformatted_20_Text">row9 <text:s text:c="2"/>1998 <text:s text:c="25"/>17.6 <text:s text:c="19"/>1638 <text:s text:c="20"/>1103 <text:s text:c="22"/>38</text:p>
      <text:p text:style-name="Preformatted_20_Text">row8 <text:s text:c="2"/>1997 <text:s text:c="25"/>18.4 <text:s text:c="19"/>1770 <text:s text:c="20"/>1172 <text:s text:c="22"/>38</text:p>
      <text:p text:style-name="Preformatted_20_Text">row7 <text:s text:c="2"/>1996 <text:s text:c="25"/>20.2 <text:s text:c="19"/>1856 <text:s text:c="20"/>1342 <text:s text:c="22"/>41</text:p>
      <text:p text:style-name="Preformatted_20_Text">row6 <text:s text:c="2"/>1995 <text:s text:c="25"/>21.4 <text:s text:c="19"/>2014 <text:s text:c="20"/>1536 <text:s text:c="22"/>44</text:p>
      <text:p text:style-name="Preformatted_20_Text">row5 <text:s text:c="2"/>1994 <text:s text:c="25"/>22.3 <text:s text:c="19"/>2101 <text:s text:c="20"/>1736 <text:s text:c="22"/>47</text:p>
      <text:p text:style-name="Preformatted_20_Text">row4 <text:s text:c="2"/>1993 <text:s text:c="25"/>23.2 <text:s text:c="19"/>2189 <text:s text:c="20"/>1918 <text:s text:c="22"/>49</text:p>
      <text:p text:style-name="Preformatted_20_Text">row35 <text:s/>2024 <text:s text:c="25"/>12.9 <text:s text:c="20"/>961 <text:s text:c="21"/>781 <text:s text:c="22"/>57</text:p>
      <text:p text:style-name="Preformatted_20_Text">row34 <text:s/>2023 <text:s text:c="25"/>13.5 <text:s text:c="19"/>1010 <text:s text:c="21"/>862 <text:s text:c="22"/>55</text:p>
      <text:p text:style-name="Preformatted_20_Text">row33 <text:s/>2022 <text:s text:c="25"/>13.9 <text:s text:c="19"/>1047 <text:s text:c="21"/>934 <text:s text:c="22"/>53</text:p>
      <text:p text:style-name="Preformatted_20_Text">row32 <text:s/>2021 <text:s text:c="25"/>15.0 <text:s text:c="19"/>1138 <text:s text:c="20"/>1111 <text:s text:c="22"/>65</text:p>
      <text:p text:style-name="Preformatted_20_Text">row31 <text:s/>2020 <text:s text:c="25"/>15.3 <text:s text:c="19"/>1153 <text:s text:c="20"/>1151 <text:s text:c="22"/>63</text:p>
      <text:p text:style-name="Preformatted_20_Text">row30 <text:s/>2019 <text:s text:c="25"/>14.8 <text:s text:c="19"/>1155 <text:s text:c="20"/>1230 <text:s text:c="22"/>63</text:p>
      <text:p text:style-name="Preformatted_20_Text">row3 <text:s text:c="2"/>1992 <text:s text:c="25"/>23.8 <text:s text:c="19"/>2216 <text:s text:c="20"/>2063 <text:s text:c="22"/>51</text:p>
      <text:p text:style-name="Preformatted_20_Text">row29 <text:s/>2018 <text:s text:c="25"/>14.9 <text:s text:c="19"/>1156 <text:s text:c="20"/>1278 <text:s text:c="22"/>61</text:p>
      <text:p text:style-name="Preformatted_20_Text">row28 <text:s/>2017 <text:s text:c="25"/>14.9 <text:s text:c="19"/>1141 <text:s text:c="20"/>1304 <text:s text:c="22"/>59</text:p>
      <text:p text:style-name="Preformatted_20_Text">row27 <text:s/>2016 <text:s text:c="25"/>14.9 <text:s text:c="19"/>1125 <text:s text:c="20"/>1300 <text:s text:c="22"/>57</text:p>
      <text:p text:style-name="Preformatted_20_Text">row26 <text:s/>2015 <text:s text:c="25"/>14.8 <text:s text:c="19"/>1105 <text:s text:c="20"/>1291 <text:s text:c="22"/>55</text:p>
      <text:p text:style-name="Preformatted_20_Text">row25 <text:s/>2014 <text:s text:c="25"/>15.0 <text:s text:c="19"/>1077 <text:s text:c="20"/>1295 <text:s text:c="22"/>55</text:p>
      <text:p text:style-name="Preformatted_20_Text">row24 <text:s/>2013 <text:s text:c="25"/>16.7 <text:s text:c="19"/>1236 <text:s text:c="20"/>1471 <text:s text:c="22"/>61</text:p>
      <text:p text:style-name="Preformatted_20_Text">row23 <text:s/>2012 <text:s text:c="25"/>16.4 <text:s text:c="19"/>1204 <text:s text:c="20"/>1428 <text:s text:c="22"/>57</text:p>
      <text:p text:style-name="Preformatted_20_Text">row22 <text:s/>2011 <text:s text:c="25"/>16.1 <text:s text:c="19"/>1171 <text:s text:c="20"/>1354 <text:s text:c="22"/>55</text:p>
      <text:p text:style-name="Preformatted_20_Text">row21 <text:s/>2010 <text:s text:c="25"/>15.6 <text:s text:c="19"/>1136 <text:s text:c="20"/>1273 <text:s text:c="22"/>53</text:p>
      <text:p text:style-name="Preformatted_20_Text">row20 <text:s/>2009 <text:s text:c="25"/>15.5 <text:s text:c="19"/>1121 <text:s text:c="20"/>1214 <text:s text:c="22"/>53</text:p>
      <text:p text:style-name="Preformatted_20_Text">row2 <text:s text:c="2"/>1991 <text:s text:c="25"/>24.4 <text:s text:c="19"/>2243 <text:s text:c="20"/>2268 <text:s text:c="22"/>55</text:p>
      <text:p text:style-name="Preformatted_20_Text">row19 <text:s/>2008 <text:s text:c="25"/>15.4 <text:s text:c="19"/>1110 <text:s text:c="20"/>1195 <text:s text:c="22"/>54</text:p>
      <text:p text:style-name="Preformatted_20_Text">row18 <text:s/>2007 <text:s text:c="25"/>15.3 <text:s text:c="19"/>1084 <text:s text:c="20"/><text:soft-page-break/>1137 <text:s text:c="22"/>54</text:p>
      <text:p text:style-name="Preformatted_20_Text">row17 <text:s/>2006 <text:s text:c="25"/>15.1 <text:s text:c="19"/>1063 <text:s text:c="20"/>1081 <text:s text:c="22"/>53</text:p>
      <text:p text:style-name="Preformatted_20_Text">row16 <text:s/>2005 <text:s text:c="25"/>15.1 <text:s text:c="19"/>1056 <text:s text:c="20"/>1032 <text:s text:c="22"/>51</text:p>
      <text:p text:style-name="Preformatted_20_Text">row15 <text:s/>2004 <text:s text:c="25"/>14.9 <text:s text:c="19"/>1040 <text:s text:c="21"/>996 <text:s text:c="22"/>50</text:p>
      <text:p text:style-name="Preformatted_20_Text">row14 <text:s/>2003 <text:s text:c="25"/>15.0 <text:s text:c="19"/>1053 <text:s text:c="21"/>977 <text:s text:c="22"/>49</text:p>
      <text:p text:style-name="Preformatted_20_Text">row13 <text:s/>2002 <text:s text:c="25"/>15.3 <text:s text:c="19"/>1060 <text:s text:c="21"/>973 <text:s text:c="22"/>48</text:p>
      <text:p text:style-name="Preformatted_20_Text">row12 <text:s/>2001 <text:s text:c="25"/>15.7 <text:s text:c="19"/>1077 <text:s text:c="21"/>968 <text:s text:c="22"/>41</text:p>
      <text:p text:style-name="Preformatted_20_Text">row11 <text:s/>2000 <text:s text:c="25"/>16.3 <text:s text:c="19"/>1117 <text:s text:c="21"/>983 <text:s text:c="22"/>40</text:p>
      <text:p text:style-name="Preformatted_20_Text">row10 <text:s/>1999 <text:s text:c="25"/>17.2 <text:s text:c="19"/>1216 <text:s text:c="20"/>1055 <text:s text:c="22"/>39</text:p>
      <text:p text:style-name="Preformatted_20_Text">row1 <text:s text:c="2"/>1990 <text:s text:c="25"/>24.5 <text:s text:c="19"/>2277 <text:s text:c="20"/>2428 <text:s text:c="22"/>57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<text:s text:c="4"/>Coverage of children(%) <text:s/>Number of institutions(thsd) <text:s/>Number of persons(thsd) <text:s/>Number of places(thsd) <text:s/>Year</text:p>
      <text:p text:style-name="Preformatted_20_Text">0 <text:s text:c="23"/>57 <text:s text:c="25"/>24.5 <text:s text:c="20"/>2428 <text:s text:c="19"/>2277 <text:s/>1990</text:p>
      <text:p text:style-name="Preformatted_20_Text">1 <text:s text:c="23"/>55 <text:s text:c="25"/>24.4 <text:s text:c="20"/>2268 <text:s text:c="19"/>2243 <text:s/>1991</text:p>
      <text:p text:style-name="Preformatted_20_Text">2 <text:s text:c="23"/>51 <text:s text:c="25"/>23.8 <text:s text:c="20"/>2063 <text:s text:c="19"/>2216 <text:s/>1992</text:p>
      <text:p text:style-name="Preformatted_20_Text">3 <text:s text:c="23"/>49 <text:s text:c="25"/>23.2 <text:s text:c="20"/>1918 <text:s text:c="19"/>2189 <text:s/>1993</text:p>
      <text:p text:style-name="Preformatted_20_Text">4 <text:s text:c="23"/>47 <text:s text:c="25"/>22.3 <text:s text:c="20"/>1736 <text:s text:c="19"/>2101 <text:s/>1994</text:p>
      <text:p text:style-name="Preformatted_20_Text">5 <text:s text:c="23"/>44 <text:s text:c="25"/>21.4 <text:s text:c="20"/>1536 <text:s text:c="19"/>2014 <text:s/>1995</text:p>
      <text:p text:style-name="Preformatted_20_Text">6 <text:s text:c="23"/>41 <text:s text:c="25"/>20.2 <text:s text:c="20"/>1342 <text:s text:c="19"/>1856 <text:s/>1996</text:p>
      <text:p text:style-name="Preformatted_20_Text">7 <text:s text:c="23"/>38 <text:s text:c="25"/>18.4 <text:s text:c="20"/>1172 <text:s text:c="19"/>1770 <text:s/>1997</text:p>
      <text:p text:style-name="Preformatted_20_Text">8 <text:s text:c="23"/>38 <text:s text:c="25"/>17.6 <text:s text:c="20"/>1103 <text:s text:c="19"/>1638 <text:s/>1998</text:p>
      <text:p text:style-name="Preformatted_20_Text">9 <text:s text:c="23"/>39 <text:s text:c="25"/>17.2 <text:s text:c="20"/>1055 <text:s text:c="19"/>1216 <text:s/>1999</text:p>
      <text:p text:style-name="Preformatted_20_Text">10 <text:s text:c="22"/>40 <text:s text:c="25"/>16.3 <text:s text:c="21"/>983 <text:s text:c="19"/>1117 <text:s/>2000</text:p>
      <text:p text:style-name="Preformatted_20_Text">11 <text:s text:c="22"/>41 <text:s text:c="25"/>15.7 <text:s text:c="21"/>968 <text:s text:c="19"/>1077 <text:s/>2001</text:p>
      <text:p text:style-name="Preformatted_20_Text">12 <text:s text:c="22"/>48 <text:s text:c="25"/>15.3 <text:s text:c="21"/>973 <text:s text:c="19"/>1060 <text:s/>2002</text:p>
      <text:p text:style-name="Preformatted_20_Text">13 <text:s text:c="22"/>49 <text:s text:c="25"/>15.0 <text:s text:c="21"/>977 <text:s text:c="19"/>1053 <text:s/>2003</text:p>
      <text:p text:style-name="Preformatted_20_Text">14 <text:s text:c="22"/>50 <text:s text:c="25"/>14.9 <text:s text:c="21"/>996 <text:s text:c="19"/>1040 <text:s/>2004</text:p>
      <text:p text:style-name="Preformatted_20_Text">15 <text:s text:c="22"/>51 <text:s text:c="25"/>15.1 <text:s text:c="20"/>1032 <text:s text:c="19"/>1056 <text:s/>2005</text:p>
      <text:p text:style-name="Preformatted_20_Text">16 <text:s text:c="22"/>53 <text:s text:c="25"/>15.1 <text:s text:c="20"/>1081 <text:s text:c="19"/>1063 <text:s/>2006</text:p>
      <text:p text:style-name="Preformatted_20_Text">17 <text:s text:c="22"/>54 <text:s text:c="25"/>15.3 <text:s text:c="20"/>1137 <text:s text:c="19"/>1084 <text:s/>2007</text:p>
      <text:p text:style-name="Preformatted_20_Text">18 <text:s text:c="22"/>54 <text:s text:c="25"/>15.4 <text:s text:c="20"/>1195 <text:s text:c="19"/>1110 <text:s/>2008</text:p>
      <text:p text:style-name="Preformatted_20_Text">19 <text:s text:c="22"/>53 <text:s text:c="25"/>15.5 <text:s text:c="20"/>1214 <text:s text:c="19"/>1121 <text:s/>2009</text:p>
      <text:p text:style-name="Preformatted_20_Text"><text:soft-page-break/>20 <text:s text:c="22"/>53 <text:s text:c="25"/>15.6 <text:s text:c="20"/>1273 <text:s text:c="19"/>1136 <text:s/>2010</text:p>
      <text:p text:style-name="Preformatted_20_Text">21 <text:s text:c="22"/>55 <text:s text:c="25"/>16.1 <text:s text:c="20"/>1354 <text:s text:c="19"/>1171 <text:s/>2011</text:p>
      <text:p text:style-name="Preformatted_20_Text">22 <text:s text:c="22"/>57 <text:s text:c="25"/>16.4 <text:s text:c="20"/>1428 <text:s text:c="19"/>1204 <text:s/>2012</text:p>
      <text:p text:style-name="Preformatted_20_Text">23 <text:s text:c="22"/>61 <text:s text:c="25"/>16.7 <text:s text:c="20"/>1471 <text:s text:c="19"/>1236 <text:s/>2013</text:p>
      <text:p text:style-name="Preformatted_20_Text">24 <text:s text:c="22"/>55 <text:s text:c="25"/>15.0 <text:s text:c="20"/>1295 <text:s text:c="19"/>1077 <text:s/>2014</text:p>
      <text:p text:style-name="Preformatted_20_Text">25 <text:s text:c="22"/>55 <text:s text:c="25"/>14.8 <text:s text:c="20"/>1291 <text:s text:c="19"/>1105 <text:s/>2015</text:p>
      <text:p text:style-name="Preformatted_20_Text">26 <text:s text:c="22"/>57 <text:s text:c="25"/>14.9 <text:s text:c="20"/>1300 <text:s text:c="19"/>1125 <text:s/>2016</text:p>
      <text:p text:style-name="Preformatted_20_Text">27 <text:s text:c="22"/>59 <text:s text:c="25"/>14.9 <text:s text:c="20"/>1304 <text:s text:c="19"/>1141 <text:s/>2017</text:p>
      <text:p text:style-name="Preformatted_20_Text">28 <text:s text:c="22"/>61 <text:s text:c="25"/>14.9 <text:s text:c="20"/>1278 <text:s text:c="19"/>1156 <text:s/>2018</text:p>
      <text:p text:style-name="Preformatted_20_Text">29 <text:s text:c="22"/>63 <text:s text:c="25"/>14.8 <text:s text:c="20"/>1230 <text:s text:c="19"/>1155 <text:s/>2019</text:p>
      <text:p text:style-name="Preformatted_20_Text">30 <text:s text:c="22"/>63 <text:s text:c="25"/>15.3 <text:s text:c="20"/>1151 <text:s text:c="19"/>1153 <text:s/>2020</text:p>
      <text:p text:style-name="Preformatted_20_Text">31 <text:s text:c="22"/>65 <text:s text:c="25"/>15.0 <text:s text:c="20"/>1111 <text:s text:c="19"/>1138 <text:s/>2021</text:p>
      <text:p text:style-name="Preformatted_20_Text">32 <text:s text:c="22"/>53 <text:s text:c="25"/>13.9 <text:s text:c="21"/>934 <text:s text:c="19"/>1047 <text:s/>2022</text:p>
      <text:p text:style-name="Preformatted_20_Text">33 <text:s text:c="22"/>55 <text:s text:c="25"/>13.5 <text:s text:c="21"/>862 <text:s text:c="19"/>1010 <text:s/>2023</text:p>
      <text:p text:style-name="Preformatted_20_Text">34 <text:s text:c="22"/>57 <text:s text:c="25"/>12.9 <text:s text:c="21"/>781 <text:s text:c="20"/>961 <text:s/>2024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<text:s text:c="4"/>Number of persons(thsd) <text:s/>Number of places(thsd) <text:s/>Year <text:s/>Coverage of children(%) <text:s/>Number of institutions(thsd)</text:p>
      <text:p text:style-name="Preformatted_20_Text">0 <text:s text:c="21"/>2428 <text:s text:c="19"/>2277 <text:s/>1990 <text:s text:c="22"/>57 <text:s text:c="25"/>24.5</text:p>
      <text:p text:style-name="Preformatted_20_Text">1 <text:s text:c="21"/>2268 <text:s text:c="19"/>2243 <text:s/>1991 <text:s text:c="22"/>55 <text:s text:c="25"/>24.4</text:p>
      <text:p text:style-name="Preformatted_20_Text">2 <text:s text:c="21"/>2063 <text:s text:c="19"/>2216 <text:s/>1992 <text:s text:c="22"/>51 <text:s text:c="25"/>23.8</text:p>
      <text:p text:style-name="Preformatted_20_Text">3 <text:s text:c="21"/>1918 <text:s text:c="19"/>2189 <text:s/>1993 <text:s text:c="22"/>49 <text:s text:c="25"/>23.2</text:p>
      <text:p text:style-name="Preformatted_20_Text">4 <text:s text:c="21"/>1736 <text:s text:c="19"/>2101 <text:s/>1994 <text:s text:c="22"/>47 <text:s text:c="25"/>22.3</text:p>
      <text:p text:style-name="Preformatted_20_Text">5 <text:s text:c="21"/>1536 <text:s text:c="19"/>2014 <text:s/>1995 <text:s text:c="22"/>44 <text:s text:c="25"/>21.4</text:p>
      <text:p text:style-name="Preformatted_20_Text">6 <text:s text:c="21"/>1342 <text:s text:c="19"/>1856 <text:s/>1996 <text:s text:c="22"/>41 <text:s text:c="25"/>20.2</text:p>
      <text:p text:style-name="Preformatted_20_Text">7 <text:s text:c="21"/>1172 <text:s text:c="19"/>1770 <text:s/>1997 <text:s text:c="22"/>38 <text:s text:c="25"/>18.4</text:p>
      <text:p text:style-name="Preformatted_20_Text">8 <text:s text:c="21"/>1103 <text:s text:c="19"/>1638 <text:s/>1998 <text:s text:c="22"/>38 <text:s text:c="25"/>17.6</text:p>
      <text:p text:style-name="Preformatted_20_Text">9 <text:s text:c="21"/>1055 <text:s text:c="19"/>1216 <text:s/>1999 <text:s text:c="22"/>39 <text:s text:c="25"/>17.2</text:p>
      <text:p text:style-name="Preformatted_20_Text">10 <text:s text:c="21"/>983 <text:s text:c="19"/>1117 <text:s/>2000 <text:s text:c="22"/>40 <text:s text:c="25"/>16.3</text:p>
      <text:p text:style-name="Preformatted_20_Text">11 <text:s text:c="21"/>968 <text:s text:c="19"/>1077 <text:s/>2001 <text:s text:c="22"/>41 <text:s text:c="25"/>15.7</text:p>
      <text:p text:style-name="Preformatted_20_Text">12 <text:s text:c="21"/>973 <text:s text:c="19"/>1060 <text:s/>2002 <text:s text:c="22"/>48 <text:s text:c="25"/>15.3</text:p>
      <text:p text:style-name="Preformatted_20_Text">13 <text:s text:c="21"/>977 <text:s text:c="19"/>1053 <text:s/>2003 <text:s text:c="22"/>49 <text:s text:c="25"/>15.0</text:p>
      <text:p text:style-name="Preformatted_20_Text">14 <text:s text:c="21"/>996 <text:s text:c="19"/>1040 <text:s/>2004 <text:s text:c="22"/><text:soft-page-break/>50 <text:s text:c="25"/>14.9</text:p>
      <text:p text:style-name="Preformatted_20_Text">15 <text:s text:c="20"/>1032 <text:s text:c="19"/>1056 <text:s/>2005 <text:s text:c="22"/>51 <text:s text:c="25"/>15.1</text:p>
      <text:p text:style-name="Preformatted_20_Text">16 <text:s text:c="20"/>1081 <text:s text:c="19"/>1063 <text:s/>2006 <text:s text:c="22"/>53 <text:s text:c="25"/>15.1</text:p>
      <text:p text:style-name="Preformatted_20_Text">17 <text:s text:c="20"/>1137 <text:s text:c="19"/>1084 <text:s/>2007 <text:s text:c="22"/>54 <text:s text:c="25"/>15.3</text:p>
      <text:p text:style-name="Preformatted_20_Text">18 <text:s text:c="20"/>1195 <text:s text:c="19"/>1110 <text:s/>2008 <text:s text:c="22"/>54 <text:s text:c="25"/>15.4</text:p>
      <text:p text:style-name="Preformatted_20_Text">19 <text:s text:c="20"/>1214 <text:s text:c="19"/>1121 <text:s/>2009 <text:s text:c="22"/>53 <text:s text:c="25"/>15.5</text:p>
      <text:p text:style-name="Preformatted_20_Text">20 <text:s text:c="20"/>1273 <text:s text:c="19"/>1136 <text:s/>2010 <text:s text:c="22"/>53 <text:s text:c="25"/>15.6</text:p>
      <text:p text:style-name="Preformatted_20_Text">21 <text:s text:c="20"/>1354 <text:s text:c="19"/>1171 <text:s/>2011 <text:s text:c="22"/>55 <text:s text:c="25"/>16.1</text:p>
      <text:p text:style-name="Preformatted_20_Text">22 <text:s text:c="20"/>1428 <text:s text:c="19"/>1204 <text:s/>2012 <text:s text:c="22"/>57 <text:s text:c="25"/>16.4</text:p>
      <text:p text:style-name="Preformatted_20_Text">23 <text:s text:c="20"/>1471 <text:s text:c="19"/>1236 <text:s/>2013 <text:s text:c="22"/>61 <text:s text:c="25"/>16.7</text:p>
      <text:p text:style-name="Preformatted_20_Text">24 <text:s text:c="20"/>1295 <text:s text:c="19"/>1077 <text:s/>2014 <text:s text:c="22"/>55 <text:s text:c="25"/>15.0</text:p>
      <text:p text:style-name="Preformatted_20_Text">25 <text:s text:c="20"/>1291 <text:s text:c="19"/>1105 <text:s/>2015 <text:s text:c="22"/>55 <text:s text:c="25"/>14.8</text:p>
      <text:p text:style-name="Preformatted_20_Text">26 <text:s text:c="20"/>1300 <text:s text:c="19"/>1125 <text:s/>2016 <text:s text:c="22"/>57 <text:s text:c="25"/>14.9</text:p>
      <text:p text:style-name="Preformatted_20_Text">27 <text:s text:c="20"/>1304 <text:s text:c="19"/>1141 <text:s/>2017 <text:s text:c="22"/>59 <text:s text:c="25"/>14.9</text:p>
      <text:p text:style-name="Preformatted_20_Text">28 <text:s text:c="20"/>1278 <text:s text:c="19"/>1156 <text:s/>2018 <text:s text:c="22"/>61 <text:s text:c="25"/>14.9</text:p>
      <text:p text:style-name="Preformatted_20_Text">29 <text:s text:c="20"/>1230 <text:s text:c="19"/>1155 <text:s/>2019 <text:s text:c="22"/>63 <text:s text:c="25"/>14.8</text:p>
      <text:p text:style-name="Preformatted_20_Text">30 <text:s text:c="20"/>1151 <text:s text:c="19"/>1153 <text:s/>2020 <text:s text:c="22"/>63 <text:s text:c="25"/>15.3</text:p>
      <text:p text:style-name="Preformatted_20_Text">31 <text:s text:c="20"/>1111 <text:s text:c="19"/>1138 <text:s/>2021 <text:s text:c="22"/>65 <text:s text:c="25"/>15.0</text:p>
      <text:p text:style-name="Preformatted_20_Text">32 <text:s text:c="21"/>934 <text:s text:c="19"/>1047 <text:s/>2022 <text:s text:c="22"/>53 <text:s text:c="25"/>13.9</text:p>
      <text:p text:style-name="Preformatted_20_Text">33 <text:s text:c="21"/>862 <text:s text:c="19"/>1010 <text:s/>2023 <text:s text:c="22"/>55 <text:s text:c="25"/>13.5</text:p>
      <text:p text:style-name="Preformatted_20_Text">34 <text:s text:c="21"/>781 <text:s text:c="20"/>961 <text:s/>2024 <text:s text:c="22"/>57 <text:s text:c="25"/>12.9 </text:p>
      <text:p text:style-name="Preformatted_20_Text"/>
      <text:p text:style-name="Preformatted_20_Text">########################################################################################################################</text:p>
      <text:p text:style-name="Preformatted_20_Text"><text:s text:c="3"/>1990 <text:s/>1991 <text:s text:c="3"/>1992</text:p>
      <text:p text:style-name="Preformatted_20_Text">0 <text:s/>26.0 <text:s/>24.0 <text:s/>22.300</text:p>
      <text:p text:style-name="Preformatted_20_Text">1 <text:s/>23.4 <text:s/>22.4 <text:s/>23.454</text:p>
      <text:p text:style-name="Preformatted_20_Text"/>
      <text:p text:style-name="Preformatted_20_Text">6. Прочитав набір даних катастрофи «Титаніка».</text:p>
      <text:p text:style-name="Preformatted_20_Text"/>
      <text:p text:style-name="Preformatted_20_Text">7. Завантажив набір даних катастрофи «Титаніка» за URL-адресою.</text:p>
      <text:p text:style-name="Preformatted_20_Text"/>
      <text:p text:style-name="Preformatted_20_Text">8. Переглянув рядки набору даних катастрофи «Титаніка».</text:p>
      <text:p text:style-name="Preformatted_20_Text"/>
      <text:p text:style-name="Preformatted_20_Text">9. Налаштував назви стовпців</text:p>
      <text:p text:style-name="Preformatted_20_Text">Замін 'Unnamed: 0' на 'name' і скоротіть 'passengerClass' до 'class'</text:p>
      <text:p text:style-name="Preformatted_20_Text"/>
      <text:p text:style-name="Preformatted_20_Text">Код для пунктів 7-9:</text:p>
      <text:p text:style-name="Preformatted_20_Text"/>
      <text:p text:style-name="Preformatted_20_Text">titanic.py:</text:p>
      <text:p text:style-name="Preformatted_20_Text"/>
      <text:p text:style-name="Preformatted_20_Text">import pandas as pd</text:p>
      <text:p text:style-name="Preformatted_20_Text">pd.set_option('display.precision', 2)</text:p>
      <text:p text:style-name="Preformatted_20_Text">pd.set_option('display.max_columns', None)</text:p>
      <text:p text:style-name="Preformatted_20_Text"><text:soft-page-break/>pd.set_option('display.max_rows', None)</text:p>
      <text:p text:style-name="Preformatted_20_Text">pd.set_option('display.width', None)</text:p>
      <text:p text:style-name="Preformatted_20_Text"/>
      <text:p text:style-name="Preformatted_20_Text">#1) Отримати дані</text:p>
      <text:p text:style-name="Preformatted_20_Text">titanic = pd.read_csv('https://vincentarelbundock.github.io/Rdatasets/csv/carData/TitanicSurvival.csv')</text:p>
      <text:p text:style-name="Preformatted_20_Text"/>
      <text:p text:style-name="Preformatted_20_Text">#2) Переглянути перші й останні 5 рядків</text:p>
      <text:p text:style-name="Preformatted_20_Text">#print(titanic.head(),"\n")</text:p>
      <text:p text:style-name="Preformatted_20_Text">#print(titanic.tail(),"\n")</text:p>
      <text:p text:style-name="Preformatted_20_Text"/>
      <text:p text:style-name="Preformatted_20_Text">#3) Перейменувати стовпці</text:p>
      <text:p text:style-name="Preformatted_20_Text">titanic.columns = ["name","survived","sex","age","class"]</text:p>
      <text:p text:style-name="Preformatted_20_Text">#print(titanic.head(),"\n")</text:p>
      <text:p text:style-name="Preformatted_20_Text">#print(titanic.tail(),"\n")</text:p>
      <text:p text:style-name="Preformatted_20_Text"/>
      <text:p text:style-name="Preformatted_20_Text">результат виконання файлу (якщо розкоментувати print`и):</text:p>
      <text:p text:style-name="Preformatted_20_Text"><text:s text:c="26"/>rownames survived <text:s text:c="4"/>sex <text:s text:c="3"/>age passengerClass</text:p>
      <text:p text:style-name="Preformatted_20_Text">0 <text:s text:c="3"/>Allen, Miss. Elisabeth Walton <text:s text:c="5"/>yes <text:s/>female <text:s/>29.00 <text:s text:c="11"/>1st</text:p>
      <text:p text:style-name="Preformatted_20_Text">1 <text:s text:c="2"/>Allison, Master. Hudson Trevor <text:s text:c="5"/>yes <text:s text:c="3"/>male <text:s text:c="2"/>0.92 <text:s text:c="11"/>1st</text:p>
      <text:p text:style-name="Preformatted_20_Text">2 <text:s text:c="4"/>Allison, Miss. Helen Loraine <text:s text:c="6"/>no <text:s/>female <text:s text:c="2"/>2.00 <text:s text:c="11"/>1st</text:p>
      <text:p text:style-name="Preformatted_20_Text">3 <text:s/>Allison, Mr. Hudson Joshua Crei <text:s text:c="6"/>no <text:s text:c="3"/>male <text:s/>30.00 <text:s text:c="11"/>1st</text:p>
      <text:p text:style-name="Preformatted_20_Text">4 <text:s/>Allison, Mrs. Hudson J C (Bessi <text:s text:c="6"/>no <text:s/>female <text:s/>25.00 <text:s text:c="11"/>1st </text:p>
      <text:p text:style-name="Preformatted_20_Text"/>
      <text:p text:style-name="Preformatted_20_Text"><text:s text:c="23"/>rownames survived <text:s text:c="4"/>sex <text:s text:c="2"/>age passengerClass</text:p>
      <text:p text:style-name="Preformatted_20_Text">1304 <text:s text:c="6"/>Zabour, Miss. Hileni <text:s text:c="6"/>no <text:s/>female <text:s/>14.5 <text:s text:c="11"/>3rd</text:p>
      <text:p text:style-name="Preformatted_20_Text">1305 <text:s text:c="5"/>Zabour, Miss. Thamine <text:s text:c="6"/>no <text:s/>female <text:s text:c="2"/>NaN <text:s text:c="11"/>3rd</text:p>
      <text:p text:style-name="Preformatted_20_Text">1306 <text:s/>Zakarian, Mr. Mapriededer <text:s text:c="6"/>no <text:s text:c="3"/>male <text:s/>26.5 <text:s text:c="11"/>3rd</text:p>
      <text:p text:style-name="Preformatted_20_Text">1307 <text:s text:c="7"/>Zakarian, Mr. Ortin <text:s text:c="6"/>no <text:s text:c="3"/>male <text:s/>27.0 <text:s text:c="11"/>3rd</text:p>
      <text:p text:style-name="Preformatted_20_Text">1308 <text:s text:c="8"/>Zimmerman, Mr. Leo <text:s text:c="6"/>no <text:s text:c="3"/>male <text:s/>29.0 <text:s text:c="11"/>3rd </text:p>
      <text:p text:style-name="Preformatted_20_Text"/>
      <text:p text:style-name="Preformatted_20_Text"><text:s text:c="30"/>name survived <text:s text:c="4"/>sex <text:s text:c="3"/>age class</text:p>
      <text:p text:style-name="Preformatted_20_Text">0 <text:s text:c="3"/>Allen, Miss. Elisabeth Walton <text:s text:c="5"/>yes <text:s/>female <text:s/>29.00 <text:s text:c="2"/>1st</text:p>
      <text:p text:style-name="Preformatted_20_Text">1 <text:s text:c="2"/>Allison, Master. Hudson Trevor <text:s text:c="5"/>yes <text:s text:c="3"/>male <text:s text:c="2"/>0.92 <text:s text:c="2"/>1st</text:p>
      <text:p text:style-name="Preformatted_20_Text">2 <text:s text:c="4"/>Allison, Miss. Helen Loraine <text:s text:c="6"/>no <text:s/>female <text:s text:c="2"/>2.00 <text:s text:c="2"/>1st</text:p>
      <text:p text:style-name="Preformatted_20_Text">3 <text:s/>Allison, Mr. Hudson Joshua Crei <text:s text:c="6"/>no <text:s text:c="3"/>male <text:s/>30.00 <text:s text:c="2"/>1st</text:p>
      <text:p text:style-name="Preformatted_20_Text">4 <text:s/>Allison, Mrs. Hudson J C (Bessi <text:s text:c="6"/>no <text:s/>female <text:s/>25.00 <text:s text:c="2"/>1st </text:p>
      <text:p text:style-name="Preformatted_20_Text"/>
      <text:p text:style-name="Preformatted_20_Text"><text:s text:c="27"/>name survived <text:s text:c="4"/>sex <text:s text:c="2"/>age class</text:p>
      <text:p text:style-name="Preformatted_20_Text">1304 <text:s text:c="6"/>Zabour, Miss. Hileni <text:s text:c="6"/>no <text:s/>female <text:s/>14.5 <text:s text:c="2"/>3rd</text:p>
      <text:p text:style-name="Preformatted_20_Text">1305 <text:s text:c="5"/>Zabour, Miss. Thamine <text:s text:c="6"/>no <text:s/>female <text:s text:c="2"/>NaN <text:s text:c="2"/>3rd</text:p>
      <text:p text:style-name="Preformatted_20_Text">1306 <text:s/>Zakarian, Mr. Mapriededer <text:s text:c="6"/>no <text:s text:c="3"/>male <text:s/>26.5 <text:s text:c="2"/>3rd</text:p>
      <text:p text:style-name="Preformatted_20_Text">1307 <text:s text:c="7"/>Zakarian, Mr. Ortin <text:s text:c="6"/>no <text:s text:c="3"/>male <text:s/>27.0 <text:s text:c="2"/>3rd</text:p>
      <text:p text:style-name="Preformatted_20_Text">1308 <text:s text:c="8"/>Zimmerman, Mr. Leo <text:s text:c="6"/>no <text:s text:c="3"/>male <text:s/>29.0 <text:s text:c="2"/>3rd</text:p>
      <text:p text:style-name="Preformatted_20_Text"/>
      <text:p text:style-name="Preformatted_20_Text">10. Проведено простий аналіз даних: визначено наймолодшого</text:p>
      <text:p text:style-name="Preformatted_20_Text">пасажира, найстаршого, який був середній вік пасажирів та статистику по</text:p>
      <text:p text:style-name="Preformatted_20_Text">пасажирам які вижили. Відсортовано всіх жінок з кают 1-го класу, знайдено</text:p>
      <text:p text:style-name="Preformatted_20_Text">наймолодшу та найстаршу серед них, кількість вцілілих.</text:p>
      <text:p text:style-name="Preformatted_20_Text">Для цього було використано наступний код:</text:p>
      <text:p text:style-name="Preformatted_20_Text">analyze.py:</text:p>
      <text:p text:style-name="Preformatted_20_Text">from titanic import titanic</text:p>
      <text:p text:style-name="Preformatted_20_Text"/>
      <text:p text:style-name="Preformatted_20_Text"># наймалолодший пасажир:</text:p>
      <text:p text:style-name="Preformatted_20_Text">print("\n","Наймолодший пасажир:")</text:p>
      <text:p text:style-name="Preformatted_20_Text">youngest_name = titanic.sort_values(by=["age"]).head(1)["name"]</text:p>
      <text:p text:style-name="Preformatted_20_Text">print(youngest_name)</text:p>
      <text:p text:style-name="Preformatted_20_Text"/>
      <text:p text:style-name="Preformatted_20_Text"># найстарший пасажир:</text:p>
      <text:p text:style-name="Preformatted_20_Text">print("\n","Найстарший пасажир:")</text:p>
      <text:p text:style-name="Preformatted_20_Text">oldest_name = titanic.sort_values(by=["age"],na_position='first').tail(1)["name"]</text:p>
      <text:p text:style-name="Preformatted_20_Text">print(oldest_name)</text:p>
      <text:p text:style-name="Preformatted_20_Text"><text:soft-page-break/></text:p>
      <text:p text:style-name="Preformatted_20_Text"># Середній вік</text:p>
      <text:p text:style-name="Preformatted_20_Text">print("\n","Середній вік:")</text:p>
      <text:p text:style-name="Preformatted_20_Text">avg_age = titanic["age"].mean()</text:p>
      <text:p text:style-name="Preformatted_20_Text">print(avg_age)</text:p>
      <text:p text:style-name="Preformatted_20_Text"/>
      <text:p text:style-name="Preformatted_20_Text"># Статистика по тим, що вижили</text:p>
      <text:p text:style-name="Preformatted_20_Text">print("\n","Ті, що вижили:")</text:p>
      <text:p text:style-name="Preformatted_20_Text">print(titanic[titanic["survived"] == "yes"])</text:p>
      <text:p text:style-name="Preformatted_20_Text"/>
      <text:p text:style-name="Preformatted_20_Text"># знайти жінок першого класу, знайти наймолодшу й найстаршу, кількість вцілілих</text:p>
      <text:p text:style-name="Preformatted_20_Text">print("\n","Жінки першого класу:")</text:p>
      <text:p text:style-name="Preformatted_20_Text">fst_class_women = titanic[(titanic["class"] == "1st") &amp; (titanic["sex"] == "female")]</text:p>
      <text:p text:style-name="Preformatted_20_Text">print(fst_class_women)</text:p>
      <text:p text:style-name="Preformatted_20_Text"/>
      <text:p text:style-name="Preformatted_20_Text">print("\n","Наймолодша серед них:")</text:p>
      <text:p text:style-name="Preformatted_20_Text">f_c_women_sorted = fst_class_women[fst_class_women["age"] &gt;= 0].sort_values(by=["age"])</text:p>
      <text:p text:style-name="Preformatted_20_Text">print(f_c_women_sorted.head(1))</text:p>
      <text:p text:style-name="Preformatted_20_Text"/>
      <text:p text:style-name="Preformatted_20_Text">print("\n","Найстарша серед них:")</text:p>
      <text:p text:style-name="Preformatted_20_Text">print(f_c_women_sorted.tail(1))</text:p>
      <text:p text:style-name="Preformatted_20_Text"/>
      <text:p text:style-name="Preformatted_20_Text">print("\n","Кількість вцілілих серед них:")</text:p>
      <text:p text:style-name="Preformatted_20_Text">print(fst_class_women["survived"][fst_class_women["survived"] == "yes"].count())</text:p>
      <text:p text:style-name="Preformatted_20_Text"/>
      <text:p text:style-name="Preformatted_20_Text">Результат аналізу:</text:p>
      <text:p text:style-name="Preformatted_20_Text"/>
      <text:p text:style-name="Preformatted_20_Text"><text:s/>Наймолодший пасажир:</text:p>
      <text:p text:style-name="Preformatted_20_Text">763 <text:s text:c="3"/>Dean, Miss. Elizabeth Gladys M</text:p>
      <text:p text:style-name="Preformatted_20_Text">Name: name, dtype: str</text:p>
      <text:p text:style-name="Preformatted_20_Text"/>
      <text:p text:style-name="Preformatted_20_Text"><text:s/>Найстарший пасажир:</text:p>
      <text:p text:style-name="Preformatted_20_Text">14 <text:s text:c="3"/>Barkworth, Mr. Algernon Henry W</text:p>
      <text:p text:style-name="Preformatted_20_Text">Name: name, dtype: str</text:p>
      <text:p text:style-name="Preformatted_20_Text"/>
      <text:p text:style-name="Preformatted_20_Text"><text:s/>Середній вік:</text:p>
      <text:p text:style-name="Preformatted_20_Text">29.881134512434034</text:p>
      <text:p text:style-name="Preformatted_20_Text"/>
      <text:p text:style-name="Preformatted_20_Text"><text:s/>Ті, що вижили:</text:p>
      <text:p text:style-name="Preformatted_20_Text"><text:s text:c="33"/>name survived <text:s text:c="4"/>sex <text:s text:c="3"/>age class</text:p>
      <text:p text:style-name="Preformatted_20_Text">0 <text:s text:c="6"/>Allen, Miss. Elisabeth Walton <text:s text:c="5"/>yes <text:s/>female <text:s/>29.00 <text:s text:c="2"/>1st</text:p>
      <text:p text:style-name="Preformatted_20_Text">1 <text:s text:c="5"/>Allison, Master. Hudson Trevor <text:s text:c="5"/>yes <text:s text:c="3"/>male <text:s text:c="2"/>0.92 <text:s text:c="2"/>1st</text:p>
      <text:p text:style-name="Preformatted_20_Text">5 <text:s text:c="16"/>Anderson, Mr. Harry <text:s text:c="5"/>yes <text:s text:c="3"/>male <text:s/>48.00 <text:s text:c="2"/>1st</text:p>
      <text:p text:style-name="Preformatted_20_Text">6 <text:s text:c="4"/>Andrews, Miss. Kornelia Theodos <text:s text:c="5"/>yes <text:s/>female <text:s/>63.00 <text:s text:c="2"/>1st</text:p>
      <text:p text:style-name="Preformatted_20_Text">8 <text:s text:c="4"/>Appleton, Mrs. Edward Dale (Cha <text:s text:c="5"/>yes <text:s/>female <text:s/>53.00 <text:s text:c="2"/>1st</text:p>
      <text:p text:style-name="Preformatted_20_Text">11 <text:s text:c="3"/>Astor, Mrs. John Jacob (Madelei <text:s text:c="5"/>yes <text:s/>female <text:s/>18.00 <text:s text:c="2"/>1st</text:p>
      <text:p text:style-name="Preformatted_20_Text">12 <text:s text:c="5"/>Aubart, Mme. Leontine Pauline <text:s text:c="5"/>yes <text:s/>female <text:s/>24.00 <text:s text:c="2"/>1st</text:p>
      <text:p text:style-name="Preformatted_20_Text">13 <text:s text:c="8"/>Barber, Miss. Ellen Nellie <text:s text:c="5"/>yes <text:s/>female <text:s/>26.00 <text:s text:c="2"/>1st</text:p>
      <text:p text:style-name="Preformatted_20_Text">14 <text:s text:c="3"/>Barkworth, Mr. Algernon Henry W <text:s text:c="5"/>yes <text:s text:c="3"/>male <text:s/>80.00 <text:s text:c="2"/>1st</text:p>
      <text:p text:style-name="Preformatted_20_Text">17 <text:s text:c="3"/>Baxter, Mrs. James (Helene DeLa <text:s text:c="5"/>yes <text:s/>female <text:s/>50.00 <text:s text:c="2"/>1st</text:p>
      <text:p text:style-name="Preformatted_20_Text">18 <text:s text:c="13"/>Bazzani, Miss. Albina <text:s text:c="5"/>yes <text:s/>female <text:s/>32.00 <text:s text:c="2"/>1st</text:p>
      <text:p text:style-name="Preformatted_20_Text">20 <text:s text:c="5"/>Beckwith, Mr. Richard Leonard <text:s text:c="5"/>yes <text:s text:c="3"/>male <text:s/>37.00 <text:s text:c="2"/>1st</text:p>
      <text:p text:style-name="Preformatted_20_Text">21 <text:s text:c="4"/>Beckwith, Mrs. Richard Leonard <text:s text:c="5"/>yes <text:s/>female <text:s/>47.00 <text:s text:c="2"/>1st</text:p>
      <text:p text:style-name="Preformatted_20_Text">22 <text:s text:c="13"/>Behr, Mr. Karl Howell <text:s text:c="5"/>yes <text:s text:c="3"/>male <text:s/>26.00 <text:s text:c="2"/>1st</text:p>
      <text:p text:style-name="Preformatted_20_Text">23 <text:s text:c="13"/>Bidois, Miss. Rosalie <text:s text:c="5"/>yes <text:s/>female <text:s/>42.00 <text:s text:c="2"/>1st</text:p>
      <text:p text:style-name="Preformatted_20_Text">24 <text:s text:c="17"/>Bird, Miss. Ellen <text:s text:c="5"/>yes <text:s/>female <text:s/>29.00 <text:s text:c="2"/>1st</text:p>
      <text:p text:style-name="Preformatted_20_Text">26 <text:s text:c="11"/>Bishop, Mr. Dickinson H <text:s text:c="5"/>yes <text:s text:c="3"/>male <text:s/>25.00 <text:s text:c="2"/>1st</text:p>
      <text:p text:style-name="Preformatted_20_Text">27 <text:s text:c="3"/>Bishop, Mrs. Dickinson H (Helen <text:s text:c="5"/>yes <text:s/>female <text:s/>19.00 <text:s text:c="2"/>1st</text:p>
      <text:p text:style-name="Preformatted_20_Text">28 <text:s text:c="12"/>Bissette, Miss. Amelia <text:s text:c="5"/>yes <text:s/>female <text:s/>35.00 <text:s text:c="2"/>1st</text:p>
      <text:p text:style-name="Preformatted_20_Text">29 <text:s text:c="3"/>Bjornstrom-Steffansson, Mr. Mau <text:s text:c="5"/>yes <text:s text:c="3"/>male <text:s/>28.00 <text:s text:c="2"/>1st</text:p>
      <text:p text:style-name="Preformatted_20_Text">31 <text:s text:c="18"/>Blank, Mr. Henry <text:s text:c="5"/>yes <text:s text:c="3"/>male <text:s/>40.00 <text:s text:c="2"/>1st</text:p>
      <text:p text:style-name="Preformatted_20_Text">32 <text:s text:c="11"/>Bonnell, Miss. Caroline <text:s text:c="5"/>yes <text:s/>female <text:s/>30.00 <text:s text:c="2"/>1st</text:p>
      <text:p text:style-name="Preformatted_20_Text"><text:soft-page-break/>33 <text:s text:c="10"/>Bonnell, Miss. Elizabeth <text:s text:c="5"/>yes <text:s/>female <text:s/>58.00 <text:s text:c="2"/>1st</text:p>
      <text:p text:style-name="Preformatted_20_Text">35 <text:s text:c="10"/>Bowen, Miss. Grace Scott <text:s text:c="5"/>yes <text:s/>female <text:s/>45.00 <text:s text:c="2"/>1st</text:p>
      <text:p text:style-name="Preformatted_20_Text">36 <text:s text:c="7"/>Bowerman, Miss. Elsie Edith <text:s text:c="5"/>yes <text:s/>female <text:s/>22.00 <text:s text:c="2"/>1st</text:p>
      <text:p text:style-name="Preformatted_20_Text">37 <text:s text:c="4"/>Bradley, Mr. George (George Ar <text:s text:c="5"/>yes <text:s text:c="3"/>male <text:s text:c="3"/>NaN <text:s text:c="2"/>1st</text:p>
      <text:p text:style-name="Preformatted_20_Text">41 <text:s text:c="3"/>Brown, Mrs. James Joseph (Marga <text:s text:c="5"/>yes <text:s/>female <text:s/>44.00 <text:s text:c="2"/>1st</text:p>
      <text:p text:style-name="Preformatted_20_Text">42 <text:s text:c="3"/>Brown, Mrs. John Murray (Caroli <text:s text:c="5"/>yes <text:s/>female <text:s/>59.00 <text:s text:c="2"/>1st</text:p>
      <text:p text:style-name="Preformatted_20_Text">43 <text:s text:c="3"/>Bucknell, Mrs. William Robert ( <text:s text:c="5"/>yes <text:s/>female <text:s/>60.00 <text:s text:c="2"/>1st</text:p>
      <text:p text:style-name="Preformatted_20_Text">44 <text:s text:c="3"/>Burns, Miss. Elizabeth Margaret <text:s text:c="5"/>yes <text:s/>female <text:s/>41.00 <text:s text:c="2"/>1st</text:p>
      <text:p text:style-name="Preformatted_20_Text">47 <text:s text:c="3"/>Calderhead, Mr. Edward Penningt <text:s text:c="5"/>yes <text:s text:c="3"/>male <text:s/>42.00 <text:s text:c="2"/>1st</text:p>
      <text:p text:style-name="Preformatted_20_Text">48 <text:s text:c="3"/>Candee, Mrs. Edward (Helen Chur <text:s text:c="5"/>yes <text:s/>female <text:s/>53.00 <text:s text:c="2"/>1st</text:p>
      <text:p text:style-name="Preformatted_20_Text">49 <text:s text:c="3"/>Cardeza, Mr. Thomas Drake Marti <text:s text:c="5"/>yes <text:s text:c="3"/>male <text:s/>36.00 <text:s text:c="2"/>1st</text:p>
      <text:p text:style-name="Preformatted_20_Text">50 <text:s text:c="3"/>Cardeza, Mrs. James Warburton M <text:s text:c="5"/>yes <text:s/>female <text:s/>58.00 <text:s text:c="2"/>1st</text:p>
      <text:p text:style-name="Preformatted_20_Text">54 <text:s text:c="3"/>Carter, Master. William Thornto <text:s text:c="5"/>yes <text:s text:c="3"/>male <text:s/>11.00 <text:s text:c="2"/>1st</text:p>
      <text:p text:style-name="Preformatted_20_Text">55 <text:s text:c="9"/>Carter, Miss. Lucile Polk <text:s text:c="5"/>yes <text:s/>female <text:s/>14.00 <text:s text:c="2"/>1st</text:p>
      <text:p text:style-name="Preformatted_20_Text">56 <text:s text:c="8"/>Carter, Mr. William Ernest <text:s text:c="5"/>yes <text:s text:c="3"/>male <text:s/>36.00 <text:s text:c="2"/>1st</text:p>
      <text:p text:style-name="Preformatted_20_Text">57 <text:s text:c="3"/>Carter, Mrs. William Ernest (Lu <text:s text:c="5"/>yes <text:s/>female <text:s/>36.00 <text:s text:c="2"/>1st</text:p>
      <text:p text:style-name="Preformatted_20_Text">59 <text:s text:c="3"/>Cassebeer, Mrs. Henry Arthur Jr <text:s text:c="5"/>yes <text:s/>female <text:s text:c="3"/>NaN <text:s text:c="2"/>1st</text:p>
      <text:p text:style-name="Preformatted_20_Text">61 <text:s text:c="4"/>Cavendish, Mrs. Tyrell William <text:s text:c="5"/>yes <text:s/>female <text:s/>76.00 <text:s text:c="2"/>1st</text:p>
      <text:p text:style-name="Preformatted_20_Text">63 <text:s text:c="3"/>Chaffee, Mrs. Herbert Fuller (C <text:s text:c="5"/>yes <text:s/>female <text:s/>47.00 <text:s text:c="2"/>1st</text:p>
      <text:p text:style-name="Preformatted_20_Text">64 <text:s text:c="5"/>Chambers, Mr. Norman Campbell <text:s text:c="5"/>yes <text:s text:c="3"/>male <text:s/>27.00 <text:s text:c="2"/>1st</text:p>
      <text:p text:style-name="Preformatted_20_Text">65 <text:s text:c="4"/>Chambers, Mrs. Norman Campbell <text:s text:c="5"/>yes <text:s/>female <text:s/>33.00 <text:s text:c="2"/>1st</text:p>
      <text:p text:style-name="Preformatted_20_Text">66 <text:s text:c="7"/>Chaudanson, Miss. Victorine <text:s text:c="5"/>yes <text:s/>female <text:s/>36.00 <text:s text:c="2"/>1st</text:p>
      <text:p text:style-name="Preformatted_20_Text">67 <text:s text:c="14"/>Cherry, Miss. Gladys <text:s text:c="5"/>yes <text:s/>female <text:s/>30.00 <text:s text:c="2"/>1st</text:p>
      <text:p text:style-name="Preformatted_20_Text">68 <text:s text:c="10"/>Chevre, Mr. Paul Romaine <text:s text:c="5"/>yes <text:s text:c="3"/>male <text:s/>45.00 <text:s text:c="2"/>1st</text:p>
      <text:p text:style-name="Preformatted_20_Text">69 <text:s text:c="3"/>Chibnall, Mrs. (Edith Martha Bo <text:s text:c="5"/>yes <text:s/>female <text:s text:c="3"/>NaN <text:s text:c="2"/>1st</text:p>
      <text:p text:style-name="Preformatted_20_Text">72 <text:s text:c="3"/>Clark, Mrs. Walter Miller (Virg <text:s text:c="5"/>yes <text:s/>female <text:s/>26.00 <text:s text:c="2"/>1st</text:p>
      <text:p text:style-name="Preformatted_20_Text">73 <text:s text:c="14"/>Cleaver, Miss. Alice <text:s text:c="5"/>yes <text:s/>female <text:s/>22.00 <text:s text:c="2"/>1st</text:p>
      <text:p text:style-name="Preformatted_20_Text">76 <text:s text:c="7"/>Compton, Miss. Sara Rebecca <text:s text:c="5"/>yes <text:s/>female <text:s/>39.00 <text:s text:c="2"/>1st</text:p>
      <text:p text:style-name="Preformatted_20_Text">78 <text:s text:c="4"/>Compton, Mrs. Alexander Taylor <text:s text:c="5"/>yes <text:s/>female <text:s/>64.00 <text:s text:c="2"/>1st</text:p>
      <text:p text:style-name="Preformatted_20_Text">79 <text:s text:c="3"/>Cornell, Mrs. Robert Clifford ( <text:s text:c="5"/>yes <text:s/>female <text:s/>55.00 <text:s text:c="2"/>1st</text:p>
      <text:p text:style-name="Preformatted_20_Text">82 <text:s text:c="11"/>Crosby, Miss. Harriet R <text:s text:c="5"/>yes <text:s/>female <text:s/>36.00 <text:s text:c="2"/>1st</text:p>
      <text:p text:style-name="Preformatted_20_Text">83 <text:s text:c="3"/>Crosby, Mrs. Edward Gifford (Ca <text:s text:c="5"/>yes <text:s/>female <text:s/>64.00 <text:s text:c="2"/>1st</text:p>
      <text:p text:style-name="Preformatted_20_Text">85 <text:s text:c="3"/>Cumings, Mrs. John Bradley (Flo <text:s text:c="5"/>yes <text:s/>female <text:s/>38.00 <text:s text:c="2"/>1st</text:p>
      <text:p text:style-name="Preformatted_20_Text">86 <text:s text:c="13"/>Daly, Mr. Peter Denis <text:s text:c="5"/>yes <text:s text:c="3"/>male <text:s/>51.00 <text:s text:c="2"/>1st</text:p>
      <text:p text:style-name="Preformatted_20_Text">87 <text:s text:c="7"/>Daniel, Mr. Robert Williams <text:s text:c="5"/>yes <text:s text:c="3"/>male <text:s/>27.00 <text:s text:c="2"/>1st</text:p>
      <text:p text:style-name="Preformatted_20_Text">88 <text:s text:c="14"/>Daniels, Miss. Sarah <text:s text:c="5"/>yes <text:s/>female <text:s/>33.00 <text:s text:c="2"/>1st</text:p>
      <text:p text:style-name="Preformatted_20_Text">90 <text:s text:c="4"/>Davidson, Mrs. Thornton (Orian <text:s text:c="5"/>yes <text:s/>female <text:s/>27.00 <text:s text:c="2"/>1st</text:p>
      <text:p text:style-name="Preformatted_20_Text">91 <text:s text:c="11"/>Dick, Mr. Albert Adrian <text:s text:c="5"/>yes <text:s text:c="3"/>male <text:s/>31.00 <text:s text:c="2"/>1st</text:p>
      <text:p text:style-name="Preformatted_20_Text">92 <text:s text:c="4"/>Dick, Mrs. Albert Adrian (Vera <text:s text:c="5"/>yes <text:s/>female <text:s/>17.00 <text:s text:c="2"/>1st</text:p>
      <text:p text:style-name="Preformatted_20_Text">93 <text:s text:c="13"/>Dodge, Dr. Washington <text:s text:c="5"/>yes <text:s text:c="3"/>male <text:s/>53.00 <text:s text:c="2"/>1st</text:p>
      <text:p text:style-name="Preformatted_20_Text">94 <text:s text:c="9"/>Dodge, Master. Washington <text:s text:c="5"/>yes <text:s text:c="3"/>male <text:s text:c="2"/>4.00 <text:s text:c="2"/>1st</text:p>
      <text:p text:style-name="Preformatted_20_Text">95 <text:s text:c="3"/>Dodge, Mrs. Washington (Ruth Vi <text:s text:c="5"/>yes <text:s/>female <text:s/>54.00 <text:s text:c="2"/>1st</text:p>
      <text:p text:style-name="Preformatted_20_Text">97 <text:s text:c="3"/>Douglas, Mrs. Frederick Charles <text:s text:c="5"/>yes <text:s/>female <text:s/>27.00 <text:s text:c="2"/>1st</text:p>
      <text:p text:style-name="Preformatted_20_Text">98 <text:s text:c="3"/>Douglas, Mrs. Walter Donald (Ma <text:s text:c="5"/>yes <text:s/>female <text:s/>48.00 <text:s text:c="2"/>1st</text:p>
      <text:p text:style-name="Preformatted_20_Text">99 <text:s text:c="3"/>Duff Gordon, Lady. (Lucille Chr <text:s text:c="5"/>yes <text:s/>female <text:s/>48.00 <text:s text:c="2"/>1st</text:p>
      <text:p text:style-name="Preformatted_20_Text">100 <text:s text:c="3"/>Duff Gordon, Sir. Cosmo Edmund <text:s text:c="5"/>yes <text:s text:c="3"/>male <text:s/>49.00 <text:s text:c="2"/>1st</text:p>
      <text:p text:style-name="Preformatted_20_Text">102 <text:s text:c="2"/>Earnshaw, Mrs. Boulton (Olive P <text:s text:c="5"/>yes <text:s/>female <text:s/>23.00 <text:s text:c="2"/>1st</text:p>
      <text:p text:style-name="Preformatted_20_Text">103 <text:s text:c="4"/>Endres, Miss. Caroline Louise <text:s text:c="5"/>yes <text:s/>female <text:s/>38.00 <text:s text:c="2"/>1st</text:p>
      <text:p text:style-name="Preformatted_20_Text">104 <text:s text:c="3"/>Eustis, Miss. Elizabeth Mussey <text:s text:c="5"/>yes <text:s/>female <text:s/>54.00 <text:s text:c="2"/>1st</text:p>
      <text:p text:style-name="Preformatted_20_Text">107 <text:s text:c="2"/>Flegenheim, Mrs. Alfred (Antoin <text:s text:c="5"/>yes <text:s/>female <text:s text:c="3"/>NaN <text:s text:c="2"/>1st</text:p>
      <text:p text:style-name="Preformatted_20_Text">108 <text:s text:c="10"/>Fleming, Miss. Margaret <text:s text:c="5"/>yes <text:s/>female <text:s text:c="3"/>NaN <text:s text:c="2"/>1st</text:p>
      <text:p text:style-name="Preformatted_20_Text">109 <text:s text:c="4"/>Flynn, Mr. John Irwin (Irving <text:s text:c="5"/>yes <text:s text:c="3"/>male <text:s/>36.00 <text:s text:c="2"/>1st</text:p>
      <text:p text:style-name="Preformatted_20_Text">111 <text:s text:c="3"/>Fortune, Miss. Alice Elizabeth <text:s text:c="5"/>yes <text:s/>female <text:s/>24.00 <text:s text:c="2"/>1st</text:p>
      <text:p text:style-name="Preformatted_20_Text">112 <text:s text:c="7"/>Fortune, Miss. Ethel Flora <text:s text:c="5"/>yes <text:s/>female <text:s/>28.00 <text:s text:c="2"/>1st</text:p>
      <text:p text:style-name="Preformatted_20_Text">113 <text:s text:c="7"/>Fortune, Miss. Mabel Helen <text:s text:c="5"/>yes <text:s/>female <text:s/>23.00 <text:s text:c="2"/>1st</text:p>
      <text:p text:style-name="Preformatted_20_Text">116 <text:s text:c="2"/>Fortune, Mrs. Mark (Mary McDoug <text:s text:c="5"/>yes <text:s/>female <text:s/>60.00 <text:s text:c="2"/>1st</text:p>
      <text:p text:style-name="Preformatted_20_Text">117 <text:s text:c="3"/>Francatelli, Miss. Laura Mabel <text:s text:c="5"/>yes <text:s/>female <text:s/>30.00 <text:s text:c="2"/>1st</text:p>
      <text:p text:style-name="Preformatted_20_Text">119 <text:s text:c="4"/>Frauenthal, Dr. Henry William <text:s text:c="5"/>yes <text:s text:c="3"/>male <text:s/>50.00 <text:s text:c="2"/>1st</text:p>
      <text:p text:style-name="Preformatted_20_Text">120 <text:s text:c="5"/>Frauenthal, Mr. Isaac Gerald <text:s text:c="5"/>yes <text:s text:c="3"/>male <text:s/>43.00 <text:s text:c="2"/>1st</text:p>
      <text:p text:style-name="Preformatted_20_Text">121 <text:s text:c="3"/>Frauenthal, Mrs. Henry William <text:s text:c="5"/>yes <text:s/>female <text:s text:c="3"/>NaN <text:s text:c="2"/>1st</text:p>
      <text:p text:style-name="Preformatted_20_Text">122 <text:s text:c="2"/>Frolicher, Miss. Hedwig Margari <text:s text:c="5"/>yes <text:s/>female <text:s/>22.00 <text:s text:c="2"/>1st</text:p>
      <text:p text:style-name="Preformatted_20_Text">123 <text:s text:c="2"/>Frolicher-Stehli, Mr. Maxmillia <text:s text:c="5"/>yes <text:s text:c="3"/>male <text:s/>60.00 <text:s text:c="2"/>1st</text:p>
      <text:p text:style-name="Preformatted_20_Text">124 <text:s text:c="2"/>Frolicher-Stehli, Mrs. Maxmilli <text:s text:c="5"/>yes <text:s/>female <text:s/>48.00 <text:s text:c="2"/>1st</text:p>
      <text:p text:style-name="Preformatted_20_Text">127 <text:s text:c="2"/>Futrelle, Mrs. Jacques Heath (L <text:s text:c="5"/>yes <text:s/>female <text:s/>35.00 <text:s text:c="2"/>1st</text:p>
      <text:p text:style-name="Preformatted_20_Text"><text:soft-page-break/>129 <text:s text:c="13"/>Geiger, Miss. Amalie <text:s text:c="5"/>yes <text:s/>female <text:s/>35.00 <text:s text:c="2"/>1st</text:p>
      <text:p text:style-name="Preformatted_20_Text">130 <text:s text:c="3"/>Gibson, Miss. Dorothy Winifred <text:s text:c="5"/>yes <text:s/>female <text:s/>22.00 <text:s text:c="2"/>1st</text:p>
      <text:p text:style-name="Preformatted_20_Text">131 <text:s text:c="2"/>Gibson, Mrs. Leonard (Pauline C <text:s text:c="5"/>yes <text:s/>female <text:s/>45.00 <text:s text:c="2"/>1st</text:p>
      <text:p text:style-name="Preformatted_20_Text">133 <text:s text:c="9"/>Goldenberg, Mr. Samuel L <text:s text:c="5"/>yes <text:s text:c="3"/>male <text:s/>49.00 <text:s text:c="2"/>1st</text:p>
      <text:p text:style-name="Preformatted_20_Text">134 <text:s text:c="2"/>Goldenberg, Mrs. Samuel L (Edwi <text:s text:c="5"/>yes <text:s/>female <text:s text:c="3"/>NaN <text:s text:c="2"/>1st</text:p>
      <text:p text:style-name="Preformatted_20_Text">136 <text:s text:c="8"/>Gracie, Col. Archibald IV <text:s text:c="5"/>yes <text:s text:c="3"/>male <text:s/>53.00 <text:s text:c="2"/>1st</text:p>
      <text:p text:style-name="Preformatted_20_Text">137 <text:s text:c="5"/>Graham, Miss. Margaret Edith <text:s text:c="5"/>yes <text:s/>female <text:s/>19.00 <text:s text:c="2"/>1st</text:p>
      <text:p text:style-name="Preformatted_20_Text">139 <text:s text:c="2"/>Graham, Mrs. William Thompson ( <text:s text:c="5"/>yes <text:s/>female <text:s/>58.00 <text:s text:c="2"/>1st</text:p>
      <text:p text:style-name="Preformatted_20_Text">140 <text:s text:c="2"/>Greenfield, Mr. William Bertram <text:s text:c="5"/>yes <text:s text:c="3"/>male <text:s/>23.00 <text:s text:c="2"/>1st</text:p>
      <text:p text:style-name="Preformatted_20_Text">141 <text:s text:c="2"/>Greenfield, Mrs. Leo David (Bla <text:s text:c="5"/>yes <text:s/>female <text:s/>45.00 <text:s text:c="2"/>1st</text:p>
      <text:p text:style-name="Preformatted_20_Text">143 <text:s text:c="6"/>Harder, Mr. George Achilles <text:s text:c="5"/>yes <text:s text:c="3"/>male <text:s/>25.00 <text:s text:c="2"/>1st</text:p>
      <text:p text:style-name="Preformatted_20_Text">144 <text:s text:c="2"/>Harder, Mrs. George Achilles (D <text:s text:c="5"/>yes <text:s/>female <text:s/>25.00 <text:s text:c="2"/>1st</text:p>
      <text:p text:style-name="Preformatted_20_Text">145 <text:s text:c="8"/>Harper, Mr. Henry Sleeper <text:s text:c="5"/>yes <text:s text:c="3"/>male <text:s/>48.00 <text:s text:c="2"/>1st</text:p>
      <text:p text:style-name="Preformatted_20_Text">146 <text:s text:c="2"/>Harper, Mrs. Henry Sleeper (Myn <text:s text:c="5"/>yes <text:s/>female <text:s/>49.00 <text:s text:c="2"/>1st</text:p>
      <text:p text:style-name="Preformatted_20_Text">149 <text:s text:c="2"/>Harris, Mrs. Henry Birkhardt (I <text:s text:c="5"/>yes <text:s/>female <text:s/>35.00 <text:s text:c="2"/>1st</text:p>
      <text:p text:style-name="Preformatted_20_Text">151 <text:s text:c="15"/>Hassab, Mr. Hammad <text:s text:c="5"/>yes <text:s text:c="3"/>male <text:s/>27.00 <text:s text:c="2"/>1st</text:p>
      <text:p text:style-name="Preformatted_20_Text">152 <text:s text:c="6"/>Hawksford, Mr. Walter James <text:s text:c="5"/>yes <text:s text:c="3"/>male <text:s text:c="3"/>NaN <text:s text:c="2"/>1st</text:p>
      <text:p text:style-name="Preformatted_20_Text">153 <text:s text:c="3"/>Hays, Miss. Margaret Bechstein <text:s text:c="5"/>yes <text:s/>female <text:s/>24.00 <text:s text:c="2"/>1st</text:p>
      <text:p text:style-name="Preformatted_20_Text">155 <text:s text:c="2"/>Hays, Mrs. Charles Melville (Cl <text:s text:c="5"/>yes <text:s/>female <text:s/>52.00 <text:s text:c="2"/>1st</text:p>
      <text:p text:style-name="Preformatted_20_Text">159 <text:s text:c="5"/>Hippach, Miss. Jean Gertrude <text:s text:c="5"/>yes <text:s/>female <text:s/>16.00 <text:s text:c="2"/>1st</text:p>
      <text:p text:style-name="Preformatted_20_Text">160 <text:s text:c="2"/>Hippach, Mrs. Louis Albert (Ida <text:s text:c="5"/>yes <text:s/>female <text:s/>44.00 <text:s text:c="2"/>1st</text:p>
      <text:p text:style-name="Preformatted_20_Text">161 <text:s text:c="2"/>Hogeboom, Mrs. John C (Anna And <text:s text:c="5"/>yes <text:s/>female <text:s/>51.00 <text:s text:c="2"/>1st</text:p>
      <text:p text:style-name="Preformatted_20_Text">163 <text:s text:c="2"/>Holverson, Mrs. Alexander Oskar <text:s text:c="5"/>yes <text:s/>female <text:s/>35.00 <text:s text:c="2"/>1st</text:p>
      <text:p text:style-name="Preformatted_20_Text">164 <text:s text:c="4"/>Homer, Mr. Harry (Mr E Haven) <text:s text:c="5"/>yes <text:s text:c="3"/>male <text:s/>35.00 <text:s text:c="2"/>1st</text:p>
      <text:p text:style-name="Preformatted_20_Text">165 <text:s text:c="5"/>Hoyt, Mr. Frederick Maxfield <text:s text:c="5"/>yes <text:s text:c="3"/>male <text:s/>38.00 <text:s text:c="2"/>1st</text:p>
      <text:p text:style-name="Preformatted_20_Text">167 <text:s text:c="2"/>Hoyt, Mrs. Frederick Maxfield ( <text:s text:c="5"/>yes <text:s/>female <text:s/>35.00 <text:s text:c="2"/>1st</text:p>
      <text:p text:style-name="Preformatted_20_Text">168 <text:s text:c="14"/>Icard, Miss. Amelie <text:s text:c="5"/>yes <text:s/>female <text:s/>38.00 <text:s text:c="2"/>1st</text:p>
      <text:p text:style-name="Preformatted_20_Text">170 <text:s text:c="10"/>Ismay, Mr. Joseph Bruce <text:s text:c="5"/>yes <text:s text:c="3"/>male <text:s/>49.00 <text:s text:c="2"/>1st</text:p>
      <text:p text:style-name="Preformatted_20_Text">176 <text:s text:c="2"/>Kenyon, Mrs. Frederick R (Mario <text:s text:c="5"/>yes <text:s/>female <text:s text:c="3"/>NaN <text:s text:c="2"/>1st</text:p>
      <text:p text:style-name="Preformatted_20_Text">177 <text:s text:c="5"/>Kimball, Mr. Edwin Nelson Jr <text:s text:c="5"/>yes <text:s text:c="3"/>male <text:s/>42.00 <text:s text:c="2"/>1st</text:p>
      <text:p text:style-name="Preformatted_20_Text">178 <text:s text:c="2"/>Kimball, Mrs. Edwin Nelson Jr ( <text:s text:c="5"/>yes <text:s/>female <text:s/>45.00 <text:s text:c="2"/>1st</text:p>
      <text:p text:style-name="Preformatted_20_Text">180 <text:s text:c="11"/>Kreuchen, Miss. Emilie <text:s text:c="5"/>yes <text:s/>female <text:s/>39.00 <text:s text:c="2"/>1st</text:p>
      <text:p text:style-name="Preformatted_20_Text">181 <text:s text:c="6"/>Leader, Dr. Alice (Farnham) <text:s text:c="5"/>yes <text:s/>female <text:s/>49.00 <text:s text:c="2"/>1st</text:p>
      <text:p text:style-name="Preformatted_20_Text">182 <text:s text:c="14"/>LeRoy, Miss. Bertha <text:s text:c="5"/>yes <text:s/>female <text:s/>30.00 <text:s text:c="2"/>1st</text:p>
      <text:p text:style-name="Preformatted_20_Text">183 <text:s text:c="11"/>Lesurer, Mr. Gustave J <text:s text:c="5"/>yes <text:s text:c="3"/>male <text:s/>35.00 <text:s text:c="2"/>1st</text:p>
      <text:p text:style-name="Preformatted_20_Text">186 <text:s text:c="2"/>Lindstrom, Mrs. Carl Johan (Sig <text:s text:c="5"/>yes <text:s/>female <text:s/>55.00 <text:s text:c="2"/>1st</text:p>
      <text:p text:style-name="Preformatted_20_Text">187 <text:s text:c="8"/>Lines, Miss. Mary Conover <text:s text:c="5"/>yes <text:s/>female <text:s/>16.00 <text:s text:c="2"/>1st</text:p>
      <text:p text:style-name="Preformatted_20_Text">188 <text:s text:c="2"/>Lines, Mrs. Ernest H (Elizabeth <text:s text:c="5"/>yes <text:s/>female <text:s/>51.00 <text:s text:c="2"/>1st</text:p>
      <text:p text:style-name="Preformatted_20_Text">190 <text:s text:c="4"/>Longley, Miss. Gretchen Fiske <text:s text:c="5"/>yes <text:s/>female <text:s/>21.00 <text:s text:c="2"/>1st</text:p>
      <text:p text:style-name="Preformatted_20_Text">192 <text:s text:c="13"/>Lurette, Miss. Elise <text:s text:c="5"/>yes <text:s/>female <text:s/>58.00 <text:s text:c="2"/>1st</text:p>
      <text:p text:style-name="Preformatted_20_Text">193 <text:s text:c="2"/>Madill, Miss. Georgette Alexand <text:s text:c="5"/>yes <text:s/>female <text:s/>15.00 <text:s text:c="2"/>1st</text:p>
      <text:p text:style-name="Preformatted_20_Text">195 <text:s text:c="12"/>Maioni, Miss. Roberta <text:s text:c="5"/>yes <text:s/>female <text:s/>16.00 <text:s text:c="2"/>1st</text:p>
      <text:p text:style-name="Preformatted_20_Text">196 <text:s text:c="13"/>Marechal, Mr. Pierre <text:s text:c="5"/>yes <text:s text:c="3"/>male <text:s text:c="3"/>NaN <text:s text:c="2"/>1st</text:p>
      <text:p text:style-name="Preformatted_20_Text">198 <text:s text:c="2"/>Marvin, Mrs. Daniel Warner (Mar <text:s text:c="5"/>yes <text:s/>female <text:s/>18.00 <text:s text:c="2"/>1st</text:p>
      <text:p text:style-name="Preformatted_20_Text">199 <text:s text:c="3"/>Mayne, Mlle. Berthe Antonine ( <text:s text:c="5"/>yes <text:s/>female <text:s/>24.00 <text:s text:c="2"/>1st</text:p>
      <text:p text:style-name="Preformatted_20_Text">202 <text:s text:c="8"/>McGough, Mr. James Robert <text:s text:c="5"/>yes <text:s text:c="3"/>male <text:s/>36.00 <text:s text:c="2"/>1st</text:p>
      <text:p text:style-name="Preformatted_20_Text">204 <text:s text:c="2"/>Meyer, Mrs. Edgar Joseph (Leila <text:s text:c="5"/>yes <text:s/>female <text:s text:c="3"/>NaN <text:s text:c="2"/>1st</text:p>
      <text:p text:style-name="Preformatted_20_Text">207 <text:s text:c="11"/>Minahan, Miss. Daisy E <text:s text:c="5"/>yes <text:s/>female <text:s/>33.00 <text:s text:c="2"/>1st</text:p>
      <text:p text:style-name="Preformatted_20_Text">208 <text:s text:c="2"/>Minahan, Mrs. William Edward (L <text:s text:c="5"/>yes <text:s/>female <text:s/>37.00 <text:s text:c="2"/>1st</text:p>
      <text:p text:style-name="Preformatted_20_Text">209 <text:s text:c="9"/>Mock, Mr. Philipp Edmund <text:s text:c="5"/>yes <text:s text:c="3"/>male <text:s/>30.00 <text:s text:c="2"/>1st</text:p>
      <text:p text:style-name="Preformatted_20_Text">213 <text:s text:c="10"/>Newell, Miss. Madeleine <text:s text:c="5"/>yes <text:s/>female <text:s/>31.00 <text:s text:c="2"/>1st</text:p>
      <text:p text:style-name="Preformatted_20_Text">214 <text:s text:c="11"/>Newell, Miss. Marjorie <text:s text:c="5"/>yes <text:s/>female <text:s/>23.00 <text:s text:c="2"/>1st</text:p>
      <text:p text:style-name="Preformatted_20_Text">216 <text:s text:c="5"/>Newsom, Miss. Helen Monypeny <text:s text:c="5"/>yes <text:s/>female <text:s/>19.00 <text:s text:c="2"/>1st</text:p>
      <text:p text:style-name="Preformatted_20_Text">218 <text:s text:c="5"/>Oliva y Ocana, Dona. Fermina <text:s text:c="5"/>yes <text:s/>female <text:s/>39.00 <text:s text:c="2"/>1st</text:p>
      <text:p text:style-name="Preformatted_20_Text">219 <text:s text:c="8"/>Omont, Mr. Alfred Fernand <text:s text:c="5"/>yes <text:s text:c="3"/>male <text:s text:c="3"/>NaN <text:s text:c="2"/>1st</text:p>
      <text:p text:style-name="Preformatted_20_Text">220 <text:s text:c="5"/>Ostby, Miss. Helene Ragnhild <text:s text:c="5"/>yes <text:s/>female <text:s/>22.00 <text:s text:c="2"/>1st</text:p>
      <text:p text:style-name="Preformatted_20_Text">227 <text:s text:c="2"/>Pears, Mrs. Thomas (Edith Wearn <text:s text:c="5"/>yes <text:s/>female <text:s/>22.00 <text:s text:c="2"/>1st</text:p>
      <text:p text:style-name="Preformatted_20_Text">229 <text:s text:c="2"/>Penasco y Castellana, Mrs. Vict <text:s text:c="5"/>yes <text:s/>female <text:s/>17.00 <text:s text:c="2"/>1st</text:p>
      <text:p text:style-name="Preformatted_20_Text">230 <text:s text:c="12"/>Perreault, Miss. Anne <text:s text:c="5"/>yes <text:s/>female <text:s/>30.00 <text:s text:c="2"/>1st</text:p>
      <text:p text:style-name="Preformatted_20_Text">231 <text:s text:c="3"/>Peuchen, Major. Arthur Godfrey <text:s text:c="5"/>yes <text:s text:c="3"/>male <text:s/>52.00 <text:s text:c="2"/>1st</text:p>
      <text:p text:style-name="Preformatted_20_Text">233 <text:s text:c="2"/>Potter, Mrs. Thomas Jr (Lily Al <text:s text:c="5"/>yes <text:s/>female <text:s/>56.00 <text:s text:c="2"/>1st</text:p>
      <text:p text:style-name="Preformatted_20_Text">235 <text:s text:c="2"/>Rheims, Mr. George Alexander Lu <text:s text:c="5"/>yes <text:s text:c="3"/>male <text:s text:c="3"/>NaN <text:s text:c="2"/>1st</text:p>
      <text:p text:style-name="Preformatted_20_Text">238 <text:s text:c="2"/>Robert, Mrs. Edward Scott (Elis <text:s text:c="5"/>yes <text:s/>female <text:s/>43.00 <text:s text:c="2"/>1st</text:p>
      <text:p text:style-name="Preformatted_20_Text">240 <text:s text:c="3"/>Romaine, Mr. Charles Hallace ( <text:s text:c="5"/>yes <text:s text:c="3"/>male <text:s/>45.00 <text:s text:c="2"/>1st</text:p>
      <text:p text:style-name="Preformatted_20_Text"><text:soft-page-break/>242 <text:s text:c="4"/>Rosenbaum, Miss. Edith Louise <text:s text:c="5"/>yes <text:s/>female <text:s/>33.00 <text:s text:c="2"/>1st</text:p>
      <text:p text:style-name="Preformatted_20_Text">245 <text:s text:c="3"/>Rothes, the Countess. of (Lucy <text:s text:c="5"/>yes <text:s/>female <text:s/>33.00 <text:s text:c="2"/>1st</text:p>
      <text:p text:style-name="Preformatted_20_Text">247 <text:s text:c="2"/>Rothschild, Mrs. Martin (Elizab <text:s text:c="5"/>yes <text:s/>female <text:s/>54.00 <text:s text:c="2"/>1st</text:p>
      <text:p text:style-name="Preformatted_20_Text">249 <text:s text:c="6"/>Ryerson, Master. John Borie <text:s text:c="5"/>yes <text:s text:c="3"/>male <text:s/>13.00 <text:s text:c="2"/>1st</text:p>
      <text:p text:style-name="Preformatted_20_Text">250 <text:s text:c="7"/>Ryerson, Miss. Emily Borie <text:s text:c="5"/>yes <text:s/>female <text:s/>18.00 <text:s text:c="2"/>1st</text:p>
      <text:p text:style-name="Preformatted_20_Text">251 <text:s text:c="3"/>Ryerson, Miss. Susan Parker Su <text:s text:c="5"/>yes <text:s/>female <text:s/>21.00 <text:s text:c="2"/>1st</text:p>
      <text:p text:style-name="Preformatted_20_Text">253 <text:s text:c="2"/>Ryerson, Mrs. Arthur Larned (Em <text:s text:c="5"/>yes <text:s/>female <text:s/>48.00 <text:s text:c="2"/>1st</text:p>
      <text:p text:style-name="Preformatted_20_Text">254 <text:s text:c="12"/>Saalfeld, Mr. Adolphe <text:s text:c="5"/>yes <text:s text:c="3"/>male <text:s text:c="3"/>NaN <text:s text:c="2"/>1st</text:p>
      <text:p text:style-name="Preformatted_20_Text">255 <text:s text:c="13"/>Sagesser, Mlle. Emma <text:s text:c="5"/>yes <text:s/>female <text:s/>24.00 <text:s text:c="2"/>1st</text:p>
      <text:p text:style-name="Preformatted_20_Text">256 <text:s text:c="11"/>Salomon, Mr. Abraham L <text:s text:c="5"/>yes <text:s text:c="3"/>male <text:s text:c="3"/>NaN <text:s text:c="2"/>1st</text:p>
      <text:p text:style-name="Preformatted_20_Text">257 <text:s text:c="2"/>Schabert, Mrs. Paul (Emma Mock) <text:s text:c="5"/>yes <text:s/>female <text:s/>35.00 <text:s text:c="2"/>1st</text:p>
      <text:p text:style-name="Preformatted_20_Text">258 <text:s text:c="10"/>Serepeca, Miss. Augusta <text:s text:c="5"/>yes <text:s/>female <text:s/>30.00 <text:s text:c="2"/>1st</text:p>
      <text:p text:style-name="Preformatted_20_Text">259 <text:s text:c="6"/>Seward, Mr. Frederic Kimber <text:s text:c="5"/>yes <text:s text:c="3"/>male <text:s/>34.00 <text:s text:c="2"/>1st</text:p>
      <text:p text:style-name="Preformatted_20_Text">260 <text:s text:c="8"/>Shutes, Miss. Elizabeth W <text:s text:c="5"/>yes <text:s/>female <text:s/>40.00 <text:s text:c="2"/>1st</text:p>
      <text:p text:style-name="Preformatted_20_Text">261 <text:s text:c="2"/>Silverthorne, Mr. Spencer Victo <text:s text:c="5"/>yes <text:s text:c="3"/>male <text:s/>35.00 <text:s text:c="2"/>1st</text:p>
      <text:p text:style-name="Preformatted_20_Text">263 <text:s text:c="2"/>Silvey, Mrs. William Baird (Ali <text:s text:c="5"/>yes <text:s/>female <text:s/>39.00 <text:s text:c="2"/>1st</text:p>
      <text:p text:style-name="Preformatted_20_Text">264 <text:s text:c="2"/>Simonius-Blumer, Col. Oberst Al <text:s text:c="5"/>yes <text:s text:c="3"/>male <text:s/>56.00 <text:s text:c="2"/>1st</text:p>
      <text:p text:style-name="Preformatted_20_Text">265 <text:s text:c="5"/>Sloper, Mr. William Thompson <text:s text:c="5"/>yes <text:s text:c="3"/>male <text:s/>28.00 <text:s text:c="2"/>1st</text:p>
      <text:p text:style-name="Preformatted_20_Text">270 <text:s text:c="2"/>Smith, Mrs. Lucien Philip (Mary <text:s text:c="5"/>yes <text:s/>female <text:s/>18.00 <text:s text:c="2"/>1st</text:p>
      <text:p text:style-name="Preformatted_20_Text">271 <text:s text:c="7"/>Snyder, Mr. John Pillsbury <text:s text:c="5"/>yes <text:s text:c="3"/>male <text:s/>24.00 <text:s text:c="2"/>1st</text:p>
      <text:p text:style-name="Preformatted_20_Text">272 <text:s text:c="2"/>Snyder, Mrs. John Pillsbury (Ne <text:s text:c="5"/>yes <text:s/>female <text:s/>23.00 <text:s text:c="2"/>1st</text:p>
      <text:p text:style-name="Preformatted_20_Text">273 <text:s text:c="2"/>Spedden, Master. Robert Douglas <text:s text:c="5"/>yes <text:s text:c="3"/>male <text:s text:c="2"/>6.00 <text:s text:c="2"/>1st</text:p>
      <text:p text:style-name="Preformatted_20_Text">274 <text:s text:c="5"/>Spedden, Mr. Frederic Oakley <text:s text:c="5"/>yes <text:s text:c="3"/>male <text:s/>45.00 <text:s text:c="2"/>1st</text:p>
      <text:p text:style-name="Preformatted_20_Text">275 <text:s text:c="2"/>Spedden, Mrs. Frederic Oakley ( <text:s text:c="5"/>yes <text:s/>female <text:s/>40.00 <text:s text:c="2"/>1st</text:p>
      <text:p text:style-name="Preformatted_20_Text">277 <text:s text:c="3"/>Spencer, Mrs. William Augustus <text:s text:c="5"/>yes <text:s/>female <text:s text:c="3"/>NaN <text:s text:c="2"/>1st</text:p>
      <text:p text:style-name="Preformatted_20_Text">278 <text:s text:c="8"/>Stahelin-Maeglin, Dr. Max <text:s text:c="5"/>yes <text:s text:c="3"/>male <text:s/>32.00 <text:s text:c="2"/>1st</text:p>
      <text:p text:style-name="Preformatted_20_Text">280 <text:s text:c="2"/>Stengel, Mr. Charles Emil Henry <text:s text:c="5"/>yes <text:s text:c="3"/>male <text:s/>54.00 <text:s text:c="2"/>1st</text:p>
      <text:p text:style-name="Preformatted_20_Text">281 <text:s text:c="2"/>Stengel, Mrs. Charles Emil Henr <text:s text:c="5"/>yes <text:s/>female <text:s/>43.00 <text:s text:c="2"/>1st</text:p>
      <text:p text:style-name="Preformatted_20_Text">282 <text:s text:c="2"/>Stephenson, Mrs. Walter Bertram <text:s text:c="5"/>yes <text:s/>female <text:s/>52.00 <text:s text:c="2"/>1st</text:p>
      <text:p text:style-name="Preformatted_20_Text">284 <text:s text:c="2"/>Stone, Mrs. George Nelson (Mart <text:s text:c="5"/>yes <text:s/>female <text:s/>62.00 <text:s text:c="2"/>1st</text:p>
      <text:p text:style-name="Preformatted_20_Text">288 <text:s text:c="2"/>Swift, Mrs. Frederick Joel (Mar <text:s text:c="5"/>yes <text:s/>female <text:s/>48.00 <text:s text:c="2"/>1st</text:p>
      <text:p text:style-name="Preformatted_20_Text">289 <text:s text:c="14"/>Taussig, Miss. Ruth <text:s text:c="5"/>yes <text:s/>female <text:s/>18.00 <text:s text:c="2"/>1st</text:p>
      <text:p text:style-name="Preformatted_20_Text">291 <text:s text:c="2"/>Taussig, Mrs. Emil (Tillie Mand <text:s text:c="5"/>yes <text:s/>female <text:s/>39.00 <text:s text:c="2"/>1st</text:p>
      <text:p text:style-name="Preformatted_20_Text">292 <text:s text:c="9"/>Taylor, Mr. Elmer Zebley <text:s text:c="5"/>yes <text:s text:c="3"/>male <text:s/>48.00 <text:s text:c="2"/>1st</text:p>
      <text:p text:style-name="Preformatted_20_Text">293 <text:s text:c="2"/>Taylor, Mrs. Elmer Zebley (Juli <text:s text:c="5"/>yes <text:s/>female <text:s text:c="3"/>NaN <text:s text:c="2"/>1st</text:p>
      <text:p text:style-name="Preformatted_20_Text">295 <text:s text:c="6"/>Thayer, Mr. John Borland Jr <text:s text:c="5"/>yes <text:s text:c="3"/>male <text:s/>17.00 <text:s text:c="2"/>1st</text:p>
      <text:p text:style-name="Preformatted_20_Text">296 <text:s text:c="2"/>Thayer, Mrs. John Borland (Mari <text:s text:c="5"/>yes <text:s/>female <text:s/>39.00 <text:s text:c="2"/>1st</text:p>
      <text:p text:style-name="Preformatted_20_Text">297 <text:s text:c="3"/>Thorne, Mrs. Gertrude Maybelle <text:s text:c="5"/>yes <text:s/>female <text:s text:c="3"/>NaN <text:s text:c="2"/>1st</text:p>
      <text:p text:style-name="Preformatted_20_Text">298 <text:s text:c="2"/>Tucker, Mr. Gilbert Milligan Jr <text:s text:c="5"/>yes <text:s text:c="3"/>male <text:s/>31.00 <text:s text:c="2"/>1st</text:p>
      <text:p text:style-name="Preformatted_20_Text">302 <text:s text:c="17"/>Ward, Miss. Anna <text:s text:c="5"/>yes <text:s/>female <text:s/>35.00 <text:s text:c="2"/>1st</text:p>
      <text:p text:style-name="Preformatted_20_Text">304 <text:s text:c="2"/>Warren, Mrs. Frank Manley (Anna <text:s text:c="5"/>yes <text:s/>female <text:s/>60.00 <text:s text:c="2"/>1st</text:p>
      <text:p text:style-name="Preformatted_20_Text">308 <text:s text:c="2"/>White, Mrs. John Stuart (Ella H <text:s text:c="5"/>yes <text:s/>female <text:s/>55.00 <text:s text:c="2"/>1st</text:p>
      <text:p text:style-name="Preformatted_20_Text">309 <text:s text:c="9"/>Wick, Miss. Mary Natalie <text:s text:c="5"/>yes <text:s/>female <text:s/>31.00 <text:s text:c="2"/>1st</text:p>
      <text:p text:style-name="Preformatted_20_Text">311 <text:s text:c="2"/>Wick, Mrs. George Dennick (Mary <text:s text:c="5"/>yes <text:s/>female <text:s/>45.00 <text:s text:c="2"/>1st</text:p>
      <text:p text:style-name="Preformatted_20_Text">314 <text:s text:c="2"/>Widener, Mrs. George Dunton (El <text:s text:c="5"/>yes <text:s/>female <text:s/>50.00 <text:s text:c="2"/>1st</text:p>
      <text:p text:style-name="Preformatted_20_Text">315 <text:s text:c="9"/>Willard, Miss. Constance <text:s text:c="5"/>yes <text:s/>female <text:s/>21.00 <text:s text:c="2"/>1st</text:p>
      <text:p text:style-name="Preformatted_20_Text">317 <text:s text:c="2"/>Williams, Mr. Richard Norris II <text:s text:c="5"/>yes <text:s text:c="3"/>male <text:s/>21.00 <text:s text:c="2"/>1st</text:p>
      <text:p text:style-name="Preformatted_20_Text">319 <text:s text:c="8"/>Wilson, Miss. Helen Alice <text:s text:c="5"/>yes <text:s/>female <text:s/>31.00 <text:s text:c="2"/>1st</text:p>
      <text:p text:style-name="Preformatted_20_Text">320 <text:s text:c="16"/>Woolner, Mr. Hugh <text:s text:c="5"/>yes <text:s text:c="3"/>male <text:s text:c="3"/>NaN <text:s text:c="2"/>1st</text:p>
      <text:p text:style-name="Preformatted_20_Text">322 <text:s text:c="9"/>Young, Miss. Marie Grice <text:s text:c="5"/>yes <text:s/>female <text:s/>36.00 <text:s text:c="2"/>1st</text:p>
      <text:p text:style-name="Preformatted_20_Text">324 <text:s text:c="2"/>Abelson, Mrs. Samuel (Hannah Wi <text:s text:c="5"/>yes <text:s/>female <text:s/>28.00 <text:s text:c="2"/>2nd</text:p>
      <text:p text:style-name="Preformatted_20_Text">329 <text:s text:c="2"/>Angle, Mrs. William A (Florence <text:s text:c="5"/>yes <text:s/>female <text:s/>36.00 <text:s text:c="2"/>2nd</text:p>
      <text:p text:style-name="Preformatted_20_Text">333 <text:s text:c="10"/>Ball, Mrs. (Ada E Hall) <text:s text:c="5"/>yes <text:s/>female <text:s/>36.00 <text:s text:c="2"/>2nd</text:p>
      <text:p text:style-name="Preformatted_20_Text">336 <text:s text:c="16"/>Beane, Mr. Edward <text:s text:c="5"/>yes <text:s text:c="3"/>male <text:s/>32.00 <text:s text:c="2"/>2nd</text:p>
      <text:p text:style-name="Preformatted_20_Text">337 <text:s text:c="2"/>Beane, Mrs. Edward (Ethel Clark <text:s text:c="5"/>yes <text:s/>female <text:s/>19.00 <text:s text:c="2"/>2nd</text:p>
      <text:p text:style-name="Preformatted_20_Text">339 <text:s text:c="8"/>Becker, Master. Richard F <text:s text:c="5"/>yes <text:s text:c="3"/>male <text:s text:c="2"/>1.00 <text:s text:c="2"/>2nd</text:p>
      <text:p text:style-name="Preformatted_20_Text">340 <text:s text:c="6"/>Becker, Miss. Marion Louise <text:s text:c="5"/>yes <text:s/>female <text:s text:c="2"/>4.00 <text:s text:c="2"/>2nd</text:p>
      <text:p text:style-name="Preformatted_20_Text">341 <text:s text:c="5"/>Becker, Miss. Ruth Elizabeth <text:s text:c="5"/>yes <text:s/>female <text:s/>12.00 <text:s text:c="2"/>2nd</text:p>
      <text:p text:style-name="Preformatted_20_Text">342 <text:s text:c="2"/>Becker, Mrs. Allen Oliver (Nell <text:s text:c="5"/>yes <text:s/>female <text:s/>36.00 <text:s text:c="2"/>2nd</text:p>
      <text:p text:style-name="Preformatted_20_Text">343 <text:s text:c="12"/>Beesley, Mr. Lawrence <text:s text:c="5"/>yes <text:s text:c="3"/>male <text:s/>34.00 <text:s text:c="2"/>2nd</text:p>
      <text:p text:style-name="Preformatted_20_Text">344 <text:s text:c="10"/>Bentham, Miss. Lilian W <text:s text:c="5"/>yes <text:s/>female <text:s/>19.00 <text:s text:c="2"/>2nd</text:p>
      <text:p text:style-name="Preformatted_20_Text">349 <text:s text:c="6"/>Brown, Miss. Amelia Mildred <text:s text:c="5"/>yes <text:s/>female <text:s/>24.00 <text:s text:c="2"/>2nd</text:p>
      <text:p text:style-name="Preformatted_20_Text">350 <text:s text:c="8"/>Brown, Miss. Edith Eileen <text:s text:c="5"/>yes <text:s/>female <text:s/>15.00 <text:s text:c="2"/>2nd</text:p>
      <text:p text:style-name="Preformatted_20_Text">352 <text:s text:c="2"/>Brown, Mrs. Thomas William Solo <text:s text:c="5"/>yes <text:s/>female <text:s/>40.00 <text:s text:c="2"/>2nd</text:p>
      <text:p text:style-name="Preformatted_20_Text"><text:soft-page-break/>353 <text:s text:c="2"/>Bryhl, Miss. Dagmar Jenny Ingeb <text:s text:c="5"/>yes <text:s/>female <text:s/>20.00 <text:s text:c="2"/>2nd</text:p>
      <text:p text:style-name="Preformatted_20_Text">355 <text:s text:c="17"/>Buss, Miss. Kate <text:s text:c="5"/>yes <text:s/>female <text:s/>36.00 <text:s text:c="2"/>2nd</text:p>
      <text:p text:style-name="Preformatted_20_Text">358 <text:s text:c="9"/>Bystrom, Mrs. (Karolina) <text:s text:c="5"/>yes <text:s/>female <text:s/>42.00 <text:s text:c="2"/>2nd</text:p>
      <text:p text:style-name="Preformatted_20_Text">359 <text:s text:c="4"/>Caldwell, Master. Alden Gates <text:s text:c="5"/>yes <text:s text:c="3"/>male <text:s text:c="2"/>0.83 <text:s text:c="2"/>2nd</text:p>
      <text:p text:style-name="Preformatted_20_Text">360 <text:s text:c="5"/>Caldwell, Mr. Albert Francis <text:s text:c="5"/>yes <text:s text:c="3"/>male <text:s/>26.00 <text:s text:c="2"/>2nd</text:p>
      <text:p text:style-name="Preformatted_20_Text">361 <text:s text:c="2"/>Caldwell, Mrs. Albert Francis ( <text:s text:c="5"/>yes <text:s/>female <text:s/>22.00 <text:s text:c="2"/>2nd</text:p>
      <text:p text:style-name="Preformatted_20_Text">362 <text:s text:c="7"/>Cameron, Miss. Clear Annie <text:s text:c="5"/>yes <text:s/>female <text:s/>35.00 <text:s text:c="2"/>2nd</text:p>
      <text:p text:style-name="Preformatted_20_Text">370 <text:s text:c="6"/>Christy, Miss. Julie Rachel <text:s text:c="5"/>yes <text:s/>female <text:s/>25.00 <text:s text:c="2"/>2nd</text:p>
      <text:p text:style-name="Preformatted_20_Text">371 <text:s text:c="4"/>Christy, Mrs. (Alice Frances) <text:s text:c="5"/>yes <text:s/>female <text:s/>45.00 <text:s text:c="2"/>2nd</text:p>
      <text:p text:style-name="Preformatted_20_Text">373 <text:s text:c="2"/>Clarke, Mrs. Charles V (Ada Mar <text:s text:c="5"/>yes <text:s/>female <text:s/>28.00 <text:s text:c="2"/>2nd</text:p>
      <text:p text:style-name="Preformatted_20_Text">376 <text:s text:c="5"/>Collett, Mr. Sidney C Stuart <text:s text:c="5"/>yes <text:s text:c="3"/>male <text:s/>24.00 <text:s text:c="2"/>2nd</text:p>
      <text:p text:style-name="Preformatted_20_Text">377 <text:s text:c="3"/>Collyer, Miss. Marjorie Lottie <text:s text:c="5"/>yes <text:s/>female <text:s text:c="2"/>8.00 <text:s text:c="2"/>2nd</text:p>
      <text:p text:style-name="Preformatted_20_Text">379 <text:s text:c="2"/>Collyer, Mrs. Harvey (Charlotte <text:s text:c="5"/>yes <text:s/>female <text:s/>31.00 <text:s text:c="2"/>2nd</text:p>
      <text:p text:style-name="Preformatted_20_Text">380 <text:s text:c="7"/>Cook, Mrs. (Selena Rogers) <text:s text:c="5"/>yes <text:s/>female <text:s/>22.00 <text:s text:c="2"/>2nd</text:p>
      <text:p text:style-name="Preformatted_20_Text">385 <text:s text:c="3"/>Davies, Master. John Morgan Jr <text:s text:c="5"/>yes <text:s text:c="3"/>male <text:s text:c="2"/>8.00 <text:s text:c="2"/>2nd</text:p>
      <text:p text:style-name="Preformatted_20_Text">387 <text:s text:c="2"/>Davies, Mrs. John Morgan (Eliza <text:s text:c="5"/>yes <text:s/>female <text:s/>48.00 <text:s text:c="2"/>2nd</text:p>
      <text:p text:style-name="Preformatted_20_Text">388 <text:s text:c="16"/>Davis, Miss. Mary <text:s text:c="5"/>yes <text:s/>female <text:s/>28.00 <text:s text:c="2"/>2nd</text:p>
      <text:p text:style-name="Preformatted_20_Text">392 <text:s text:c="2"/>del Carlo, Mrs. Sebastiano (Arg <text:s text:c="5"/>yes <text:s/>female <text:s/>24.00 <text:s text:c="2"/>2nd</text:p>
      <text:p text:style-name="Preformatted_20_Text">395 <text:s text:c="14"/>Doling, Miss. Elsie <text:s text:c="5"/>yes <text:s/>female <text:s/>18.00 <text:s text:c="2"/>2nd</text:p>
      <text:p text:style-name="Preformatted_20_Text">396 <text:s text:c="3"/>Doling, Mrs. John T (Ada Julia <text:s text:c="5"/>yes <text:s/>female <text:s/>34.00 <text:s text:c="2"/>2nd</text:p>
      <text:p text:style-name="Preformatted_20_Text">398 <text:s text:c="4"/>Drew, Master. Marshall Brines <text:s text:c="5"/>yes <text:s text:c="3"/>male <text:s text:c="2"/>8.00 <text:s text:c="2"/>2nd</text:p>
      <text:p text:style-name="Preformatted_20_Text">400 <text:s text:c="2"/>Drew, Mrs. James Vivian (Lulu T <text:s text:c="5"/>yes <text:s/>female <text:s/>34.00 <text:s text:c="2"/>2nd</text:p>
      <text:p text:style-name="Preformatted_20_Text">401 <text:s text:c="5"/>Duran y More, Miss. Asuncion <text:s text:c="5"/>yes <text:s/>female <text:s/>27.00 <text:s text:c="2"/>2nd</text:p>
      <text:p text:style-name="Preformatted_20_Text">402 <text:s text:c="3"/>Duran y More, Miss. Florentina <text:s text:c="5"/>yes <text:s/>female <text:s/>30.00 <text:s text:c="2"/>2nd</text:p>
      <text:p text:style-name="Preformatted_20_Text">407 <text:s text:c="2"/>Faunthorpe, Mrs. Lizzie (Elizab <text:s text:c="5"/>yes <text:s/>female <text:s/>29.00 <text:s text:c="2"/>2nd</text:p>
      <text:p text:style-name="Preformatted_20_Text">415 <text:s text:c="13"/>Garside, Miss. Ethel <text:s text:c="5"/>yes <text:s/>female <text:s/>34.00 <text:s text:c="2"/>2nd</text:p>
      <text:p text:style-name="Preformatted_20_Text">427 <text:s text:c="8"/>Hamalainen, Master. Viljo <text:s text:c="5"/>yes <text:s text:c="3"/>male <text:s text:c="2"/>0.67 <text:s text:c="2"/>2nd</text:p>
      <text:p text:style-name="Preformatted_20_Text">428 <text:s text:c="2"/>Hamalainen, Mrs. William (Anna) <text:s text:c="5"/>yes <text:s/>female <text:s/>24.00 <text:s text:c="2"/>2nd</text:p>
      <text:p text:style-name="Preformatted_20_Text">430 <text:s text:c="3"/>Harper, Miss. Annie Jessie Nin <text:s text:c="5"/>yes <text:s/>female <text:s text:c="2"/>6.00 <text:s text:c="2"/>2nd</text:p>
      <text:p text:style-name="Preformatted_20_Text">432 <text:s text:c="15"/>Harris, Mr. George <text:s text:c="5"/>yes <text:s text:c="3"/>male <text:s/>62.00 <text:s text:c="2"/>2nd</text:p>
      <text:p text:style-name="Preformatted_20_Text">434 <text:s text:c="11"/>Hart, Miss. Eva Miriam <text:s text:c="5"/>yes <text:s/>female <text:s text:c="2"/>7.00 <text:s text:c="2"/>2nd</text:p>
      <text:p text:style-name="Preformatted_20_Text">436 <text:s text:c="2"/>Hart, Mrs. Benjamin (Esther Ada <text:s text:c="5"/>yes <text:s/>female <text:s/>45.00 <text:s text:c="2"/>2nd</text:p>
      <text:p text:style-name="Preformatted_20_Text">437 <text:s text:c="14"/>Herman, Miss. Alice <text:s text:c="5"/>yes <text:s/>female <text:s/>24.00 <text:s text:c="2"/>2nd</text:p>
      <text:p text:style-name="Preformatted_20_Text">438 <text:s text:c="15"/>Herman, Miss. Kate <text:s text:c="5"/>yes <text:s/>female <text:s/>24.00 <text:s text:c="2"/>2nd</text:p>
      <text:p text:style-name="Preformatted_20_Text">440 <text:s text:c="2"/>Herman, Mrs. Samuel (Jane Laver <text:s text:c="5"/>yes <text:s/>female <text:s/>48.00 <text:s text:c="2"/>2nd</text:p>
      <text:p text:style-name="Preformatted_20_Text">441 <text:s text:c="2"/>Hewlett, Mrs. (Mary D Kingcome) <text:s text:c="5"/>yes <text:s/>female <text:s/>55.00 <text:s text:c="2"/>2nd</text:p>
      <text:p text:style-name="Preformatted_20_Text">446 <text:s text:c="6"/>Hocking, Miss. Ellen Nellie <text:s text:c="5"/>yes <text:s/>female <text:s/>20.00 <text:s text:c="2"/>2nd</text:p>
      <text:p text:style-name="Preformatted_20_Text">449 <text:s text:c="3"/>Hocking, Mrs. Elizabeth (Eliza <text:s text:c="5"/>yes <text:s/>female <text:s/>54.00 <text:s text:c="2"/>2nd</text:p>
      <text:p text:style-name="Preformatted_20_Text">452 <text:s text:c="2"/>Hold, Mrs. Stephen (Annie Marga <text:s text:c="5"/>yes <text:s/>female <text:s/>29.00 <text:s text:c="2"/>2nd</text:p>
      <text:p text:style-name="Preformatted_20_Text">454 <text:s text:c="13"/>Hosono, Mr. Masabumi <text:s text:c="5"/>yes <text:s text:c="3"/>male <text:s/>42.00 <text:s text:c="2"/>2nd</text:p>
      <text:p text:style-name="Preformatted_20_Text">458 <text:s text:c="14"/>Ilett, Miss. Bertha <text:s text:c="5"/>yes <text:s/>female <text:s/>17.00 <text:s text:c="2"/>2nd</text:p>
      <text:p text:style-name="Preformatted_20_Text">460 <text:s text:c="2"/>Jacobsohn, Mrs. Sidney Samuel ( <text:s text:c="5"/>yes <text:s/>female <text:s/>24.00 <text:s text:c="2"/>2nd</text:p>
      <text:p text:style-name="Preformatted_20_Text">465 <text:s text:c="2"/>Jerwan, Mrs. Amin S (Marie Mart <text:s text:c="5"/>yes <text:s/>female <text:s/>23.00 <text:s text:c="2"/>2nd</text:p>
      <text:p text:style-name="Preformatted_20_Text">467 <text:s text:c="2"/>Kantor, Mrs. Sinai (Miriam Ster <text:s text:c="5"/>yes <text:s/>female <text:s/>24.00 <text:s text:c="2"/>2nd</text:p>
      <text:p text:style-name="Preformatted_20_Text">469 <text:s text:c="14"/>Keane, Miss. Nora A <text:s text:c="5"/>yes <text:s/>female <text:s text:c="3"/>NaN <text:s text:c="2"/>2nd</text:p>
      <text:p text:style-name="Preformatted_20_Text">471 <text:s text:c="6"/>Kelly, Mrs. Florence Fannie <text:s text:c="5"/>yes <text:s/>female <text:s/>45.00 <text:s text:c="2"/>2nd</text:p>
      <text:p text:style-name="Preformatted_20_Text">478 <text:s text:c="12"/>Laroche, Miss. Louise <text:s text:c="5"/>yes <text:s/>female <text:s text:c="2"/>1.00 <text:s text:c="2"/>2nd</text:p>
      <text:p text:style-name="Preformatted_20_Text">479 <text:s text:c="2"/>Laroche, Miss. Simonne Marie An <text:s text:c="5"/>yes <text:s/>female <text:s text:c="2"/>3.00 <text:s text:c="2"/>2nd</text:p>
      <text:p text:style-name="Preformatted_20_Text">481 <text:s text:c="3"/>Laroche, Mrs. Joseph (Juliette <text:s text:c="5"/>yes <text:s/>female <text:s/>22.00 <text:s text:c="2"/>2nd</text:p>
      <text:p text:style-name="Preformatted_20_Text">482 <text:s text:c="12"/>Lehmann, Miss. Bertha <text:s text:c="5"/>yes <text:s/>female <text:s/>17.00 <text:s text:c="2"/>2nd</text:p>
      <text:p text:style-name="Preformatted_20_Text">483 <text:s text:c="7"/>Leitch, Miss. Jessie Wills <text:s text:c="5"/>yes <text:s/>female <text:s text:c="3"/>NaN <text:s text:c="2"/>2nd</text:p>
      <text:p text:style-name="Preformatted_20_Text">484 <text:s text:c="5"/>Lemore, Mrs. (Amelia Milley) <text:s text:c="5"/>yes <text:s/>female <text:s/>34.00 <text:s text:c="2"/>2nd</text:p>
      <text:p text:style-name="Preformatted_20_Text">489 <text:s text:c="2"/>Louch, Mrs. Charles Alexander ( <text:s text:c="5"/>yes <text:s/>female <text:s/>42.00 <text:s text:c="2"/>2nd</text:p>
      <text:p text:style-name="Preformatted_20_Text">492 <text:s text:c="12"/>Mallet, Master. Andre <text:s text:c="5"/>yes <text:s text:c="3"/>male <text:s text:c="2"/>1.00 <text:s text:c="2"/>2nd</text:p>
      <text:p text:style-name="Preformatted_20_Text">494 <text:s text:c="2"/>Mallet, Mrs. Albert (Antoinette <text:s text:c="5"/>yes <text:s/>female <text:s/>24.00 <text:s text:c="2"/>2nd</text:p>
      <text:p text:style-name="Preformatted_20_Text">501 <text:s text:c="2"/>Mellinger, Miss. Madeleine Viol <text:s text:c="5"/>yes <text:s/>female <text:s/>13.00 <text:s text:c="2"/>2nd</text:p>
      <text:p text:style-name="Preformatted_20_Text">502 <text:s text:c="2"/>Mellinger, Mrs. (Elizabeth Anne <text:s text:c="5"/>yes <text:s/>female <text:s/>41.00 <text:s text:c="2"/>2nd</text:p>
      <text:p text:style-name="Preformatted_20_Text">503 <text:s text:c="8"/>Mellors, Mr. William John <text:s text:c="5"/>yes <text:s text:c="3"/>male <text:s/>19.00 <text:s text:c="2"/>2nd</text:p>
      <text:p text:style-name="Preformatted_20_Text">513 <text:s text:c="2"/>Nasser, Mrs. Nicholas (Adele Ac <text:s text:c="5"/>yes <text:s/>female <text:s/>14.00 <text:s text:c="2"/>2nd</text:p>
      <text:p text:style-name="Preformatted_20_Text">514 <text:s text:c="3"/>Navratil, Master. Edmond Roger <text:s text:c="5"/>yes <text:s text:c="3"/>male <text:s text:c="2"/>2.00 <text:s text:c="2"/>2nd</text:p>
      <text:p text:style-name="Preformatted_20_Text">515 <text:s text:c="7"/>Navratil, Master. Michel M <text:s text:c="5"/>yes <text:s text:c="3"/>male <text:s text:c="2"/>3.00 <text:s text:c="2"/>2nd</text:p>
      <text:p text:style-name="Preformatted_20_Text">520 <text:s text:c="3"/>Nourney, Mr. Alfred (Baron von <text:s text:c="5"/>yes <text:s text:c="3"/>male <text:s/>20.00 <text:s text:c="2"/>2nd</text:p>
      <text:p text:style-name="Preformatted_20_Text">521 <text:s text:c="5"/>Nye, Mrs. (Elizabeth Ramell) <text:s text:c="5"/>yes <text:s/>female <text:s/>29.00 <text:s text:c="2"/>2nd</text:p>
      <text:p text:style-name="Preformatted_20_Text">523 <text:s text:c="8"/>Oxenham, Mr. Percy Thomas <text:s text:c="5"/>yes <text:s text:c="3"/>male <text:s/>22.00 <text:s text:c="2"/>2nd</text:p>
      <text:p text:style-name="Preformatted_20_Text"><text:soft-page-break/>524 <text:s text:c="7"/>Padro y Manent, Mr. Julian <text:s text:c="5"/>yes <text:s text:c="3"/>male <text:s text:c="3"/>NaN <text:s text:c="2"/>2nd</text:p>
      <text:p text:style-name="Preformatted_20_Text">526 <text:s text:c="4"/>Pallas y Castello, Mr. Emilio <text:s text:c="5"/>yes <text:s text:c="3"/>male <text:s/>29.00 <text:s text:c="2"/>2nd</text:p>
      <text:p text:style-name="Preformatted_20_Text">529 <text:s text:c="6"/>Parrish, Mrs. (Lutie Davis) <text:s text:c="5"/>yes <text:s/>female <text:s/>50.00 <text:s text:c="2"/>2nd</text:p>
      <text:p text:style-name="Preformatted_20_Text">533 <text:s text:c="2"/>Phillips, Miss. Alice Frances L <text:s text:c="5"/>yes <text:s/>female <text:s/>21.00 <text:s text:c="2"/>2nd</text:p>
      <text:p text:style-name="Preformatted_20_Text">534 <text:s text:c="2"/>Phillips, Miss. Kate Florence ( <text:s text:c="5"/>yes <text:s/>female <text:s/>19.00 <text:s text:c="2"/>2nd</text:p>
      <text:p text:style-name="Preformatted_20_Text">536 <text:s text:c="14"/>Pinsky, Mrs. (Rosa) <text:s text:c="5"/>yes <text:s/>female <text:s/>32.00 <text:s text:c="2"/>2nd</text:p>
      <text:p text:style-name="Preformatted_20_Text">538 <text:s text:c="2"/>Portaluppi, Mr. Emilio Ilario G <text:s text:c="5"/>yes <text:s text:c="3"/>male <text:s/>30.00 <text:s text:c="2"/>2nd</text:p>
      <text:p text:style-name="Preformatted_20_Text">540 <text:s text:c="9"/>Quick, Miss. Phyllis May <text:s text:c="5"/>yes <text:s/>female <text:s text:c="2"/>2.00 <text:s text:c="2"/>2nd</text:p>
      <text:p text:style-name="Preformatted_20_Text">541 <text:s text:c="7"/>Quick, Miss. Winifred Vera <text:s text:c="5"/>yes <text:s/>female <text:s text:c="2"/>8.00 <text:s text:c="2"/>2nd</text:p>
      <text:p text:style-name="Preformatted_20_Text">542 <text:s text:c="2"/>Quick, Mrs. Frederick Charles ( <text:s text:c="5"/>yes <text:s/>female <text:s/>33.00 <text:s text:c="2"/>2nd</text:p>
      <text:p text:style-name="Preformatted_20_Text">545 <text:s text:c="2"/>Renouf, Mrs. Peter Henry (Lilli <text:s text:c="5"/>yes <text:s/>female <text:s/>30.00 <text:s text:c="2"/>2nd</text:p>
      <text:p text:style-name="Preformatted_20_Text">546 <text:s text:c="8"/>Reynaldo, Ms. Encarnacion <text:s text:c="5"/>yes <text:s/>female <text:s/>28.00 <text:s text:c="2"/>2nd</text:p>
      <text:p text:style-name="Preformatted_20_Text">548 <text:s text:c="2"/>Richards, Master. George Sibley <text:s text:c="5"/>yes <text:s text:c="3"/>male <text:s text:c="2"/>0.83 <text:s text:c="2"/>2nd</text:p>
      <text:p text:style-name="Preformatted_20_Text">549 <text:s text:c="3"/>Richards, Master. William Rowe <text:s text:c="5"/>yes <text:s text:c="3"/>male <text:s text:c="2"/>3.00 <text:s text:c="2"/>2nd</text:p>
      <text:p text:style-name="Preformatted_20_Text">550 <text:s text:c="2"/>Richards, Mrs. Sidney (Emily Ho <text:s text:c="5"/>yes <text:s/>female <text:s/>24.00 <text:s text:c="2"/>2nd</text:p>
      <text:p text:style-name="Preformatted_20_Text">551 <text:s text:c="13"/>Ridsdale, Miss. Lucy <text:s text:c="5"/>yes <text:s/>female <text:s/>50.00 <text:s text:c="2"/>2nd</text:p>
      <text:p text:style-name="Preformatted_20_Text">553 <text:s text:c="16"/>Rugg, Miss. Emily <text:s text:c="5"/>yes <text:s/>female <text:s/>21.00 <text:s text:c="2"/>2nd</text:p>
      <text:p text:style-name="Preformatted_20_Text">557 <text:s text:c="3"/>Shelley, Mrs. William (Imanita <text:s text:c="5"/>yes <text:s/>female <text:s/>25.00 <text:s text:c="2"/>2nd</text:p>
      <text:p text:style-name="Preformatted_20_Text">558 <text:s text:c="4"/>Silven, Miss. Lyyli Karoliina <text:s text:c="5"/>yes <text:s/>female <text:s/>18.00 <text:s text:c="2"/>2nd</text:p>
      <text:p text:style-name="Preformatted_20_Text">559 <text:s text:c="13"/>Sincock, Miss. Maude <text:s text:c="5"/>yes <text:s/>female <text:s/>20.00 <text:s text:c="2"/>2nd</text:p>
      <text:p text:style-name="Preformatted_20_Text">560 <text:s text:c="12"/>Sinkkonen, Miss. Anna <text:s text:c="5"/>yes <text:s/>female <text:s/>30.00 <text:s text:c="2"/>2nd</text:p>
      <text:p text:style-name="Preformatted_20_Text">562 <text:s text:c="8"/>Slayter, Miss. Hilda Mary <text:s text:c="5"/>yes <text:s/>female <text:s/>30.00 <text:s text:c="2"/>2nd</text:p>
      <text:p text:style-name="Preformatted_20_Text">564 <text:s text:c="8"/>Smith, Miss. Marion Elsie <text:s text:c="5"/>yes <text:s/>female <text:s/>40.00 <text:s text:c="2"/>2nd</text:p>
      <text:p text:style-name="Preformatted_20_Text">570 <text:s text:c="14"/>Toomey, Miss. Ellen <text:s text:c="5"/>yes <text:s/>female <text:s/>50.00 <text:s text:c="2"/>2nd</text:p>
      <text:p text:style-name="Preformatted_20_Text">572 <text:s text:c="2"/>Trout, Mrs. William H (Jessie L <text:s text:c="5"/>yes <text:s/>female <text:s/>28.00 <text:s text:c="2"/>2nd</text:p>
      <text:p text:style-name="Preformatted_20_Text">573 <text:s text:c="3"/>Troutt, Miss. Edwina Celia Win <text:s text:c="5"/>yes <text:s/>female <text:s/>27.00 <text:s text:c="2"/>2nd</text:p>
      <text:p text:style-name="Preformatted_20_Text">577 <text:s text:c="11"/>Walcroft, Miss. Nellie <text:s text:c="5"/>yes <text:s/>female <text:s/>31.00 <text:s text:c="2"/>2nd</text:p>
      <text:p text:style-name="Preformatted_20_Text">580 <text:s text:c="2"/>Ware, Mrs. John James (Florence <text:s text:c="5"/>yes <text:s/>female <text:s/>31.00 <text:s text:c="2"/>2nd</text:p>
      <text:p text:style-name="Preformatted_20_Text">582 <text:s text:c="13"/>Watt, Miss. Bertha J <text:s text:c="5"/>yes <text:s/>female <text:s/>12.00 <text:s text:c="2"/>2nd</text:p>
      <text:p text:style-name="Preformatted_20_Text">583 <text:s text:c="3"/>Watt, Mrs. James (Elizabeth Be <text:s text:c="5"/>yes <text:s/>female <text:s/>40.00 <text:s text:c="2"/>2nd</text:p>
      <text:p text:style-name="Preformatted_20_Text">584 <text:s text:c="14"/>Webber, Miss. Susan <text:s text:c="5"/>yes <text:s/>female <text:s/>32.50 <text:s text:c="2"/>2nd</text:p>
      <text:p text:style-name="Preformatted_20_Text">586 <text:s text:c="2"/>Weisz, Mrs. Leopold (Mathilde F <text:s text:c="5"/>yes <text:s/>female <text:s/>29.00 <text:s text:c="2"/>2nd</text:p>
      <text:p text:style-name="Preformatted_20_Text">587 <text:s text:c="6"/>Wells, Master. Ralph Lester <text:s text:c="5"/>yes <text:s text:c="3"/>male <text:s text:c="2"/>2.00 <text:s text:c="2"/>2nd</text:p>
      <text:p text:style-name="Preformatted_20_Text">588 <text:s text:c="16"/>Wells, Miss. Joan <text:s text:c="5"/>yes <text:s/>female <text:s text:c="2"/>4.00 <text:s text:c="2"/>2nd</text:p>
      <text:p text:style-name="Preformatted_20_Text">589 <text:s text:c="3"/>Wells, Mrs. Arthur Henry (Addi <text:s text:c="5"/>yes <text:s/>female <text:s/>29.00 <text:s text:c="2"/>2nd</text:p>
      <text:p text:style-name="Preformatted_20_Text">590 <text:s text:c="12"/>West, Miss. Barbara J <text:s text:c="5"/>yes <text:s/>female <text:s text:c="2"/>0.92 <text:s text:c="2"/>2nd</text:p>
      <text:p text:style-name="Preformatted_20_Text">591 <text:s text:c="5"/>West, Miss. Constance Mirium <text:s text:c="5"/>yes <text:s/>female <text:s text:c="2"/>5.00 <text:s text:c="2"/>2nd</text:p>
      <text:p text:style-name="Preformatted_20_Text">593 <text:s text:c="2"/>West, Mrs. Edwy Arthur (Ada Mar <text:s text:c="5"/>yes <text:s/>female <text:s/>33.00 <text:s text:c="2"/>2nd</text:p>
      <text:p text:style-name="Preformatted_20_Text">596 <text:s text:c="12"/>Wilhelms, Mr. Charles <text:s text:c="5"/>yes <text:s text:c="3"/>male <text:s/>31.00 <text:s text:c="2"/>2nd</text:p>
      <text:p text:style-name="Preformatted_20_Text">597 <text:s text:c="5"/>Williams, Mr. Charles Eugene <text:s text:c="5"/>yes <text:s text:c="3"/>male <text:s text:c="3"/>NaN <text:s text:c="2"/>2nd</text:p>
      <text:p text:style-name="Preformatted_20_Text">598 <text:s text:c="13"/>Wright, Miss. Marion <text:s text:c="5"/>yes <text:s/>female <text:s/>26.00 <text:s text:c="2"/>2nd</text:p>
      <text:p text:style-name="Preformatted_20_Text">603 <text:s text:c="2"/>Abbott, Mrs. Stanton (Rosa Hunt <text:s text:c="5"/>yes <text:s/>female <text:s/>35.00 <text:s text:c="2"/>3rd</text:p>
      <text:p text:style-name="Preformatted_20_Text">604 <text:s text:c="6"/>Abelseth, Miss. Karen Marie <text:s text:c="5"/>yes <text:s/>female <text:s/>16.00 <text:s text:c="2"/>3rd</text:p>
      <text:p text:style-name="Preformatted_20_Text">605 <text:s text:c="4"/>Abelseth, Mr. Olaus Jorgensen <text:s text:c="5"/>yes <text:s text:c="3"/>male <text:s/>25.00 <text:s text:c="2"/>3rd</text:p>
      <text:p text:style-name="Preformatted_20_Text">606 <text:s text:c="2"/>Abrahamsson, Mr. Abraham August <text:s text:c="5"/>yes <text:s text:c="3"/>male <text:s/>20.00 <text:s text:c="2"/>3rd</text:p>
      <text:p text:style-name="Preformatted_20_Text">607 <text:s text:c="2"/>Abrahim, Mrs. Joseph (Sophie Ha <text:s text:c="5"/>yes <text:s/>female <text:s/>18.00 <text:s text:c="2"/>3rd</text:p>
      <text:p text:style-name="Preformatted_20_Text">611 <text:s text:c="8"/>Aks, Master. Philip Frank <text:s text:c="5"/>yes <text:s text:c="3"/>male <text:s text:c="2"/>0.83 <text:s text:c="2"/>3rd</text:p>
      <text:p text:style-name="Preformatted_20_Text">612 <text:s text:c="7"/>Aks, Mrs. Sam (Leah Rosen) <text:s text:c="5"/>yes <text:s/>female <text:s/>18.00 <text:s text:c="2"/>3rd</text:p>
      <text:p text:style-name="Preformatted_20_Text">613 <text:s text:c="6"/>Albimona, Mr. Nassef Cassem <text:s text:c="5"/>yes <text:s text:c="3"/>male <text:s/>26.00 <text:s text:c="2"/>3rd</text:p>
      <text:p text:style-name="Preformatted_20_Text">621 <text:s text:c="2"/>Andersen-Jensen, Miss. Carla Ch <text:s text:c="5"/>yes <text:s/>female <text:s/>19.00 <text:s text:c="2"/>3rd</text:p>
      <text:p text:style-name="Preformatted_20_Text">625 <text:s text:c="2"/>Andersson, Miss. Erna Alexandra <text:s text:c="5"/>yes <text:s/>female <text:s/>17.00 <text:s text:c="2"/>3rd</text:p>
      <text:p text:style-name="Preformatted_20_Text">630 <text:s text:c="3"/>Andersson, Mr. August Edvard ( <text:s text:c="5"/>yes <text:s text:c="3"/>male <text:s/>27.00 <text:s text:c="2"/>3rd</text:p>
      <text:p text:style-name="Preformatted_20_Text">641 <text:s text:c="2"/>Asplund, Master. Edvin Rojj Fel <text:s text:c="5"/>yes <text:s text:c="3"/>male <text:s text:c="2"/>3.00 <text:s text:c="2"/>3rd</text:p>
      <text:p text:style-name="Preformatted_20_Text">643 <text:s text:c="3"/>Asplund, Miss. Lillian Gertrud <text:s text:c="5"/>yes <text:s/>female <text:s text:c="2"/>5.00 <text:s text:c="2"/>3rd</text:p>
      <text:p text:style-name="Preformatted_20_Text">645 <text:s text:c="7"/>Asplund, Mr. Johan Charles <text:s text:c="5"/>yes <text:s text:c="3"/>male <text:s/>23.00 <text:s text:c="2"/>3rd</text:p>
      <text:p text:style-name="Preformatted_20_Text">646 <text:s text:c="2"/>Asplund, Mrs. Carl Oscar (Selma <text:s text:c="5"/>yes <text:s/>female <text:s/>38.00 <text:s text:c="2"/>3rd</text:p>
      <text:p text:style-name="Preformatted_20_Text">647 <text:s text:c="3"/>Assaf Khalil, Mrs. Mariana (Mi <text:s text:c="5"/>yes <text:s/>female <text:s/>45.00 <text:s text:c="2"/>3rd</text:p>
      <text:p text:style-name="Preformatted_20_Text">653 <text:s text:c="13"/>Ayoub, Miss. Banoura <text:s text:c="5"/>yes <text:s/>female <text:s/>13.00 <text:s text:c="2"/>3rd</text:p>
      <text:p text:style-name="Preformatted_20_Text">656 <text:s text:c="2"/>Backstrom, Mrs. Karl Alfred (Ma <text:s text:c="5"/>yes <text:s/>female <text:s/>33.00 <text:s text:c="2"/>3rd</text:p>
      <text:p text:style-name="Preformatted_20_Text">657 <text:s text:c="11"/>Baclini, Miss. Eugenie <text:s text:c="5"/>yes <text:s/>female <text:s text:c="2"/>0.75 <text:s text:c="2"/>3rd</text:p>
      <text:p text:style-name="Preformatted_20_Text">658 <text:s text:c="4"/>Baclini, Miss. Helene Barbara <text:s text:c="5"/>yes <text:s/>female <text:s text:c="2"/>0.75 <text:s text:c="2"/>3rd</text:p>
      <text:p text:style-name="Preformatted_20_Text">659 <text:s text:c="3"/>Baclini, Miss. Marie Catherine <text:s text:c="5"/>yes <text:s/>female <text:s text:c="2"/>5.00 <text:s text:c="2"/>3rd</text:p>
      <text:p text:style-name="Preformatted_20_Text">660 <text:s text:c="2"/>Baclini, Mrs. Solomon (Latifa Q <text:s text:c="5"/>yes <text:s/>female <text:s/>24.00 <text:s text:c="2"/>3rd</text:p>
      <text:p text:style-name="Preformatted_20_Text">661 <text:s text:c="7"/>Badman, Miss. Emily Louisa <text:s text:c="5"/>yes <text:s/>female <text:s/>18.00 <text:s text:c="2"/>3rd</text:p>
      <text:p text:style-name="Preformatted_20_Text"><text:soft-page-break/>664 <text:s text:c="12"/>Barah, Mr. Hanna Assi <text:s text:c="5"/>yes <text:s text:c="3"/>male <text:s/>20.00 <text:s text:c="2"/>3rd</text:p>
      <text:p text:style-name="Preformatted_20_Text">674 <text:s text:c="20"/>Bing, Mr. Lee <text:s text:c="5"/>yes <text:s text:c="3"/>male <text:s/>32.00 <text:s text:c="2"/>3rd</text:p>
      <text:p text:style-name="Preformatted_20_Text">686 <text:s text:c="5"/>Bradley, Miss. Bridget Delia <text:s text:c="5"/>yes <text:s/>female <text:s/>22.00 <text:s text:c="2"/>3rd</text:p>
      <text:p text:style-name="Preformatted_20_Text">693 <text:s text:c="14"/>Buckley, Mr. Daniel <text:s text:c="5"/>yes <text:s text:c="3"/>male <text:s/>21.00 <text:s text:c="2"/>3rd</text:p>
      <text:p text:style-name="Preformatted_20_Text">709 <text:s text:c="10"/>Carr, Miss. Helen Ellen <text:s text:c="5"/>yes <text:s/>female <text:s/>16.00 <text:s text:c="2"/>3rd</text:p>
      <text:p text:style-name="Preformatted_20_Text">714 <text:s text:c="18"/>Chip, Mr. Chang <text:s text:c="5"/>yes <text:s text:c="3"/>male <text:s/>32.00 <text:s text:c="2"/>3rd</text:p>
      <text:p text:style-name="Preformatted_20_Text">719 <text:s text:c="11"/>Cohen, Mr. Gurshon Gus <text:s text:c="5"/>yes <text:s text:c="3"/>male <text:s/>18.00 <text:s text:c="2"/>3rd</text:p>
      <text:p text:style-name="Preformatted_20_Text">725 <text:s text:c="9"/>Connolly, Miss. Kate (A) <text:s text:c="5"/>yes <text:s/>female <text:s/>22.00 <text:s text:c="2"/>3rd</text:p>
      <text:p text:style-name="Preformatted_20_Text">733 <text:s text:c="3"/>Coutts, Master. Eden Leslie Ne <text:s text:c="5"/>yes <text:s text:c="3"/>male <text:s text:c="2"/>9.00 <text:s text:c="2"/>3rd</text:p>
      <text:p text:style-name="Preformatted_20_Text">734 <text:s text:c="3"/>Coutts, Master. William Loch W <text:s text:c="5"/>yes <text:s text:c="3"/>male <text:s text:c="2"/>3.00 <text:s text:c="2"/>3rd</text:p>
      <text:p text:style-name="Preformatted_20_Text">735 <text:s text:c="3"/>Coutts, Mrs. William (Winnie M <text:s text:c="5"/>yes <text:s/>female <text:s/>36.00 <text:s text:c="2"/>3rd</text:p>
      <text:p text:style-name="Preformatted_20_Text">738 <text:s text:c="9"/>Cribb, Miss. Laura Alice <text:s text:c="5"/>yes <text:s/>female <text:s/>17.00 <text:s text:c="2"/>3rd</text:p>
      <text:p text:style-name="Preformatted_20_Text">742 <text:s text:c="12"/>Dahl, Mr. Karl Edwart <text:s text:c="5"/>yes <text:s text:c="3"/>male <text:s/>45.00 <text:s text:c="2"/>3rd</text:p>
      <text:p text:style-name="Preformatted_20_Text">745 <text:s text:c="3"/>Daly, Miss. Margaret Marcella <text:s text:c="6"/>yes <text:s/>female <text:s/>30.00 <text:s text:c="2"/>3rd</text:p>
      <text:p text:style-name="Preformatted_20_Text">746 <text:s text:c="9"/>Daly, Mr. Eugene Patrick <text:s text:c="5"/>yes <text:s text:c="3"/>male <text:s/>29.00 <text:s text:c="2"/>3rd</text:p>
      <text:p text:style-name="Preformatted_20_Text">757 <text:s text:c="2"/>Davison, Mrs. Thomas Henry (Mar <text:s text:c="5"/>yes <text:s/>female <text:s text:c="3"/>NaN <text:s text:c="2"/>3rd</text:p>
      <text:p text:style-name="Preformatted_20_Text">758 <text:s text:c="2"/>de Messemaeker, Mr. Guillaume J <text:s text:c="5"/>yes <text:s text:c="3"/>male <text:s/>36.50 <text:s text:c="2"/>3rd</text:p>
      <text:p text:style-name="Preformatted_20_Text">759 <text:s text:c="3"/>de Messemaeker, Mrs. Guillaume <text:s text:c="5"/>yes <text:s/>female <text:s/>36.00 <text:s text:c="2"/>3rd</text:p>
      <text:p text:style-name="Preformatted_20_Text">760 <text:s text:c="10"/>de Mulder, Mr. Theodore <text:s text:c="5"/>yes <text:s text:c="3"/>male <text:s/>30.00 <text:s text:c="2"/>3rd</text:p>
      <text:p text:style-name="Preformatted_20_Text">762 <text:s text:c="7"/>Dean, Master. Bertram Vere <text:s text:c="5"/>yes <text:s text:c="3"/>male <text:s text:c="2"/>1.00 <text:s text:c="2"/>3rd</text:p>
      <text:p text:style-name="Preformatted_20_Text">763 <text:s text:c="3"/>Dean, Miss. Elizabeth Gladys M <text:s text:c="5"/>yes <text:s/>female <text:s text:c="2"/>0.17 <text:s text:c="2"/>3rd</text:p>
      <text:p text:style-name="Preformatted_20_Text">765 <text:s text:c="2"/>Dean, Mrs. Bertram (Eva Georget <text:s text:c="5"/>yes <text:s/>female <text:s/>33.00 <text:s text:c="2"/>3rd</text:p>
      <text:p text:style-name="Preformatted_20_Text">771 <text:s text:c="4"/>Devaney, Miss. Margaret Delia <text:s text:c="5"/>yes <text:s/>female <text:s/>19.00 <text:s text:c="2"/>3rd</text:p>
      <text:p text:style-name="Preformatted_20_Text">777 <text:s text:c="7"/>Dorking, Mr. Edward Arthur <text:s text:c="5"/>yes <text:s text:c="3"/>male <text:s/>19.00 <text:s text:c="2"/>3rd</text:p>
      <text:p text:style-name="Preformatted_20_Text">778 <text:s text:c="9"/>Dowdell, Miss. Elizabeth <text:s text:c="5"/>yes <text:s/>female <text:s/>30.00 <text:s text:c="2"/>3rd</text:p>
      <text:p text:style-name="Preformatted_20_Text">780 <text:s text:c="12"/>Drapkin, Miss. Jennie <text:s text:c="5"/>yes <text:s/>female <text:s/>23.00 <text:s text:c="2"/>3rd</text:p>
      <text:p text:style-name="Preformatted_20_Text">783 <text:s text:c="13"/>Duquemin, Mr. Joseph <text:s text:c="5"/>yes <text:s text:c="3"/>male <text:s/>24.00 <text:s text:c="2"/>3rd</text:p>
      <text:p text:style-name="Preformatted_20_Text">785 <text:s text:c="2"/>Dyker, Mrs. Adolf Fredrik (Anna <text:s text:c="5"/>yes <text:s/>female <text:s/>22.00 <text:s text:c="2"/>3rd</text:p>
      <text:p text:style-name="Preformatted_20_Text">794 <text:s text:c="4"/>Emanuel, Miss. Virginia Ethel <text:s text:c="5"/>yes <text:s/>female <text:s text:c="2"/>5.00 <text:s text:c="2"/>3rd</text:p>
      <text:p text:style-name="Preformatted_20_Text">798 <text:s text:c="16"/>Finoli, Mr. Luigi <text:s text:c="5"/>yes <text:s text:c="3"/>male <text:s text:c="3"/>NaN <text:s text:c="2"/>3rd</text:p>
      <text:p text:style-name="Preformatted_20_Text">805 <text:s text:c="18"/>Foo, Mr. Choong <text:s text:c="5"/>yes <text:s text:c="3"/>male <text:s text:c="3"/>NaN <text:s text:c="2"/>3rd</text:p>
      <text:p text:style-name="Preformatted_20_Text">818 <text:s text:c="3"/>Gilnagh, Miss. Katherine Katie <text:s text:c="5"/>yes <text:s/>female <text:s/>16.00 <text:s text:c="2"/>3rd</text:p>
      <text:p text:style-name="Preformatted_20_Text">819 <text:s text:c="9"/>Glynn, Miss. Mary Agatha <text:s text:c="5"/>yes <text:s/>female <text:s text:c="3"/>NaN <text:s text:c="2"/>3rd</text:p>
      <text:p text:style-name="Preformatted_20_Text">820 <text:s text:c="2"/>Goldsmith, Master. Frank John W <text:s text:c="5"/>yes <text:s text:c="3"/>male <text:s text:c="2"/>9.00 <text:s text:c="2"/>3rd</text:p>
      <text:p text:style-name="Preformatted_20_Text">823 <text:s text:c="2"/>Goldsmith, Mrs. Frank John (Emi <text:s text:c="5"/>yes <text:s/>female <text:s/>31.00 <text:s text:c="2"/>3rd</text:p>
      <text:p text:style-name="Preformatted_20_Text">845 <text:s text:c="2"/>Hakkarainen, Mrs. Pekka Pietari <text:s text:c="5"/>yes <text:s/>female <text:s/>24.00 <text:s text:c="2"/>3rd</text:p>
      <text:p text:style-name="Preformatted_20_Text">851 <text:s text:c="2"/>Hansen, Mrs. Claus Peter (Jenni <text:s text:c="5"/>yes <text:s/>female <text:s/>45.00 <text:s text:c="2"/>3rd</text:p>
      <text:p text:style-name="Preformatted_20_Text">856 <text:s text:c="9"/>Healy, Miss. Hanora Nora <text:s text:c="5"/>yes <text:s/>female <text:s text:c="3"/>NaN <text:s text:c="2"/>3rd</text:p>
      <text:p text:style-name="Preformatted_20_Text">857 <text:s text:c="10"/>Hedman, Mr. Oskar Arvid <text:s text:c="5"/>yes <text:s text:c="3"/>male <text:s/>27.00 <text:s text:c="2"/>3rd</text:p>
      <text:p text:style-name="Preformatted_20_Text">858 <text:s text:c="20"/>Hee, Mr. Ling <text:s text:c="5"/>yes <text:s text:c="3"/>male <text:s text:c="3"/>NaN <text:s text:c="2"/>3rd</text:p>
      <text:p text:style-name="Preformatted_20_Text">860 <text:s text:c="11"/>Heikkinen, Miss. Laina <text:s text:c="5"/>yes <text:s/>female <text:s/>26.00 <text:s text:c="2"/>3rd</text:p>
      <text:p text:style-name="Preformatted_20_Text">862 <text:s text:c="5"/>Hellstrom, Miss. Hilda Maria <text:s text:c="5"/>yes <text:s/>female <text:s/>22.00 <text:s text:c="2"/>3rd</text:p>
      <text:p text:style-name="Preformatted_20_Text">866 <text:s text:c="9"/>Hirvonen, Miss. Hildur E <text:s text:c="5"/>yes <text:s/>female <text:s text:c="2"/>2.00 <text:s text:c="2"/>3rd</text:p>
      <text:p text:style-name="Preformatted_20_Text">867 <text:s text:c="2"/>Hirvonen, Mrs. Alexander (Helga <text:s text:c="5"/>yes <text:s/>female <text:s/>22.00 <text:s text:c="2"/>3rd</text:p>
      <text:p text:style-name="Preformatted_20_Text">870 <text:s text:c="11"/>Honkanen, Miss. Eliina <text:s text:c="5"/>yes <text:s/>female <text:s/>27.00 <text:s text:c="2"/>3rd</text:p>
      <text:p text:style-name="Preformatted_20_Text">872 <text:s text:c="6"/>Howard, Miss. May Elizabeth <text:s text:c="5"/>yes <text:s/>female <text:s text:c="3"/>NaN <text:s text:c="2"/>3rd</text:p>
      <text:p text:style-name="Preformatted_20_Text">874 <text:s text:c="15"/>Hyman, Mr. Abraham <text:s text:c="5"/>yes <text:s text:c="3"/>male <text:s text:c="3"/>NaN <text:s text:c="2"/>3rd</text:p>
      <text:p text:style-name="Preformatted_20_Text">880 <text:s text:c="15"/>Jalsevac, Mr. Ivan <text:s text:c="5"/>yes <text:s text:c="3"/>male <text:s/>29.00 <text:s text:c="2"/>3rd</text:p>
      <text:p text:style-name="Preformatted_20_Text">881 <text:s text:c="11"/>Jansson, Mr. Carl Olof <text:s text:c="5"/>yes <text:s text:c="3"/>male <text:s/>21.00 <text:s text:c="2"/>3rd</text:p>
      <text:p text:style-name="Preformatted_20_Text">886 <text:s text:c="14"/>Jermyn, Miss. Annie <text:s text:c="5"/>yes <text:s/>female <text:s text:c="3"/>NaN <text:s text:c="2"/>3rd</text:p>
      <text:p text:style-name="Preformatted_20_Text">887 <text:s text:c="2"/>Johannesen-Bratthammer, Mr. Ber <text:s text:c="5"/>yes <text:s text:c="3"/>male <text:s text:c="3"/>NaN <text:s text:c="2"/>3rd</text:p>
      <text:p text:style-name="Preformatted_20_Text">889 <text:s text:c="3"/>Johansson Palmquist, Mr. Oskar <text:s text:c="5"/>yes <text:s text:c="3"/>male <text:s/>26.00 <text:s text:c="2"/>3rd</text:p>
      <text:p text:style-name="Preformatted_20_Text">894 <text:s text:c="2"/>Johnson, Master. Harold Theodor <text:s text:c="5"/>yes <text:s text:c="3"/>male <text:s text:c="2"/>4.00 <text:s text:c="2"/>3rd</text:p>
      <text:p text:style-name="Preformatted_20_Text">895 <text:s text:c="5"/>Johnson, Miss. Eleanor Ileen <text:s text:c="5"/>yes <text:s/>female <text:s text:c="2"/>1.00 <text:s text:c="2"/>3rd</text:p>
      <text:p text:style-name="Preformatted_20_Text">899 <text:s text:c="2"/>Johnson, Mrs. Oscar W (Elisabet <text:s text:c="5"/>yes <text:s/>female <text:s/>27.00 <text:s text:c="2"/>3rd</text:p>
      <text:p text:style-name="Preformatted_20_Text">905 <text:s text:c="16"/>Jonsson, Mr. Carl <text:s text:c="5"/>yes <text:s text:c="3"/>male <text:s/>32.00 <text:s text:c="2"/>3rd</text:p>
      <text:p text:style-name="Preformatted_20_Text">909 <text:s text:c="14"/>Jussila, Mr. Eiriik <text:s text:c="5"/>yes <text:s text:c="3"/>male <text:s/>32.00 <text:s text:c="2"/>3rd</text:p>
      <text:p text:style-name="Preformatted_20_Text">913 <text:s text:c="4"/>Karlsson, Mr. Einar Gervasius <text:s text:c="5"/>yes <text:s text:c="3"/>male <text:s/>21.00 <text:s text:c="2"/>3rd</text:p>
      <text:p text:style-name="Preformatted_20_Text">916 <text:s text:c="15"/>Karun, Miss. Manca <text:s text:c="5"/>yes <text:s/>female <text:s text:c="2"/>4.00 <text:s text:c="2"/>3rd</text:p>
      <text:p text:style-name="Preformatted_20_Text">917 <text:s text:c="17"/>Karun, Mr. Franz <text:s text:c="5"/>yes <text:s text:c="3"/>male <text:s/>39.00 <text:s text:c="2"/>3rd</text:p>
      <text:p text:style-name="Preformatted_20_Text">922 <text:s text:c="3"/>Kelly, Miss. Anna Katherine An <text:s text:c="5"/>yes <text:s/>female <text:s text:c="3"/>NaN <text:s text:c="2"/>3rd</text:p>
      <text:p text:style-name="Preformatted_20_Text">923 <text:s text:c="16"/>Kelly, Miss. Mary <text:s text:c="5"/>yes <text:s/>female <text:s text:c="3"/>NaN <text:s text:c="2"/>3rd</text:p>
      <text:p text:style-name="Preformatted_20_Text">926 <text:s text:c="16"/>Kennedy, Mr. John <text:s text:c="5"/>yes <text:s text:c="3"/>male <text:s text:c="3"/>NaN <text:s text:c="2"/>3rd</text:p>
      <text:p text:style-name="Preformatted_20_Text">934 <text:s text:c="2"/>Kink-Heilmann, Miss. Luise Gret <text:s text:c="5"/>yes <text:s/>female <text:s text:c="2"/>4.00 <text:s text:c="2"/>3rd</text:p>
      <text:p text:style-name="Preformatted_20_Text"><text:soft-page-break/>935 <text:s text:c="9"/>Kink-Heilmann, Mr. Anton <text:s text:c="5"/>yes <text:s text:c="3"/>male <text:s/>29.00 <text:s text:c="2"/>3rd</text:p>
      <text:p text:style-name="Preformatted_20_Text">936 <text:s text:c="2"/>Kink-Heilmann, Mrs. Anton (Luis <text:s text:c="5"/>yes <text:s/>female <text:s/>26.00 <text:s text:c="2"/>3rd</text:p>
      <text:p text:style-name="Preformatted_20_Text">941 <text:s text:c="12"/>Krekorian, Mr. Neshan <text:s text:c="5"/>yes <text:s text:c="3"/>male <text:s/>25.00 <text:s text:c="2"/>3rd</text:p>
      <text:p text:style-name="Preformatted_20_Text">945 <text:s text:c="21"/>Lam, Mr. Ali <text:s text:c="5"/>yes <text:s text:c="3"/>male <text:s text:c="3"/>NaN <text:s text:c="2"/>3rd</text:p>
      <text:p text:style-name="Preformatted_20_Text">947 <text:s text:c="2"/>Landergren, Miss. Aurora Adelia <text:s text:c="5"/>yes <text:s/>female <text:s/>22.00 <text:s text:c="2"/>3rd</text:p>
      <text:p text:style-name="Preformatted_20_Text">949 <text:s text:c="19"/>Lang, Mr. Fang <text:s text:c="5"/>yes <text:s text:c="3"/>male <text:s/>26.00 <text:s text:c="2"/>3rd</text:p>
      <text:p text:style-name="Preformatted_20_Text">953 <text:s text:c="3"/>Leeni, Mr. Fahim (Philip Zenni <text:s text:c="5"/>yes <text:s text:c="3"/>male <text:s/>22.00 <text:s text:c="2"/>3rd</text:p>
      <text:p text:style-name="Preformatted_20_Text">970 <text:s text:c="6"/>Lindqvist, Mr. Eino William <text:s text:c="5"/>yes <text:s text:c="3"/>male <text:s/>20.00 <text:s text:c="2"/>3rd</text:p>
      <text:p text:style-name="Preformatted_20_Text">978 <text:s text:c="16"/>Lulic, Mr. Nikola <text:s text:c="5"/>yes <text:s text:c="3"/>male <text:s/>27.00 <text:s text:c="2"/>3rd</text:p>
      <text:p text:style-name="Preformatted_20_Text">980 <text:s text:c="9"/>Lundin, Miss. Olga Elida <text:s text:c="5"/>yes <text:s/>female <text:s/>23.00 <text:s text:c="2"/>3rd</text:p>
      <text:p text:style-name="Preformatted_20_Text">981 <text:s text:c="7"/>Lundstrom, Mr. Thure Edvin <text:s text:c="5"/>yes <text:s text:c="3"/>male <text:s/>32.00 <text:s text:c="2"/>3rd</text:p>
      <text:p text:style-name="Preformatted_20_Text">984 <text:s text:c="3"/>Madigan, Miss. Margaret Maggie <text:s text:c="5"/>yes <text:s/>female <text:s text:c="3"/>NaN <text:s text:c="2"/>3rd</text:p>
      <text:p text:style-name="Preformatted_20_Text">985 <text:s text:c="8"/>Madsen, Mr. Fridtjof Arne <text:s text:c="5"/>yes <text:s text:c="3"/>male <text:s/>24.00 <text:s text:c="2"/>3rd</text:p>
      <text:p text:style-name="Preformatted_20_Text">991 <text:s text:c="17"/>Mamee, Mr. Hanna <text:s text:c="5"/>yes <text:s text:c="3"/>male <text:s text:c="3"/>NaN <text:s text:c="2"/>3rd</text:p>
      <text:p text:style-name="Preformatted_20_Text">993 <text:s text:c="9"/>Mannion, Miss. Margareth <text:s text:c="5"/>yes <text:s/>female <text:s text:c="3"/>NaN <text:s text:c="2"/>3rd</text:p>
      <text:p text:style-name="Preformatted_20_Text">997 <text:s text:c="10"/>Masselmani, Mrs. Fatima <text:s text:c="5"/>yes <text:s/>female <text:s text:c="3"/>NaN <text:s text:c="2"/>3rd</text:p>
      <text:p text:style-name="Preformatted_20_Text">999 <text:s text:c="3"/>McCarthy, Miss. Catherine Kati <text:s text:c="5"/>yes <text:s/>female <text:s text:c="3"/>NaN <text:s text:c="2"/>3rd</text:p>
      <text:p text:style-name="Preformatted_20_Text">1000 <text:s text:c="4"/>McCormack, Mr. Thomas Joseph <text:s text:c="5"/>yes <text:s text:c="3"/>male <text:s text:c="3"/>NaN <text:s text:c="2"/>3rd</text:p>
      <text:p text:style-name="Preformatted_20_Text">1001 <text:s text:c="14"/>McCoy, Miss. Agnes <text:s text:c="5"/>yes <text:s/>female <text:s text:c="3"/>NaN <text:s text:c="2"/>3rd</text:p>
      <text:p text:style-name="Preformatted_20_Text">1002 <text:s text:c="13"/>McCoy, Miss. Alicia <text:s text:c="5"/>yes <text:s/>female <text:s text:c="3"/>NaN <text:s text:c="2"/>3rd</text:p>
      <text:p text:style-name="Preformatted_20_Text">1003 <text:s text:c="14"/>McCoy, Mr. Bernard <text:s text:c="5"/>yes <text:s text:c="3"/>male <text:s text:c="3"/>NaN <text:s text:c="2"/>3rd</text:p>
      <text:p text:style-name="Preformatted_20_Text">1004 <text:s text:c="2"/>McDermott, Miss. Brigdet Delia <text:s text:c="5"/>yes <text:s/>female <text:s text:c="3"/>NaN <text:s text:c="2"/>3rd</text:p>
      <text:p text:style-name="Preformatted_20_Text">1006 <text:s text:c="12"/>McGovern, Miss. Mary <text:s text:c="5"/>yes <text:s/>female <text:s text:c="3"/>NaN <text:s text:c="2"/>3rd</text:p>
      <text:p text:style-name="Preformatted_20_Text">1007 <text:s text:c="7"/>McGowan, Miss. Anna Annie <text:s text:c="5"/>yes <text:s/>female <text:s/>15.00 <text:s text:c="2"/>3rd</text:p>
      <text:p text:style-name="Preformatted_20_Text">1017 <text:s text:c="8"/>Midtsjo, Mr. Karl Albert <text:s text:c="5"/>yes <text:s text:c="3"/>male <text:s/>21.00 <text:s text:c="2"/>3rd</text:p>
      <text:p text:style-name="Preformatted_20_Text">1023 <text:s text:c="2"/>Mockler, Miss. Helen Mary Elli <text:s text:c="5"/>yes <text:s/>female <text:s text:c="3"/>NaN <text:s text:c="2"/>3rd</text:p>
      <text:p text:style-name="Preformatted_20_Text">1025 <text:s text:c="13"/>Moor, Master. Meier <text:s text:c="5"/>yes <text:s text:c="3"/>male <text:s text:c="2"/>6.00 <text:s text:c="2"/>3rd</text:p>
      <text:p text:style-name="Preformatted_20_Text">1026 <text:s text:c="14"/>Moor, Mrs. (Beila) <text:s text:c="5"/>yes <text:s/>female <text:s/>27.00 <text:s text:c="2"/>3rd</text:p>
      <text:p text:style-name="Preformatted_20_Text">1028 <text:s text:c="13"/>Moran, Miss. Bertha <text:s text:c="5"/>yes <text:s/>female <text:s text:c="3"/>NaN <text:s text:c="2"/>3rd</text:p>
      <text:p text:style-name="Preformatted_20_Text">1033 <text:s text:c="10"/>Moss, Mr. Albert Johan <text:s text:c="5"/>yes <text:s text:c="3"/>male <text:s text:c="3"/>NaN <text:s text:c="2"/>3rd</text:p>
      <text:p text:style-name="Preformatted_20_Text">1034 <text:s text:c="8"/>Moubarek, Master. Gerios <text:s text:c="5"/>yes <text:s text:c="3"/>male <text:s text:c="3"/>NaN <text:s text:c="2"/>3rd</text:p>
      <text:p text:style-name="Preformatted_20_Text">1035 <text:s text:c="2"/>Moubarek, Master. Halim Gonios <text:s text:c="5"/>yes <text:s text:c="3"/>male <text:s text:c="3"/>NaN <text:s text:c="2"/>3rd</text:p>
      <text:p text:style-name="Preformatted_20_Text">1036 <text:s text:c="2"/>Moubarek, Mrs. George (Omine A <text:s text:c="5"/>yes <text:s/>female <text:s text:c="3"/>NaN <text:s text:c="2"/>3rd</text:p>
      <text:p text:style-name="Preformatted_20_Text">1037 <text:s text:c="2"/>Moussa, Mrs. (Mantoura Boulos) <text:s text:c="5"/>yes <text:s/>female <text:s text:c="3"/>NaN <text:s text:c="2"/>3rd</text:p>
      <text:p text:style-name="Preformatted_20_Text">1039 <text:s text:c="2"/>Mullens, Miss. Katherine Katie <text:s text:c="5"/>yes <text:s/>female <text:s text:c="3"/>NaN <text:s text:c="2"/>3rd</text:p>
      <text:p text:style-name="Preformatted_20_Text">1040 <text:s text:c="7"/>Mulvihill, Miss. Bertha E <text:s text:c="5"/>yes <text:s/>female <text:s/>24.00 <text:s text:c="2"/>3rd</text:p>
      <text:p text:style-name="Preformatted_20_Text">1042 <text:s text:c="4"/>Murphy, Miss. Katherine Kate <text:s text:c="5"/>yes <text:s/>female <text:s text:c="3"/>NaN <text:s text:c="2"/>3rd</text:p>
      <text:p text:style-name="Preformatted_20_Text">1043 <text:s text:c="5"/>Murphy, Miss. Margaret Jane <text:s text:c="5"/>yes <text:s/>female <text:s text:c="3"/>NaN <text:s text:c="2"/>3rd</text:p>
      <text:p text:style-name="Preformatted_20_Text">1044 <text:s text:c="14"/>Murphy, Miss. Nora <text:s text:c="5"/>yes <text:s/>female <text:s text:c="3"/>NaN <text:s text:c="2"/>3rd</text:p>
      <text:p text:style-name="Preformatted_20_Text">1047 <text:s text:c="2"/>Najib, Miss. Adele Kiamie Jane <text:s text:c="5"/>yes <text:s/>female <text:s/>15.00 <text:s text:c="2"/>3rd</text:p>
      <text:p text:style-name="Preformatted_20_Text">1048 <text:s text:c="7"/>Nakid, Miss. Maria (Mary) <text:s text:c="5"/>yes <text:s/>female <text:s text:c="2"/>1.00 <text:s text:c="2"/>3rd</text:p>
      <text:p text:style-name="Preformatted_20_Text">1049 <text:s text:c="16"/>Nakid, Mr. Sahid <text:s text:c="5"/>yes <text:s text:c="3"/>male <text:s/>20.00 <text:s text:c="2"/>3rd</text:p>
      <text:p text:style-name="Preformatted_20_Text">1050 <text:s text:c="4"/>Nakid, Mrs. Said (Waika Mary <text:s text:c="5"/>yes <text:s/>female <text:s/>19.00 <text:s text:c="2"/>3rd</text:p>
      <text:p text:style-name="Preformatted_20_Text">1056 <text:s text:c="4"/>Nicola-Yarred, Master. Elias <text:s text:c="5"/>yes <text:s text:c="3"/>male <text:s/>12.00 <text:s text:c="2"/>3rd</text:p>
      <text:p text:style-name="Preformatted_20_Text">1057 <text:s text:c="5"/>Nicola-Yarred, Miss. Jamila <text:s text:c="5"/>yes <text:s/>female <text:s/>14.00 <text:s text:c="2"/>3rd</text:p>
      <text:p text:style-name="Preformatted_20_Text">1060 <text:s text:c="5"/>Nilsson, Miss. Berta Olivia <text:s text:c="5"/>yes <text:s/>female <text:s/>18.00 <text:s text:c="2"/>3rd</text:p>
      <text:p text:style-name="Preformatted_20_Text">1061 <text:s/>Nilsson, Miss. Helmina Josefina <text:s text:c="5"/>yes <text:s/>female <text:s/>26.00 <text:s text:c="2"/>3rd</text:p>
      <text:p text:style-name="Preformatted_20_Text">1064 <text:s text:c="14"/>Niskanen, Mr. Juha <text:s text:c="5"/>yes <text:s text:c="3"/>male <text:s/>39.00 <text:s text:c="2"/>3rd</text:p>
      <text:p text:style-name="Preformatted_20_Text">1067 <text:s text:c="8"/>Nysten, Miss. Anna Sofia <text:s text:c="5"/>yes <text:s/>female <text:s/>22.00 <text:s text:c="2"/>3rd</text:p>
      <text:p text:style-name="Preformatted_20_Text">1071 <text:s text:c="2"/>O'Brien, Mrs. Thomas (Johanna <text:s text:c="6"/>yes <text:s/>female <text:s text:c="3"/>NaN <text:s text:c="2"/>3rd</text:p>
      <text:p text:style-name="Preformatted_20_Text">1077 <text:s text:c="7"/>O'Driscoll, Miss. Bridget <text:s text:c="5"/>yes <text:s/>female <text:s text:c="3"/>NaN <text:s text:c="2"/>3rd</text:p>
      <text:p text:style-name="Preformatted_20_Text">1078 <text:s text:c="5"/>O'Dwyer, Miss. Ellen Nellie <text:s text:c="5"/>yes <text:s/>female <text:s text:c="3"/>NaN <text:s text:c="2"/>3rd</text:p>
      <text:p text:style-name="Preformatted_20_Text">1079 <text:s text:c="14"/>Ohman, Miss. Velin <text:s text:c="5"/>yes <text:s/>female <text:s/>22.00 <text:s text:c="2"/>3rd</text:p>
      <text:p text:style-name="Preformatted_20_Text">1080 <text:s text:c="12"/>O'Keefe, Mr. Patrick <text:s text:c="5"/>yes <text:s text:c="3"/>male <text:s text:c="3"/>NaN <text:s text:c="2"/>3rd</text:p>
      <text:p text:style-name="Preformatted_20_Text">1081 <text:s text:c="5"/>O'Leary, Miss. Hanora Norah <text:s text:c="5"/>yes <text:s/>female <text:s text:c="3"/>NaN <text:s text:c="2"/>3rd</text:p>
      <text:p text:style-name="Preformatted_20_Text">1082 <text:s text:c="7"/>Olsen, Master. Artur Karl <text:s text:c="5"/>yes <text:s text:c="3"/>male <text:s text:c="2"/>9.00 <text:s text:c="2"/>3rd</text:p>
      <text:p text:style-name="Preformatted_20_Text">1088 <text:s text:c="7"/>Olsson, Mr. Oscar Wilhelm <text:s text:c="5"/>yes <text:s text:c="3"/>male <text:s/>32.00 <text:s text:c="2"/>3rd</text:p>
      <text:p text:style-name="Preformatted_20_Text">1094 <text:s text:c="16"/>Osman, Mrs. Mara <text:s text:c="5"/>yes <text:s/>female <text:s/>31.00 <text:s text:c="2"/>3rd</text:p>
      <text:p text:style-name="Preformatted_20_Text">1120 <text:s text:c="8"/>Persson, Mr. Ernst Ulrik <text:s text:c="5"/>yes <text:s text:c="3"/>male <text:s/>25.00 <text:s text:c="2"/>3rd</text:p>
      <text:p text:style-name="Preformatted_20_Text">1121 <text:s text:c="8"/>Peter, Master. Michael J <text:s text:c="5"/>yes <text:s text:c="3"/>male <text:s text:c="3"/>NaN <text:s text:c="2"/>3rd</text:p>
      <text:p text:style-name="Preformatted_20_Text">1122 <text:s text:c="15"/>Peter, Miss. Anna <text:s text:c="5"/>yes <text:s/>female <text:s text:c="3"/>NaN <text:s text:c="2"/>3rd</text:p>
      <text:p text:style-name="Preformatted_20_Text">1123 <text:s/>Peter, Mrs. Catherine (Catherin <text:s text:c="5"/>yes <text:s/>female <text:s text:c="3"/>NaN <text:s text:c="2"/>3rd</text:p>
      <text:p text:style-name="Preformatted_20_Text">1131 <text:s/>Pickard, Mr. Berk (Berk Trembis <text:s text:c="5"/>yes <text:s text:c="3"/>male <text:s/>32.00 <text:s text:c="2"/>3rd</text:p>
      <text:p text:style-name="Preformatted_20_Text">1149 <text:s text:c="3"/>Riordan, Miss. Johanna Hannah <text:s text:c="5"/>yes <text:s/>female <text:s text:c="3"/>NaN <text:s text:c="2"/>3rd</text:p>
      <text:p text:style-name="Preformatted_20_Text"><text:soft-page-break/>1159 <text:s text:c="13"/>Roth, Miss. Sarah A <text:s text:c="5"/>yes <text:s/>female <text:s text:c="3"/>NaN <text:s text:c="2"/>3rd</text:p>
      <text:p text:style-name="Preformatted_20_Text">1162 <text:s text:c="16"/>Ryan, Mr. Edward <text:s text:c="5"/>yes <text:s text:c="3"/>male <text:s text:c="3"/>NaN <text:s text:c="2"/>3rd</text:p>
      <text:p text:style-name="Preformatted_20_Text">1182 <text:s/>Salkjelsvik, Miss. Anna Kristin <text:s text:c="5"/>yes <text:s/>female <text:s/>21.00 <text:s text:c="2"/>3rd</text:p>
      <text:p text:style-name="Preformatted_20_Text">1187 <text:s/>Sandstrom, Miss. Beatrice Irene <text:s text:c="5"/>yes <text:s/>female <text:s text:c="2"/>1.00 <text:s text:c="2"/>3rd</text:p>
      <text:p text:style-name="Preformatted_20_Text">1188 <text:s text:c="2"/>Sandstrom, Mrs. Hjalmar (Agnes <text:s text:c="5"/>yes <text:s/>female <text:s/>24.00 <text:s text:c="2"/>3rd</text:p>
      <text:p text:style-name="Preformatted_20_Text">1189 <text:s/>Sandstrom, Miss. Marguerite Rut <text:s text:c="5"/>yes <text:s/>female <text:s text:c="2"/>4.00 <text:s text:c="2"/>3rd</text:p>
      <text:p text:style-name="Preformatted_20_Text">1190 <text:s text:c="17"/>Sap, Mr. Julius <text:s text:c="5"/>yes <text:s text:c="3"/>male <text:s/>25.00 <text:s text:c="2"/>3rd</text:p>
      <text:p text:style-name="Preformatted_20_Text">1196 <text:s text:c="5"/>Sheerlinck, Mr. Jan Baptist <text:s text:c="5"/>yes <text:s text:c="3"/>male <text:s/>29.00 <text:s text:c="2"/>3rd</text:p>
      <text:p text:style-name="Preformatted_20_Text">1198 <text:s text:c="6"/>Shine, Miss. Ellen Natalia <text:s text:c="5"/>yes <text:s/>female <text:s text:c="3"/>NaN <text:s text:c="2"/>3rd</text:p>
      <text:p text:style-name="Preformatted_20_Text">1205 <text:s text:c="7"/>Sjoblom, Miss. Anna Sofia <text:s text:c="5"/>yes <text:s/>female <text:s/>18.00 <text:s text:c="2"/>3rd</text:p>
      <text:p text:style-name="Preformatted_20_Text">1216 <text:s text:c="14"/>Smyth, Miss. Julia <text:s text:c="5"/>yes <text:s/>female <text:s text:c="3"/>NaN <text:s text:c="2"/>3rd</text:p>
      <text:p text:style-name="Preformatted_20_Text">1223 <text:s/>Stanley, Miss. Amy Zillah Elsie <text:s text:c="5"/>yes <text:s/>female <text:s/>23.00 <text:s text:c="2"/>3rd</text:p>
      <text:p text:style-name="Preformatted_20_Text">1228 <text:s text:c="14"/>Stranden, Mr. Juho <text:s text:c="5"/>yes <text:s text:c="3"/>male <text:s/>31.00 <text:s text:c="2"/>3rd</text:p>
      <text:p text:style-name="Preformatted_20_Text">1232 <text:s text:c="2"/>Sunderland, Mr. Victor Francis <text:s text:c="5"/>yes <text:s text:c="3"/>male <text:s/>16.00 <text:s text:c="2"/>3rd</text:p>
      <text:p text:style-name="Preformatted_20_Text">1233 <text:s text:c="7"/>Sundman, Mr. Johan Julian <text:s text:c="5"/>yes <text:s text:c="3"/>male <text:s/>44.00 <text:s text:c="2"/>3rd</text:p>
      <text:p text:style-name="Preformatted_20_Text">1236 <text:s text:c="6"/>Svensson, Mr. Johan Cervin <text:s text:c="5"/>yes <text:s text:c="3"/>male <text:s/>14.00 <text:s text:c="2"/>3rd</text:p>
      <text:p text:style-name="Preformatted_20_Text">1238 <text:s text:c="6"/>Tenglin, Mr. Gunnar Isidor <text:s text:c="5"/>yes <text:s text:c="3"/>male <text:s/>25.00 <text:s text:c="2"/>3rd</text:p>
      <text:p text:style-name="Preformatted_20_Text">1240 <text:s/>Thomas, Master. Assad Alexander <text:s text:c="5"/>yes <text:s text:c="3"/>male <text:s text:c="2"/>0.42 <text:s text:c="2"/>3rd</text:p>
      <text:p text:style-name="Preformatted_20_Text">1244 <text:s/>Thomas, Mrs. Alexander (Thamine <text:s text:c="5"/>yes <text:s/>female <text:s/>16.00 <text:s text:c="2"/>3rd</text:p>
      <text:p text:style-name="Preformatted_20_Text">1247 <text:s/>Thorneycroft, Mrs. Percival (Fl <text:s text:c="5"/>yes <text:s/>female <text:s text:c="3"/>NaN <text:s text:c="2"/>3rd</text:p>
      <text:p text:style-name="Preformatted_20_Text">1254 <text:s text:c="4"/>Tornquist, Mr. William Henry <text:s text:c="5"/>yes <text:s text:c="3"/>male <text:s/>25.00 <text:s text:c="2"/>3rd</text:p>
      <text:p text:style-name="Preformatted_20_Text">1256 <text:s text:c="2"/>Touma, Master. Georges Youssef <text:s text:c="5"/>yes <text:s text:c="3"/>male <text:s text:c="2"/>7.00 <text:s text:c="2"/>3rd</text:p>
      <text:p text:style-name="Preformatted_20_Text">1257 <text:s text:c="6"/>Touma, Miss. Maria Youssef <text:s text:c="5"/>yes <text:s/>female <text:s text:c="2"/>9.00 <text:s text:c="2"/>3rd</text:p>
      <text:p text:style-name="Preformatted_20_Text">1258 <text:s/>Touma, Mrs. Darwis (Hanne Youss <text:s text:c="5"/>yes <text:s/>female <text:s/>29.00 <text:s text:c="2"/>3rd</text:p>
      <text:p text:style-name="Preformatted_20_Text">1260 <text:s text:c="9"/>Turja, Miss. Anna Sofia <text:s text:c="5"/>yes <text:s/>female <text:s/>18.00 <text:s text:c="2"/>3rd</text:p>
      <text:p text:style-name="Preformatted_20_Text">1261 <text:s text:c="10"/>Turkula, Mrs. (Hedwig) <text:s text:c="5"/>yes <text:s/>female <text:s/>63.00 <text:s text:c="2"/>3rd</text:p>
      <text:p text:style-name="Preformatted_20_Text">1277 <text:s text:c="12"/>Vartanian, Mr. David <text:s text:c="5"/>yes <text:s text:c="3"/>male <text:s/>22.00 <text:s text:c="2"/>3rd</text:p>
      <text:p text:style-name="Preformatted_20_Text">1286 <text:s/>Whabee, Mrs. George Joseph (Sha <text:s text:c="5"/>yes <text:s/>female <text:s/>38.00 <text:s text:c="2"/>3rd</text:p>
      <text:p text:style-name="Preformatted_20_Text">1290 <text:s/>Wilkes, Mrs. James (Ellen Needs <text:s text:c="5"/>yes <text:s/>female <text:s/>47.00 <text:s text:c="2"/>3rd</text:p>
      <text:p text:style-name="Preformatted_20_Text">1300 <text:s/>Yasbeck, Mrs. Antoni (Selini Al <text:s text:c="5"/>yes <text:s/>female <text:s/>15.00 <text:s text:c="2"/>3rd</text:p>
      <text:p text:style-name="Preformatted_20_Text"/>
      <text:p text:style-name="Preformatted_20_Text"><text:s/>Жінки першого класу:</text:p>
      <text:p text:style-name="Preformatted_20_Text"><text:s text:c="32"/>name survived <text:s text:c="4"/>sex <text:s text:c="2"/>age class</text:p>
      <text:p text:style-name="Preformatted_20_Text">0 <text:s text:c="5"/>Allen, Miss. Elisabeth Walton <text:s text:c="5"/>yes <text:s/>female <text:s/>29.0 <text:s text:c="2"/>1st</text:p>
      <text:p text:style-name="Preformatted_20_Text">2 <text:s text:c="6"/>Allison, Miss. Helen Loraine <text:s text:c="6"/>no <text:s/>female <text:s text:c="2"/>2.0 <text:s text:c="2"/>1st</text:p>
      <text:p text:style-name="Preformatted_20_Text">4 <text:s text:c="3"/>Allison, Mrs. Hudson J C (Bessi <text:s text:c="6"/>no <text:s/>female <text:s/>25.0 <text:s text:c="2"/>1st</text:p>
      <text:p text:style-name="Preformatted_20_Text">6 <text:s text:c="3"/>Andrews, Miss. Kornelia Theodos <text:s text:c="5"/>yes <text:s/>female <text:s/>63.0 <text:s text:c="2"/>1st</text:p>
      <text:p text:style-name="Preformatted_20_Text">8 <text:s text:c="3"/>Appleton, Mrs. Edward Dale (Cha <text:s text:c="5"/>yes <text:s/>female <text:s/>53.0 <text:s text:c="2"/>1st</text:p>
      <text:p text:style-name="Preformatted_20_Text">11 <text:s text:c="2"/>Astor, Mrs. John Jacob (Madelei <text:s text:c="5"/>yes <text:s/>female <text:s/>18.0 <text:s text:c="2"/>1st</text:p>
      <text:p text:style-name="Preformatted_20_Text">12 <text:s text:c="4"/>Aubart, Mme. Leontine Pauline <text:s text:c="5"/>yes <text:s/>female <text:s/>24.0 <text:s text:c="2"/>1st</text:p>
      <text:p text:style-name="Preformatted_20_Text">13 <text:s text:c="7"/>Barber, Miss. Ellen Nellie <text:s text:c="5"/>yes <text:s/>female <text:s/>26.0 <text:s text:c="2"/>1st</text:p>
      <text:p text:style-name="Preformatted_20_Text">17 <text:s text:c="2"/>Baxter, Mrs. James (Helene DeLa <text:s text:c="5"/>yes <text:s/>female <text:s/>50.0 <text:s text:c="2"/>1st</text:p>
      <text:p text:style-name="Preformatted_20_Text">18 <text:s text:c="12"/>Bazzani, Miss. Albina <text:s text:c="5"/>yes <text:s/>female <text:s/>32.0 <text:s text:c="2"/>1st</text:p>
      <text:p text:style-name="Preformatted_20_Text">21 <text:s text:c="3"/>Beckwith, Mrs. Richard Leonard <text:s text:c="5"/>yes <text:s/>female <text:s/>47.0 <text:s text:c="2"/>1st</text:p>
      <text:p text:style-name="Preformatted_20_Text">23 <text:s text:c="12"/>Bidois, Miss. Rosalie <text:s text:c="5"/>yes <text:s/>female <text:s/>42.0 <text:s text:c="2"/>1st</text:p>
      <text:p text:style-name="Preformatted_20_Text">24 <text:s text:c="16"/>Bird, Miss. Ellen <text:s text:c="5"/>yes <text:s/>female <text:s/>29.0 <text:s text:c="2"/>1st</text:p>
      <text:p text:style-name="Preformatted_20_Text">27 <text:s text:c="2"/>Bishop, Mrs. Dickinson H (Helen <text:s text:c="5"/>yes <text:s/>female <text:s/>19.0 <text:s text:c="2"/>1st</text:p>
      <text:p text:style-name="Preformatted_20_Text">28 <text:s text:c="11"/>Bissette, Miss. Amelia <text:s text:c="5"/>yes <text:s/>female <text:s/>35.0 <text:s text:c="2"/>1st</text:p>
      <text:p text:style-name="Preformatted_20_Text">32 <text:s text:c="10"/>Bonnell, Miss. Caroline <text:s text:c="5"/>yes <text:s/>female <text:s/>30.0 <text:s text:c="2"/>1st</text:p>
      <text:p text:style-name="Preformatted_20_Text">33 <text:s text:c="9"/>Bonnell, Miss. Elizabeth <text:s text:c="5"/>yes <text:s/>female <text:s/>58.0 <text:s text:c="2"/>1st</text:p>
      <text:p text:style-name="Preformatted_20_Text">35 <text:s text:c="9"/>Bowen, Miss. Grace Scott <text:s text:c="5"/>yes <text:s/>female <text:s/>45.0 <text:s text:c="2"/>1st</text:p>
      <text:p text:style-name="Preformatted_20_Text">36 <text:s text:c="6"/>Bowerman, Miss. Elsie Edith <text:s text:c="5"/>yes <text:s/>female <text:s/>22.0 <text:s text:c="2"/>1st</text:p>
      <text:p text:style-name="Preformatted_20_Text">41 <text:s text:c="2"/>Brown, Mrs. James Joseph (Marga <text:s text:c="5"/>yes <text:s/>female <text:s/>44.0 <text:s text:c="2"/>1st</text:p>
      <text:p text:style-name="Preformatted_20_Text">42 <text:s text:c="2"/>Brown, Mrs. John Murray (Caroli <text:s text:c="5"/>yes <text:s/>female <text:s/>59.0 <text:s text:c="2"/>1st</text:p>
      <text:p text:style-name="Preformatted_20_Text">43 <text:s text:c="2"/>Bucknell, Mrs. William Robert ( <text:s text:c="5"/>yes <text:s/>female <text:s/>60.0 <text:s text:c="2"/>1st</text:p>
      <text:p text:style-name="Preformatted_20_Text">44 <text:s text:c="2"/>Burns, Miss. Elizabeth Margaret <text:s text:c="5"/>yes <text:s/>female <text:s/>41.0 <text:s text:c="2"/>1st</text:p>
      <text:p text:style-name="Preformatted_20_Text">48 <text:s text:c="2"/>Candee, Mrs. Edward (Helen Chur <text:s text:c="5"/>yes <text:s/>female <text:s/>53.0 <text:s text:c="2"/>1st</text:p>
      <text:p text:style-name="Preformatted_20_Text">50 <text:s text:c="2"/>Cardeza, Mrs. James Warburton M <text:s text:c="5"/>yes <text:s/>female <text:s/>58.0 <text:s text:c="2"/>1st</text:p>
      <text:p text:style-name="Preformatted_20_Text">55 <text:s text:c="8"/>Carter, Miss. Lucile Polk <text:s text:c="5"/>yes <text:s/>female <text:s/>14.0 <text:s text:c="2"/>1st</text:p>
      <text:p text:style-name="Preformatted_20_Text">57 <text:s text:c="2"/>Carter, Mrs. William Ernest (Lu <text:s text:c="5"/>yes <text:s/>female <text:s/>36.0 <text:s text:c="2"/>1st</text:p>
      <text:p text:style-name="Preformatted_20_Text">59 <text:s text:c="2"/>Cassebeer, Mrs. Henry Arthur Jr <text:s text:c="5"/>yes <text:s/>female <text:s text:c="2"/>NaN <text:s text:c="2"/>1st</text:p>
      <text:p text:style-name="Preformatted_20_Text">61 <text:s text:c="3"/>Cavendish, Mrs. Tyrell William <text:s text:c="5"/>yes <text:s/>female <text:s/>76.0 <text:s text:c="2"/>1st</text:p>
      <text:p text:style-name="Preformatted_20_Text">63 <text:s text:c="2"/>Chaffee, Mrs. Herbert Fuller (C <text:s text:c="5"/>yes <text:s/>female <text:s/>47.0 <text:s text:c="2"/>1st</text:p>
      <text:p text:style-name="Preformatted_20_Text">65 <text:s text:c="3"/>Chambers, Mrs. Norman Campbell <text:s text:c="5"/>yes <text:s/>female <text:s/>33.0 <text:s text:c="2"/>1st</text:p>
      <text:p text:style-name="Preformatted_20_Text"><text:soft-page-break/>66 <text:s text:c="6"/>Chaudanson, Miss. Victorine <text:s text:c="5"/>yes <text:s/>female <text:s/>36.0 <text:s text:c="2"/>1st</text:p>
      <text:p text:style-name="Preformatted_20_Text">67 <text:s text:c="13"/>Cherry, Miss. Gladys <text:s text:c="5"/>yes <text:s/>female <text:s/>30.0 <text:s text:c="2"/>1st</text:p>
      <text:p text:style-name="Preformatted_20_Text">69 <text:s text:c="2"/>Chibnall, Mrs. (Edith Martha Bo <text:s text:c="5"/>yes <text:s/>female <text:s text:c="2"/>NaN <text:s text:c="2"/>1st</text:p>
      <text:p text:style-name="Preformatted_20_Text">72 <text:s text:c="2"/>Clark, Mrs. Walter Miller (Virg <text:s text:c="5"/>yes <text:s/>female <text:s/>26.0 <text:s text:c="2"/>1st</text:p>
      <text:p text:style-name="Preformatted_20_Text">73 <text:s text:c="13"/>Cleaver, Miss. Alice <text:s text:c="5"/>yes <text:s/>female <text:s/>22.0 <text:s text:c="2"/>1st</text:p>
      <text:p text:style-name="Preformatted_20_Text">76 <text:s text:c="6"/>Compton, Miss. Sara Rebecca <text:s text:c="5"/>yes <text:s/>female <text:s/>39.0 <text:s text:c="2"/>1st</text:p>
      <text:p text:style-name="Preformatted_20_Text">78 <text:s text:c="3"/>Compton, Mrs. Alexander Taylor <text:s text:c="5"/>yes <text:s/>female <text:s/>64.0 <text:s text:c="2"/>1st</text:p>
      <text:p text:style-name="Preformatted_20_Text">79 <text:s text:c="2"/>Cornell, Mrs. Robert Clifford ( <text:s text:c="5"/>yes <text:s/>female <text:s/>55.0 <text:s text:c="2"/>1st</text:p>
      <text:p text:style-name="Preformatted_20_Text">82 <text:s text:c="10"/>Crosby, Miss. Harriet R <text:s text:c="5"/>yes <text:s/>female <text:s/>36.0 <text:s text:c="2"/>1st</text:p>
      <text:p text:style-name="Preformatted_20_Text">83 <text:s text:c="2"/>Crosby, Mrs. Edward Gifford (Ca <text:s text:c="5"/>yes <text:s/>female <text:s/>64.0 <text:s text:c="2"/>1st</text:p>
      <text:p text:style-name="Preformatted_20_Text">85 <text:s text:c="2"/>Cumings, Mrs. John Bradley (Flo <text:s text:c="5"/>yes <text:s/>female <text:s/>38.0 <text:s text:c="2"/>1st</text:p>
      <text:p text:style-name="Preformatted_20_Text">88 <text:s text:c="13"/>Daniels, Miss. Sarah <text:s text:c="5"/>yes <text:s/>female <text:s/>33.0 <text:s text:c="2"/>1st</text:p>
      <text:p text:style-name="Preformatted_20_Text">90 <text:s text:c="3"/>Davidson, Mrs. Thornton (Orian <text:s text:c="5"/>yes <text:s/>female <text:s/>27.0 <text:s text:c="2"/>1st</text:p>
      <text:p text:style-name="Preformatted_20_Text">92 <text:s text:c="3"/>Dick, Mrs. Albert Adrian (Vera <text:s text:c="5"/>yes <text:s/>female <text:s/>17.0 <text:s text:c="2"/>1st</text:p>
      <text:p text:style-name="Preformatted_20_Text">95 <text:s text:c="2"/>Dodge, Mrs. Washington (Ruth Vi <text:s text:c="5"/>yes <text:s/>female <text:s/>54.0 <text:s text:c="2"/>1st</text:p>
      <text:p text:style-name="Preformatted_20_Text">97 <text:s text:c="2"/>Douglas, Mrs. Frederick Charles <text:s text:c="5"/>yes <text:s/>female <text:s/>27.0 <text:s text:c="2"/>1st</text:p>
      <text:p text:style-name="Preformatted_20_Text">98 <text:s text:c="2"/>Douglas, Mrs. Walter Donald (Ma <text:s text:c="5"/>yes <text:s/>female <text:s/>48.0 <text:s text:c="2"/>1st</text:p>
      <text:p text:style-name="Preformatted_20_Text">99 <text:s text:c="2"/>Duff Gordon, Lady. (Lucille Chr <text:s text:c="5"/>yes <text:s/>female <text:s/>48.0 <text:s text:c="2"/>1st</text:p>
      <text:p text:style-name="Preformatted_20_Text">102 <text:s/>Earnshaw, Mrs. Boulton (Olive P <text:s text:c="5"/>yes <text:s/>female <text:s/>23.0 <text:s text:c="2"/>1st</text:p>
      <text:p text:style-name="Preformatted_20_Text">103 <text:s text:c="3"/>Endres, Miss. Caroline Louise <text:s text:c="5"/>yes <text:s/>female <text:s/>38.0 <text:s text:c="2"/>1st</text:p>
      <text:p text:style-name="Preformatted_20_Text">104 <text:s text:c="2"/>Eustis, Miss. Elizabeth Mussey <text:s text:c="5"/>yes <text:s/>female <text:s/>54.0 <text:s text:c="2"/>1st</text:p>
      <text:p text:style-name="Preformatted_20_Text">105 <text:s text:c="8"/>Evans, Miss. Edith Corse <text:s text:c="6"/>no <text:s/>female <text:s/>36.0 <text:s text:c="2"/>1st</text:p>
      <text:p text:style-name="Preformatted_20_Text">107 <text:s/>Flegenheim, Mrs. Alfred (Antoin <text:s text:c="5"/>yes <text:s/>female <text:s text:c="2"/>NaN <text:s text:c="2"/>1st</text:p>
      <text:p text:style-name="Preformatted_20_Text">108 <text:s text:c="9"/>Fleming, Miss. Margaret <text:s text:c="5"/>yes <text:s/>female <text:s text:c="2"/>NaN <text:s text:c="2"/>1st</text:p>
      <text:p text:style-name="Preformatted_20_Text">111 <text:s text:c="2"/>Fortune, Miss. Alice Elizabeth <text:s text:c="5"/>yes <text:s/>female <text:s/>24.0 <text:s text:c="2"/>1st</text:p>
      <text:p text:style-name="Preformatted_20_Text">112 <text:s text:c="6"/>Fortune, Miss. Ethel Flora <text:s text:c="5"/>yes <text:s/>female <text:s/>28.0 <text:s text:c="2"/>1st</text:p>
      <text:p text:style-name="Preformatted_20_Text">113 <text:s text:c="6"/>Fortune, Miss. Mabel Helen <text:s text:c="5"/>yes <text:s/>female <text:s/>23.0 <text:s text:c="2"/>1st</text:p>
      <text:p text:style-name="Preformatted_20_Text">116 <text:s/>Fortune, Mrs. Mark (Mary McDoug <text:s text:c="5"/>yes <text:s/>female <text:s/>60.0 <text:s text:c="2"/>1st</text:p>
      <text:p text:style-name="Preformatted_20_Text">117 <text:s text:c="2"/>Francatelli, Miss. Laura Mabel <text:s text:c="5"/>yes <text:s/>female <text:s/>30.0 <text:s text:c="2"/>1st</text:p>
      <text:p text:style-name="Preformatted_20_Text">121 <text:s text:c="2"/>Frauenthal, Mrs. Henry William <text:s text:c="5"/>yes <text:s/>female <text:s text:c="2"/>NaN <text:s text:c="2"/>1st</text:p>
      <text:p text:style-name="Preformatted_20_Text">122 <text:s/>Frolicher, Miss. Hedwig Margari <text:s text:c="5"/>yes <text:s/>female <text:s/>22.0 <text:s text:c="2"/>1st</text:p>
      <text:p text:style-name="Preformatted_20_Text">124 <text:s/>Frolicher-Stehli, Mrs. Maxmilli <text:s text:c="5"/>yes <text:s/>female <text:s/>48.0 <text:s text:c="2"/>1st</text:p>
      <text:p text:style-name="Preformatted_20_Text">127 <text:s/>Futrelle, Mrs. Jacques Heath (L <text:s text:c="5"/>yes <text:s/>female <text:s/>35.0 <text:s text:c="2"/>1st</text:p>
      <text:p text:style-name="Preformatted_20_Text">129 <text:s text:c="12"/>Geiger, Miss. Amalie <text:s text:c="5"/>yes <text:s/>female <text:s/>35.0 <text:s text:c="2"/>1st</text:p>
      <text:p text:style-name="Preformatted_20_Text">130 <text:s text:c="2"/>Gibson, Miss. Dorothy Winifred <text:s text:c="5"/>yes <text:s/>female <text:s/>22.0 <text:s text:c="2"/>1st</text:p>
      <text:p text:style-name="Preformatted_20_Text">131 <text:s/>Gibson, Mrs. Leonard (Pauline C <text:s text:c="5"/>yes <text:s/>female <text:s/>45.0 <text:s text:c="2"/>1st</text:p>
      <text:p text:style-name="Preformatted_20_Text">134 <text:s/>Goldenberg, Mrs. Samuel L (Edwi <text:s text:c="5"/>yes <text:s/>female <text:s text:c="2"/>NaN <text:s text:c="2"/>1st</text:p>
      <text:p text:style-name="Preformatted_20_Text">137 <text:s text:c="4"/>Graham, Miss. Margaret Edith <text:s text:c="5"/>yes <text:s/>female <text:s/>19.0 <text:s text:c="2"/>1st</text:p>
      <text:p text:style-name="Preformatted_20_Text">139 <text:s/>Graham, Mrs. William Thompson ( <text:s text:c="5"/>yes <text:s/>female <text:s/>58.0 <text:s text:c="2"/>1st</text:p>
      <text:p text:style-name="Preformatted_20_Text">141 <text:s/>Greenfield, Mrs. Leo David (Bla <text:s text:c="5"/>yes <text:s/>female <text:s/>45.0 <text:s text:c="2"/>1st</text:p>
      <text:p text:style-name="Preformatted_20_Text">144 <text:s/>Harder, Mrs. George Achilles (D <text:s text:c="5"/>yes <text:s/>female <text:s/>25.0 <text:s text:c="2"/>1st</text:p>
      <text:p text:style-name="Preformatted_20_Text">146 <text:s/>Harper, Mrs. Henry Sleeper (Myn <text:s text:c="5"/>yes <text:s/>female <text:s/>49.0 <text:s text:c="2"/>1st</text:p>
      <text:p text:style-name="Preformatted_20_Text">149 <text:s/>Harris, Mrs. Henry Birkhardt (I <text:s text:c="5"/>yes <text:s/>female <text:s/>35.0 <text:s text:c="2"/>1st</text:p>
      <text:p text:style-name="Preformatted_20_Text">153 <text:s text:c="2"/>Hays, Miss. Margaret Bechstein <text:s text:c="5"/>yes <text:s/>female <text:s/>24.0 <text:s text:c="2"/>1st</text:p>
      <text:p text:style-name="Preformatted_20_Text">155 <text:s/>Hays, Mrs. Charles Melville (Cl <text:s text:c="5"/>yes <text:s/>female <text:s/>52.0 <text:s text:c="2"/>1st</text:p>
      <text:p text:style-name="Preformatted_20_Text">159 <text:s text:c="4"/>Hippach, Miss. Jean Gertrude <text:s text:c="5"/>yes <text:s/>female <text:s/>16.0 <text:s text:c="2"/>1st</text:p>
      <text:p text:style-name="Preformatted_20_Text">160 <text:s/>Hippach, Mrs. Louis Albert (Ida <text:s text:c="5"/>yes <text:s/>female <text:s/>44.0 <text:s text:c="2"/>1st</text:p>
      <text:p text:style-name="Preformatted_20_Text">161 <text:s/>Hogeboom, Mrs. John C (Anna And <text:s text:c="5"/>yes <text:s/>female <text:s/>51.0 <text:s text:c="2"/>1st</text:p>
      <text:p text:style-name="Preformatted_20_Text">163 <text:s/>Holverson, Mrs. Alexander Oskar <text:s text:c="5"/>yes <text:s/>female <text:s/>35.0 <text:s text:c="2"/>1st</text:p>
      <text:p text:style-name="Preformatted_20_Text">167 <text:s/>Hoyt, Mrs. Frederick Maxfield ( <text:s text:c="5"/>yes <text:s/>female <text:s/>35.0 <text:s text:c="2"/>1st</text:p>
      <text:p text:style-name="Preformatted_20_Text">168 <text:s text:c="13"/>Icard, Miss. Amelie <text:s text:c="5"/>yes <text:s/>female <text:s/>38.0 <text:s text:c="2"/>1st</text:p>
      <text:p text:style-name="Preformatted_20_Text">169 <text:s text:c="6"/>Isham, Miss. Ann Elizabeth <text:s text:c="6"/>no <text:s/>female <text:s/>50.0 <text:s text:c="2"/>1st</text:p>
      <text:p text:style-name="Preformatted_20_Text">176 <text:s/>Kenyon, Mrs. Frederick R (Mario <text:s text:c="5"/>yes <text:s/>female <text:s text:c="2"/>NaN <text:s text:c="2"/>1st</text:p>
      <text:p text:style-name="Preformatted_20_Text">178 <text:s/>Kimball, Mrs. Edwin Nelson Jr ( <text:s text:c="5"/>yes <text:s/>female <text:s/>45.0 <text:s text:c="2"/>1st</text:p>
      <text:p text:style-name="Preformatted_20_Text">180 <text:s text:c="10"/>Kreuchen, Miss. Emilie <text:s text:c="5"/>yes <text:s/>female <text:s/>39.0 <text:s text:c="2"/>1st</text:p>
      <text:p text:style-name="Preformatted_20_Text">181 <text:s text:c="5"/>Leader, Dr. Alice (Farnham) <text:s text:c="5"/>yes <text:s/>female <text:s/>49.0 <text:s text:c="2"/>1st</text:p>
      <text:p text:style-name="Preformatted_20_Text">182 <text:s text:c="13"/>LeRoy, Miss. Bertha <text:s text:c="5"/>yes <text:s/>female <text:s/>30.0 <text:s text:c="2"/>1st</text:p>
      <text:p text:style-name="Preformatted_20_Text">186 <text:s/>Lindstrom, Mrs. Carl Johan (Sig <text:s text:c="5"/>yes <text:s/>female <text:s/>55.0 <text:s text:c="2"/>1st</text:p>
      <text:p text:style-name="Preformatted_20_Text">187 <text:s text:c="7"/>Lines, Miss. Mary Conover <text:s text:c="5"/>yes <text:s/>female <text:s/>16.0 <text:s text:c="2"/>1st</text:p>
      <text:p text:style-name="Preformatted_20_Text">188 <text:s/>Lines, Mrs. Ernest H (Elizabeth <text:s text:c="5"/>yes <text:s/>female <text:s/>51.0 <text:s text:c="2"/>1st</text:p>
      <text:p text:style-name="Preformatted_20_Text">190 <text:s text:c="3"/>Longley, Miss. Gretchen Fiske <text:s text:c="5"/>yes <text:s/>female <text:s/>21.0 <text:s text:c="2"/>1st</text:p>
      <text:p text:style-name="Preformatted_20_Text">192 <text:s text:c="12"/>Lurette, Miss. Elise <text:s text:c="5"/>yes <text:s/>female <text:s/>58.0 <text:s text:c="2"/>1st</text:p>
      <text:p text:style-name="Preformatted_20_Text">193 <text:s/>Madill, Miss. Georgette Alexand <text:s text:c="5"/>yes <text:s/>female <text:s/>15.0 <text:s text:c="2"/>1st</text:p>
      <text:p text:style-name="Preformatted_20_Text">195 <text:s text:c="11"/>Maioni, Miss. Roberta <text:s text:c="5"/>yes <text:s/>female <text:s/>16.0 <text:s text:c="2"/>1st</text:p>
      <text:p text:style-name="Preformatted_20_Text"><text:soft-page-break/>198 <text:s/>Marvin, Mrs. Daniel Warner (Mar <text:s text:c="5"/>yes <text:s/>female <text:s/>18.0 <text:s text:c="2"/>1st</text:p>
      <text:p text:style-name="Preformatted_20_Text">199 <text:s text:c="2"/>Mayne, Mlle. Berthe Antonine ( <text:s text:c="5"/>yes <text:s/>female <text:s/>24.0 <text:s text:c="2"/>1st</text:p>
      <text:p text:style-name="Preformatted_20_Text">204 <text:s/>Meyer, Mrs. Edgar Joseph (Leila <text:s text:c="5"/>yes <text:s/>female <text:s text:c="2"/>NaN <text:s text:c="2"/>1st</text:p>
      <text:p text:style-name="Preformatted_20_Text">207 <text:s text:c="10"/>Minahan, Miss. Daisy E <text:s text:c="5"/>yes <text:s/>female <text:s/>33.0 <text:s text:c="2"/>1st</text:p>
      <text:p text:style-name="Preformatted_20_Text">208 <text:s/>Minahan, Mrs. William Edward (L <text:s text:c="5"/>yes <text:s/>female <text:s/>37.0 <text:s text:c="2"/>1st</text:p>
      <text:p text:style-name="Preformatted_20_Text">213 <text:s text:c="9"/>Newell, Miss. Madeleine <text:s text:c="5"/>yes <text:s/>female <text:s/>31.0 <text:s text:c="2"/>1st</text:p>
      <text:p text:style-name="Preformatted_20_Text">214 <text:s text:c="10"/>Newell, Miss. Marjorie <text:s text:c="5"/>yes <text:s/>female <text:s/>23.0 <text:s text:c="2"/>1st</text:p>
      <text:p text:style-name="Preformatted_20_Text">216 <text:s text:c="4"/>Newsom, Miss. Helen Monypeny <text:s text:c="5"/>yes <text:s/>female <text:s/>19.0 <text:s text:c="2"/>1st</text:p>
      <text:p text:style-name="Preformatted_20_Text">218 <text:s text:c="4"/>Oliva y Ocana, Dona. Fermina <text:s text:c="5"/>yes <text:s/>female <text:s/>39.0 <text:s text:c="2"/>1st</text:p>
      <text:p text:style-name="Preformatted_20_Text">220 <text:s text:c="4"/>Ostby, Miss. Helene Ragnhild <text:s text:c="5"/>yes <text:s/>female <text:s/>22.0 <text:s text:c="2"/>1st</text:p>
      <text:p text:style-name="Preformatted_20_Text">227 <text:s/>Pears, Mrs. Thomas (Edith Wearn <text:s text:c="5"/>yes <text:s/>female <text:s/>22.0 <text:s text:c="2"/>1st</text:p>
      <text:p text:style-name="Preformatted_20_Text">229 <text:s/>Penasco y Castellana, Mrs. Vict <text:s text:c="5"/>yes <text:s/>female <text:s/>17.0 <text:s text:c="2"/>1st</text:p>
      <text:p text:style-name="Preformatted_20_Text">230 <text:s text:c="11"/>Perreault, Miss. Anne <text:s text:c="5"/>yes <text:s/>female <text:s/>30.0 <text:s text:c="2"/>1st</text:p>
      <text:p text:style-name="Preformatted_20_Text">233 <text:s/>Potter, Mrs. Thomas Jr (Lily Al <text:s text:c="5"/>yes <text:s/>female <text:s/>56.0 <text:s text:c="2"/>1st</text:p>
      <text:p text:style-name="Preformatted_20_Text">238 <text:s/>Robert, Mrs. Edward Scott (Elis <text:s text:c="5"/>yes <text:s/>female <text:s/>43.0 <text:s text:c="2"/>1st</text:p>
      <text:p text:style-name="Preformatted_20_Text">242 <text:s text:c="3"/>Rosenbaum, Miss. Edith Louise <text:s text:c="5"/>yes <text:s/>female <text:s/>33.0 <text:s text:c="2"/>1st</text:p>
      <text:p text:style-name="Preformatted_20_Text">245 <text:s text:c="2"/>Rothes, the Countess. of (Lucy <text:s text:c="5"/>yes <text:s/>female <text:s/>33.0 <text:s text:c="2"/>1st</text:p>
      <text:p text:style-name="Preformatted_20_Text">247 <text:s/>Rothschild, Mrs. Martin (Elizab <text:s text:c="5"/>yes <text:s/>female <text:s/>54.0 <text:s text:c="2"/>1st</text:p>
      <text:p text:style-name="Preformatted_20_Text">250 <text:s text:c="6"/>Ryerson, Miss. Emily Borie <text:s text:c="5"/>yes <text:s/>female <text:s/>18.0 <text:s text:c="2"/>1st</text:p>
      <text:p text:style-name="Preformatted_20_Text">251 <text:s text:c="2"/>Ryerson, Miss. Susan Parker Su <text:s text:c="5"/>yes <text:s/>female <text:s/>21.0 <text:s text:c="2"/>1st</text:p>
      <text:p text:style-name="Preformatted_20_Text">253 <text:s/>Ryerson, Mrs. Arthur Larned (Em <text:s text:c="5"/>yes <text:s/>female <text:s/>48.0 <text:s text:c="2"/>1st</text:p>
      <text:p text:style-name="Preformatted_20_Text">255 <text:s text:c="12"/>Sagesser, Mlle. Emma <text:s text:c="5"/>yes <text:s/>female <text:s/>24.0 <text:s text:c="2"/>1st</text:p>
      <text:p text:style-name="Preformatted_20_Text">257 <text:s/>Schabert, Mrs. Paul (Emma Mock) <text:s text:c="5"/>yes <text:s/>female <text:s/>35.0 <text:s text:c="2"/>1st</text:p>
      <text:p text:style-name="Preformatted_20_Text">258 <text:s text:c="9"/>Serepeca, Miss. Augusta <text:s text:c="5"/>yes <text:s/>female <text:s/>30.0 <text:s text:c="2"/>1st</text:p>
      <text:p text:style-name="Preformatted_20_Text">260 <text:s text:c="7"/>Shutes, Miss. Elizabeth W <text:s text:c="5"/>yes <text:s/>female <text:s/>40.0 <text:s text:c="2"/>1st</text:p>
      <text:p text:style-name="Preformatted_20_Text">263 <text:s/>Silvey, Mrs. William Baird (Ali <text:s text:c="5"/>yes <text:s/>female <text:s/>39.0 <text:s text:c="2"/>1st</text:p>
      <text:p text:style-name="Preformatted_20_Text">270 <text:s/>Smith, Mrs. Lucien Philip (Mary <text:s text:c="5"/>yes <text:s/>female <text:s/>18.0 <text:s text:c="2"/>1st</text:p>
      <text:p text:style-name="Preformatted_20_Text">272 <text:s/>Snyder, Mrs. John Pillsbury (Ne <text:s text:c="5"/>yes <text:s/>female <text:s/>23.0 <text:s text:c="2"/>1st</text:p>
      <text:p text:style-name="Preformatted_20_Text">275 <text:s/>Spedden, Mrs. Frederic Oakley ( <text:s text:c="5"/>yes <text:s/>female <text:s/>40.0 <text:s text:c="2"/>1st</text:p>
      <text:p text:style-name="Preformatted_20_Text">277 <text:s text:c="2"/>Spencer, Mrs. William Augustus <text:s text:c="5"/>yes <text:s/>female <text:s text:c="2"/>NaN <text:s text:c="2"/>1st</text:p>
      <text:p text:style-name="Preformatted_20_Text">281 <text:s/>Stengel, Mrs. Charles Emil Henr <text:s text:c="5"/>yes <text:s/>female <text:s/>43.0 <text:s text:c="2"/>1st</text:p>
      <text:p text:style-name="Preformatted_20_Text">282 <text:s/>Stephenson, Mrs. Walter Bertram <text:s text:c="5"/>yes <text:s/>female <text:s/>52.0 <text:s text:c="2"/>1st</text:p>
      <text:p text:style-name="Preformatted_20_Text">284 <text:s/>Stone, Mrs. George Nelson (Mart <text:s text:c="5"/>yes <text:s/>female <text:s/>62.0 <text:s text:c="2"/>1st</text:p>
      <text:p text:style-name="Preformatted_20_Text">286 <text:s/>Straus, Mrs. Isidor (Rosalie Id <text:s text:c="6"/>no <text:s/>female <text:s/>63.0 <text:s text:c="2"/>1st</text:p>
      <text:p text:style-name="Preformatted_20_Text">288 <text:s/>Swift, Mrs. Frederick Joel (Mar <text:s text:c="5"/>yes <text:s/>female <text:s/>48.0 <text:s text:c="2"/>1st</text:p>
      <text:p text:style-name="Preformatted_20_Text">289 <text:s text:c="13"/>Taussig, Miss. Ruth <text:s text:c="5"/>yes <text:s/>female <text:s/>18.0 <text:s text:c="2"/>1st</text:p>
      <text:p text:style-name="Preformatted_20_Text">291 <text:s/>Taussig, Mrs. Emil (Tillie Mand <text:s text:c="5"/>yes <text:s/>female <text:s/>39.0 <text:s text:c="2"/>1st</text:p>
      <text:p text:style-name="Preformatted_20_Text">293 <text:s/>Taylor, Mrs. Elmer Zebley (Juli <text:s text:c="5"/>yes <text:s/>female <text:s text:c="2"/>NaN <text:s text:c="2"/>1st</text:p>
      <text:p text:style-name="Preformatted_20_Text">296 <text:s/>Thayer, Mrs. John Borland (Mari <text:s text:c="5"/>yes <text:s/>female <text:s/>39.0 <text:s text:c="2"/>1st</text:p>
      <text:p text:style-name="Preformatted_20_Text">297 <text:s text:c="2"/>Thorne, Mrs. Gertrude Maybelle <text:s text:c="5"/>yes <text:s/>female <text:s text:c="2"/>NaN <text:s text:c="2"/>1st</text:p>
      <text:p text:style-name="Preformatted_20_Text">302 <text:s text:c="16"/>Ward, Miss. Anna <text:s text:c="5"/>yes <text:s/>female <text:s/>35.0 <text:s text:c="2"/>1st</text:p>
      <text:p text:style-name="Preformatted_20_Text">304 <text:s/>Warren, Mrs. Frank Manley (Anna <text:s text:c="5"/>yes <text:s/>female <text:s/>60.0 <text:s text:c="2"/>1st</text:p>
      <text:p text:style-name="Preformatted_20_Text">308 <text:s/>White, Mrs. John Stuart (Ella H <text:s text:c="5"/>yes <text:s/>female <text:s/>55.0 <text:s text:c="2"/>1st</text:p>
      <text:p text:style-name="Preformatted_20_Text">309 <text:s text:c="8"/>Wick, Miss. Mary Natalie <text:s text:c="5"/>yes <text:s/>female <text:s/>31.0 <text:s text:c="2"/>1st</text:p>
      <text:p text:style-name="Preformatted_20_Text">311 <text:s/>Wick, Mrs. George Dennick (Mary <text:s text:c="5"/>yes <text:s/>female <text:s/>45.0 <text:s text:c="2"/>1st</text:p>
      <text:p text:style-name="Preformatted_20_Text">314 <text:s/>Widener, Mrs. George Dunton (El <text:s text:c="5"/>yes <text:s/>female <text:s/>50.0 <text:s text:c="2"/>1st</text:p>
      <text:p text:style-name="Preformatted_20_Text">315 <text:s text:c="8"/>Willard, Miss. Constance <text:s text:c="5"/>yes <text:s/>female <text:s/>21.0 <text:s text:c="2"/>1st</text:p>
      <text:p text:style-name="Preformatted_20_Text">319 <text:s text:c="7"/>Wilson, Miss. Helen Alice <text:s text:c="5"/>yes <text:s/>female <text:s/>31.0 <text:s text:c="2"/>1st</text:p>
      <text:p text:style-name="Preformatted_20_Text">322 <text:s text:c="8"/>Young, Miss. Marie Grice <text:s text:c="5"/>yes <text:s/>female <text:s/>36.0 <text:s text:c="2"/>1st</text:p>
      <text:p text:style-name="Preformatted_20_Text"/>
      <text:p text:style-name="Preformatted_20_Text"><text:s/>Наймолодша серед них:</text:p>
      <text:p text:style-name="Preformatted_20_Text"><text:s text:c="27"/>name survived <text:s text:c="4"/>sex <text:s/>age class</text:p>
      <text:p text:style-name="Preformatted_20_Text">2 <text:s/>Allison, Miss. Helen Loraine <text:s text:c="6"/>no <text:s/>female <text:s/>2.0 <text:s text:c="2"/>1st</text:p>
      <text:p text:style-name="Preformatted_20_Text"/>
      <text:p text:style-name="Preformatted_20_Text"><text:s/>Найстарша серед них:</text:p>
      <text:p text:style-name="Preformatted_20_Text"><text:s text:c="30"/>name survived <text:s text:c="4"/>sex <text:s text:c="2"/>age class</text:p>
      <text:p text:style-name="Preformatted_20_Text">61 <text:s/>Cavendish, Mrs. Tyrell William <text:s text:c="5"/>yes <text:s/>female <text:s/>76.0 <text:s text:c="2"/>1st</text:p>
      <text:p text:style-name="Preformatted_20_Text"/>
      <text:p text:style-name="Preformatted_20_Text"><text:s/>Кількість вцілілих серед них:</text:p>
      <text:p text:style-name="Preformatted_20_Text">139</text:p>
      <text:p text:style-name="Preformatted_20_Text"/>
      <text:p text:style-name="Preformatted_20_Text">11. Було побудувано гістограму віку пасажирів за допомогою наступного коду:</text:p>
      <text:p text:style-name="Preformatted_20_Text">create_plot.py:</text:p>
      <text:p text:style-name="Preformatted_20_Text">import matplotlib.pyplot as plt</text:p>
      <text:p text:style-name="Preformatted_20_Text"><text:soft-page-break/>from titanic import titanic</text:p>
      <text:p text:style-name="Preformatted_20_Text"/>
      <text:p text:style-name="Preformatted_20_Text">titanic.hist(column="age")</text:p>
      <text:p text:style-name="Preformatted_20_Text">plt.savefig("histograms_t/titanic_age.png")</text:p>
      <text:p text:style-name="Preformatted_20_Text">plt.close()</text:p>
      <text:p text:style-name="Preformatted_20_Text"/>
      <text:p text:style-name="Preformatted_20_Text">Гістограма:</text:p>
      <text:p text:style-name="Preformatted_20_Text"><draw:frame draw:style-name="fr1" draw:name="Image5" text:anchor-type="as-char" svg:width="8.363cm" svg:height="6.272cm" draw:z-index="4"><draw:image xlink:href="Pictures/1000000100000280000001E04A0D9426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>Висновок</text:p>
      <text:p text:style-name="Preformatted_20_Text">В ході виконання лабораторної роботи я навчився виконувати первинну обробку даних, аналізувати та візуалізувати дані. Для цього було використано потужності мови програмування Python та бібліотек pandas, statistics і matplotlib. Я переконався в користі даних бібліотек, всі обчислення були виконані завдяки ним без проблем, на мені лишилось лише написання коду. Код був єдиним не простим моментом роботи, адже мова програмування для мене незвична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1T00:15:06.794302080</dc:date>
    <meta:editing-duration>PT4M23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33" meta:paragraph-count="1524" meta:word-count="9636" meta:character-count="91486" meta:non-whitespace-character-count="50710"/>
  </office:meta>
</office:document-meta>
</file>