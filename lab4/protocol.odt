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904F172603.png" manifest:media-type="image/png"/>
  <manifest:file-entry manifest:full-path="Pictures/10000001000002580000019056324B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142d15e"/>
    </style:style>
    <style:style style:name="P3" style:family="paragraph" style:parent-style-name="Preformatted_20_Text">
      <style:paragraph-properties fo:text-align="start" style:justify-single-word="false"/>
    </style:style>
    <style:style style:name="P4" style:family="paragraph" style:parent-style-name="Preformatted_20_Text">
      <style:text-properties officeooo:paragraph-rsid="0024b6db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4b6d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1154888" style:font-size-asian="12pt" style:font-size-complex="12pt"/>
    </style:style>
    <style:style style:name="P8" style:family="paragraph" style:parent-style-name="Preformatted_20_Text">
      <style:text-properties fo:font-size="12pt" officeooo:rsid="0117c5a9" officeooo:paragraph-rsid="0117c5a9" style:font-size-asian="12pt" style:font-size-complex="12pt"/>
    </style:style>
    <style:style style:name="P9" style:family="paragraph" style:parent-style-name="Preformatted_20_Text">
      <style:text-properties fo:font-size="12pt" officeooo:rsid="011ca582" officeooo:paragraph-rsid="011ca582" style:font-size-asian="12pt" style:font-size-complex="12pt"/>
    </style:style>
    <style:style style:name="P10" style:family="paragraph" style:parent-style-name="Preformatted_20_Text">
      <style:text-properties fo:font-size="12pt" officeooo:rsid="0127bc7a" style:font-size-asian="12pt" style:font-size-complex="12pt"/>
    </style:style>
    <style:style style:name="P1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style:text-underline-style="none" officeooo:rsid="00d52a01" officeooo:paragraph-rsid="00d52a01" style:font-size-asian="10.5pt" style:font-size-complex="12pt"/>
    </style:style>
    <style:style style:name="P13" style:family="paragraph" style:parent-style-name="Text_20_body">
      <style:text-properties fo:font-size="12pt" style:text-underline-style="none" officeooo:rsid="012189d3" officeooo:paragraph-rsid="012189d3" style:font-size-asian="10.5pt" style:font-size-complex="12pt"/>
    </style:style>
    <style:style style:name="P14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5" style:family="paragraph" style:parent-style-name="Text_20_body">
      <style:text-properties fo:font-size="12pt" style:text-underline-style="none" officeooo:rsid="01238f6c" officeooo:paragraph-rsid="01238f6c" style:font-size-asian="10.5pt" style:font-size-complex="12pt"/>
    </style:style>
    <style:style style:name="P16" style:family="paragraph" style:parent-style-name="Text_20_body">
      <style:text-properties fo:font-size="12pt" style:text-underline-style="none" officeooo:rsid="01245d81" officeooo:paragraph-rsid="01245d81" style:font-size-asian="10.5pt" style:font-size-complex="12pt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officeooo:rsid="0128d426" officeooo:paragraph-rsid="0128d426" style:font-size-asian="10.5pt" style:font-size-complex="12pt"/>
    </style:style>
    <style:style style:name="P18" style:family="paragraph" style:parent-style-name="Text_20_body">
      <style:text-properties fo:font-size="12pt" style:text-underline-style="none" officeooo:rsid="01290e84" officeooo:paragraph-rsid="01290e84" style:font-size-asian="10.5pt" style:font-size-complex="12pt"/>
    </style:style>
    <style:style style:name="P19" style:family="paragraph" style:parent-style-name="Text_20_body">
      <style:text-properties fo:font-size="12pt" style:text-underline-style="none" officeooo:rsid="012aacb1" officeooo:paragraph-rsid="012aacb1" style:font-size-asian="10.5pt" style:font-size-complex="12pt"/>
    </style:style>
    <style:style style:name="P20" style:family="paragraph" style:parent-style-name="Text_20_body">
      <style:text-properties fo:font-size="12pt" style:text-underline-style="solid" style:text-underline-width="auto" style:text-underline-color="font-color" officeooo:rsid="012aacb1" officeooo:paragraph-rsid="012aacb1" style:font-size-asian="10.5pt" style:font-size-complex="12pt"/>
    </style:style>
    <style:style style:name="P21" style:family="paragraph" style:parent-style-name="Text_20_body">
      <style:text-properties officeooo:paragraph-rsid="012bd5f4"/>
    </style:style>
    <style:style style:name="P22" style:family="paragraph" style:parent-style-name="Standard">
      <style:text-properties fo:font-size="12pt" style:text-underline-style="none" officeooo:rsid="012ec1bd" officeooo:paragraph-rsid="012bd5f4" style:font-size-asian="10.5pt" style:font-size-complex="12pt"/>
    </style:style>
    <style:style style:name="P23" style:family="paragraph" style:parent-style-name="Standard">
      <style:text-properties fo:font-size="12pt" style:text-underline-style="none" officeooo:rsid="012f6417" officeooo:paragraph-rsid="012f6417" style:font-size-asian="10.5pt" style:font-size-complex="12pt"/>
    </style:style>
    <style:style style:name="P24" style:family="paragraph" style:parent-style-name="Standard">
      <style:text-properties fo:font-size="12pt" style:text-underline-style="solid" style:text-underline-width="auto" style:text-underline-color="font-color" officeooo:rsid="012f6417" officeooo:paragraph-rsid="012f6417" style:font-size-asian="10.5pt" style:font-size-complex="12pt"/>
    </style:style>
    <style:style style:name="P25" style:family="paragraph" style:parent-style-name="Standard">
      <style:text-properties fo:font-size="12pt" style:text-underline-style="none" officeooo:rsid="012fc429" officeooo:paragraph-rsid="012fc429" style:font-size-asian="10.5pt" style:font-size-complex="12pt"/>
    </style:style>
    <style:style style:name="P26" style:family="paragraph" style:parent-style-name="Standard">
      <style:text-properties fo:font-size="12pt" style:text-underline-style="none" officeooo:rsid="013811f5" officeooo:paragraph-rsid="013811f5" style:font-size-asian="10.5pt" style:font-size-complex="12pt"/>
    </style:style>
    <style:style style:name="P27" style:family="paragraph" style:parent-style-name="Standard">
      <style:text-properties fo:font-size="12pt" style:text-underline-style="none" officeooo:rsid="0143f4f2" officeooo:paragraph-rsid="0143f4f2" style:font-size-asian="10.5pt" style:font-size-complex="12pt"/>
    </style:style>
    <style:style style:name="P28" style:family="paragraph" style:parent-style-name="Standard">
      <style:text-properties fo:font-size="12pt" style:text-underline-style="none" officeooo:rsid="01311e3e" officeooo:paragraph-rsid="01311e3e" style:font-size-asian="10.5pt" style:font-size-complex="12pt"/>
    </style:style>
    <style:style style:name="P29" style:family="paragraph" style:parent-style-name="Standard">
      <style:text-properties fo:font-size="12pt" style:text-underline-style="solid" style:text-underline-width="auto" style:text-underline-color="font-color" officeooo:rsid="01314cf1" officeooo:paragraph-rsid="01314cf1" style:font-size-asian="10.5pt" style:font-size-complex="12pt"/>
    </style:style>
    <style:style style:name="P30" style:family="paragraph" style:parent-style-name="Standard">
      <style:text-properties fo:font-size="12pt" style:text-underline-style="none" officeooo:rsid="01314cf1" officeooo:paragraph-rsid="01314cf1" style:font-size-asian="10.5pt" style:font-size-complex="12pt"/>
    </style:style>
    <style:style style:name="P31" style:family="paragraph" style:parent-style-name="Standard">
      <style:text-properties fo:font-size="12pt" style:text-underline-style="none" officeooo:rsid="013ae752" officeooo:paragraph-rsid="013ae752" style:font-size-asian="10.5pt" style:font-size-complex="12pt"/>
    </style:style>
    <style:style style:name="P32" style:family="paragraph" style:parent-style-name="Standard">
      <style:text-properties fo:font-size="12pt" style:text-underline-style="none" officeooo:rsid="01363cc6" officeooo:paragraph-rsid="01363cc6" style:font-size-asian="10.5pt" style:font-size-complex="12pt"/>
    </style:style>
    <style:style style:name="P33" style:family="paragraph" style:parent-style-name="Standard">
      <style:text-properties fo:font-size="12pt" style:text-underline-style="none" officeooo:rsid="01449866" officeooo:paragraph-rsid="01449866" style:font-size-asian="10.5pt" style:font-size-complex="12pt"/>
    </style:style>
    <style:style style:name="P34" style:family="paragraph" style:parent-style-name="Standard">
      <style:text-properties fo:font-size="12pt" style:text-underline-style="none" officeooo:rsid="013cce74" officeooo:paragraph-rsid="013cce74" style:font-size-asian="10.5pt" style:font-size-complex="12pt"/>
    </style:style>
    <style:style style:name="P35" style:family="paragraph" style:parent-style-name="Standard">
      <style:text-properties fo:font-size="12pt" style:text-underline-style="none" officeooo:rsid="013e1748" officeooo:paragraph-rsid="013e1748" style:font-size-asian="10.5pt" style:font-size-complex="12pt"/>
    </style:style>
    <style:style style:name="P3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3e1748" officeooo:paragraph-rsid="013e1748" style:font-size-asian="10pt" style:font-style-asian="normal" style:font-weight-asian="normal" style:font-size-complex="12pt"/>
    </style:style>
    <style:style style:name="P3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4dcc5e" officeooo:paragraph-rsid="014dcc5e" style:font-size-asian="10pt" style:font-style-asian="normal" style:font-weight-asian="normal" style:font-size-complex="12pt"/>
    </style:style>
    <style:style style:name="P3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4dcc5e" officeooo:paragraph-rsid="014dcc5e" style:font-size-asian="10pt" style:font-style-asian="normal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style:font-name="JetBrains Mono" fo:font-size="10pt" fo:font-style="normal" style:text-underline-style="solid" style:text-underline-width="auto" style:text-underline-color="font-color" fo:font-weight="normal" officeooo:rsid="013f8a03" officeooo:paragraph-rsid="013f8a03" style:font-size-asian="10pt" style:font-style-asian="normal" style:font-weight-asian="normal" style:font-size-complex="12pt"/>
    </style:style>
    <style:style style:name="P40" style:family="paragraph" style:parent-style-name="Standard">
      <style:text-properties fo:color="#000000" loext:opacity="100%" style:font-name="JetBrains Mono" fo:font-size="10pt" fo:font-style="normal" style:text-underline-style="solid" style:text-underline-width="auto" style:text-underline-color="font-color" fo:font-weight="normal" officeooo:rsid="01401cae" officeooo:paragraph-rsid="01401cae" style:font-size-asian="10pt" style:font-style-asian="normal" style:font-weight-asian="normal" style:font-size-complex="12pt"/>
    </style:style>
    <style:style style:name="P4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401cae" officeooo:paragraph-rsid="01401cae" style:font-size-asian="10pt" style:font-style-asian="normal" style:font-weight-asian="normal" style:font-size-complex="12pt"/>
    </style:style>
    <style:style style:name="T1" style:family="text">
      <style:text-properties officeooo:rsid="0113e5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1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2" style:family="text">
      <style:text-properties fo:color="#aa492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3" style:family="text">
      <style:text-properties fo:color="#2aacb8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4" style:family="text">
      <style:text-properties fo:color="#6aab73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5" style:family="text">
      <style:text-properties fo:font-size="12pt" style:text-underline-style="none" officeooo:rsid="012bd5f4" style:font-size-asian="10.5pt" style:font-size-complex="12pt"/>
    </style:style>
    <style:style style:name="T16" style:family="text">
      <style:text-properties fo:font-size="12pt" style:text-underline-style="none" officeooo:rsid="012d7d3d" style:font-size-asian="10.5pt" style:font-size-complex="12pt"/>
    </style:style>
    <style:style style:name="T17" style:family="text">
      <style:text-properties fo:font-size="12pt" style:text-underline-style="none" officeooo:rsid="012ec1bd" style:font-size-asian="10.5pt" style:font-size-complex="12pt"/>
    </style:style>
    <style:style style:name="T18" style:family="text">
      <style:text-properties officeooo:rsid="012f864f"/>
    </style:style>
    <style:style style:name="T19" style:family="text">
      <style:text-properties officeooo:rsid="012fc429"/>
    </style:style>
    <style:style style:name="T2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officeooo:rsid="01314cf1"/>
    </style:style>
    <style:style style:name="T22" style:family="text">
      <style:text-properties officeooo:rsid="013ae752"/>
    </style:style>
    <style:style style:name="T23" style:family="text">
      <style:text-properties officeooo:rsid="0132bd4b"/>
    </style:style>
    <style:style style:name="T24" style:family="text">
      <style:text-properties officeooo:rsid="0133158c"/>
    </style:style>
    <style:style style:name="T25" style:family="text">
      <style:text-properties officeooo:rsid="0134f74e"/>
    </style:style>
    <style:style style:name="T26" style:family="text">
      <style:text-properties officeooo:rsid="0135ea59"/>
    </style:style>
    <style:style style:name="T27" style:family="text">
      <style:text-properties officeooo:rsid="0146afa6"/>
    </style:style>
    <style:style style:name="T28" style:family="text">
      <style:text-properties officeooo:rsid="01460190"/>
    </style:style>
    <style:style style:name="T29" style:family="text">
      <style:text-properties officeooo:rsid="014829d8"/>
    </style:style>
    <style:style style:name="T30" style:family="text">
      <style:text-properties officeooo:rsid="014ade0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4fc751" style:font-weight-asian="normal" style:font-weight-complex="normal"/>
    </style:style>
    <style:style style:name="T33" style:family="text">
      <style:text-properties fo:font-weight="normal" officeooo:rsid="014ade01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weight-complex="normal"/>
    </style:style>
    <style:style style:name="T36" style:family="text">
      <style:text-properties officeooo:rsid="014dcc5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4</text:span> </text:p>
      <text:p text:style-name="P1">з дисципліни «Прикладні задачі машинного навчання» </text:p>
      <text:p text:style-name="P1"/>
      <text:p text:style-name="P2">на тему «Класифікація методом k найближчих сусідів і набір даних Digits,</text:p>
      <text:p text:style-name="P2">частина 1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3"><text:s/></text:p>
      <text:p text:style-name="P3">Виконав: <text:s text:c="75"/></text:p>
      <text:p text:style-name="P3">Студент 2 курсу ФІОТ-у <text:s text:c="49"/></text:p>
      <text:p text:style-name="P3">групи ІМ-42 </text:p>
      <text:p text:style-name="P3">Ватолкін Михайло Андрійович</text:p>
      <text:p text:style-name="P3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><text:soft-page-break/></text:p>
      <text:p text:style-name="P4"/>
      <text:p text:style-name="P5">Постановка завдання</text:p>
      <text:p text:style-name="P6"/>
      <text:p text:style-name="P7">1. Для дослідження даних, візуалізуйте їх. Виведіть</text:p>
      <text:p text:style-name="P7">зображення перших 24 і 36 цифр з набору<text:line-break/></text:p>
      <text:p text:style-name="P6">2. Розбийте дані на навчальні та тестові, за замовчуванням</text:p>
      <text:p text:style-name="P6">train_test_split резервує 75% даних для навчання і 25% для тестування, змініть це.</text:p>
      <text:p text:style-name="P6"/>
      <text:p text:style-name="P6">3. Створити та навчити модель.</text:p>
      <text:p text:style-name="P6"/>
      <text:p text:style-name="P6">4. Виконайте прогнозування класів.</text:p>
      <text:p text:style-name="P6"/>
      <text:p text:style-name="P6">5. Порівняйте прогнозовані цифри з очікуваними для перших</text:p>
      <text:p text:style-name="P6">36 тестових зразків.</text:p>
      <text:p text:style-name="P8"/>
      <text:p text:style-name="P8">6. Поясніть результат, застосуйте метрики точності моделі.</text:p>
      <text:p text:style-name="P8"/>
      <text:p text:style-name="P8">7. Виведіть звіт класифікації.</text:p>
      <text:p text:style-name="P8"/>
      <text:p text:style-name="P8">8. Використайте декілька моделей KNeighborsClassifier, SVC</text:p>
      <text:p text:style-name="P8">и GaussianNB для пошуку найкращої.</text:p>
      <text:p text:style-name="P8"/>
      <text:p text:style-name="P9">9. Налаштуйте гіперпараметр K в KneighborsClassifier.</text:p>
      <text:p text:style-name="P9"/>
      <text:p text:style-name="P6"/>
      <text:p text:style-name="P6"/>
      <text:p text:style-name="Preformatted_20_Text"/>
      <text:p text:style-name="Preformatted_20_Text"/>
      <text:p text:style-name="Preformatted_20_Text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ext:p text:style-name="P6"/>
      <text:p text:style-name="P11">Виконання:</text:p>
      <text:p text:style-name="P11"/>
      <text:p text:style-name="P12"><text:span text:style-name="T2">Пункт 1</text:span>:</text:p>
      <text:p text:style-name="P12"/>
      <text:p text:style-name="P13">Отримаю набір даних і візуалізую його:</text:p>
      <text:p text:style-name="P14" loext:marker-style-name="T3"><text:span text:style-name="T4">from </text:span><text:span text:style-name="T3">sklearn.datasets </text:span><text:span text:style-name="T4">import </text:span><text:span text:style-name="T3">load_digits<text:line-break/></text:span><text:span text:style-name="T4">import </text:span><text:span text:style-name="T3">matplotlib.pyplot </text:span><text:span text:style-name="T4">as </text:span><text:span text:style-name="T3">plt<text:line-break/><text:line-break/>digits = load_digits()<text:line-break/><text:line-break/></text:span><text:span text:style-name="T4">def </text:span><text:span text:style-name="T5">show_digits</text:span><text:span text:style-name="T3">(axes, fname):<text:line-break/> <text:s text:c="3"/></text:span><text:span text:style-name="T4">for </text:span><text:span text:style-name="T3">item </text:span><text:span text:style-name="T4">in </text:span><text:span text:style-name="T6">zip</text:span><text:span text:style-name="T3">(axes.ravel(), digits.images, digits.target):<text:line-break/> <text:s text:c="7"/>axs, image, target = item<text:line-break/> <text:s text:c="7"/>axs.imshow(image, </text:span><text:span text:style-name="T7">cmap</text:span><text:span text:style-name="T3">=</text:span><text:span text:style-name="T8">'gray_r'</text:span><text:span text:style-name="T3">)<text:line-break/><text:line-break/> <text:s text:c="7"/>axs.set_xticks([])<text:line-break/> <text:s text:c="7"/>axs.set_yticks([])<text:line-break/><text:line-break/> <text:s text:c="7"/>axs.set_title(target)<text:line-break/><text:line-break/> <text:s text:c="3"/>plt.tight_layout()<text:line-break/> <text:s text:c="3"/>plt.savefig(</text:span><text:span text:style-name="T8">f'plots/</text:span><text:span text:style-name="T4">{</text:span><text:span text:style-name="T3">fname</text:span><text:span text:style-name="T4">}</text:span><text:span text:style-name="T8">.png'</text:span><text:span text:style-name="T3">)<text:line-break/> <text:s text:c="3"/>plt.close()<text:line-break/><text:line-break/>figure1, axes1 = plt.subplots(</text:span><text:span text:style-name="T7">nrows</text:span><text:span text:style-name="T3">=</text:span><text:span text:style-name="T9">4</text:span><text:span text:style-name="T3">, </text:span><text:span text:style-name="T7">ncols</text:span><text:span text:style-name="T3">=</text:span><text:span text:style-name="T9">6</text:span><text:span text:style-name="T3">, </text:span><text:span text:style-name="T7">figsize</text:span><text:span text:style-name="T3">=(</text:span><text:span text:style-name="T9">6</text:span><text:span text:style-name="T3">, </text:span><text:span text:style-name="T9">4</text:span><text:span text:style-name="T3">))<text:line-break/>show_digits(axes1, </text:span><text:span text:style-name="T8">'digits24'</text:span><text:span text:style-name="T3">)<text:line-break/>figure2, axes2 = plt.subplots(</text:span><text:span text:style-name="T7">nrows</text:span><text:span text:style-name="T3">=</text:span><text:span text:style-name="T9">4</text:span><text:span text:style-name="T3">, </text:span><text:span text:style-name="T7">ncols</text:span><text:span text:style-name="T3">=</text:span><text:span text:style-name="T9">8</text:span><text:span text:style-name="T3">, </text:span><text:span text:style-name="T7">figsize</text:span><text:span text:style-name="T3">=(</text:span><text:span text:style-name="T9">8</text:span><text:span text:style-name="T3">, </text:span><text:span text:style-name="T9">4</text:span><text:span text:style-name="T3">))<text:line-break/>show_digits(axes2, </text:span><text:span text:style-name="T8">'digits36'</text:span><text:span text:style-name="T3">)</text:span></text:p>
      <text:p text:style-name="P13"><text:s/></text:p>
      <text:p text:style-name="P13">В лабораторній роботі використовується набір даних зображень чисел від 0 до 9 розміро 8х8.</text:p>
      <text:p text:style-name="P15">Спочатку дані завантажуються, після чого створюється зображення перших 24 і 36 ентрі з набору. Візуалізація відбувається за рекомендованим в теоретичних матеріалах методом, зображення зберігаються в форматі .png .</text:p>
      <text:p text:style-name="P15">Створені зображення:</text:p>
      <text:p text:style-name="P15">---</text:p>
      <text:p text:style-name="P16">digits24.png <text:s text:c="36"/>digits36.png</text:p>
      <text:p text:style-name="P15"><draw:frame draw:style-name="fr1" draw:name="Image1" text:anchor-type="as-char" svg:width="5.281cm" svg:height="3.521cm" draw:z-index="0"><draw:image xlink:href="Pictures/10000001000002580000019056324BF2.png" xlink:type="simple" xlink:show="embed" xlink:actuate="onLoad" draw:mime-type="image/png"/></draw:frame><draw:frame draw:style-name="fr2" draw:name="Image2" text:anchor-type="char" svg:x="5.771cm" svg:y="-0.088cm" svg:width="8.396cm" svg:height="3.653cm" draw:z-index="1"><draw:image xlink:href="Pictures/1000000100000320000001904F172603.png" xlink:type="simple" xlink:show="embed" xlink:actuate="onLoad" draw:mime-type="image/png"/></draw:frame></text:p>
      <text:p text:style-name="P15">---</text:p>
      <text:p text:style-name="P15"><text:soft-page-break/></text:p>
      <text:p text:style-name="P17">Пункт 2:</text:p>
      <text:p text:style-name="P18">Розіб’ю дані на навчальні та тестові:</text:p>
      <text:p text:style-name="P14" loext:marker-style-name="T3"><text:span text:style-name="T10">from </text:span><text:span text:style-name="T11">sklearn.datasets </text:span><text:span text:style-name="T10">import </text:span><text:span text:style-name="T11">load_digits<text:line-break/></text:span><text:span text:style-name="T10">from </text:span><text:span text:style-name="T11">sklearn.model_selection </text:span><text:span text:style-name="T10">import </text:span><text:span text:style-name="T11">train_test_split<text:line-break/></text:span><text:span text:style-name="T10">import </text:span><text:span text:style-name="T11">numpy </text:span><text:span text:style-name="T10">as </text:span><text:span text:style-name="T11">np<text:line-break/><text:line-break/>digits = load_digits()<text:line-break/><text:line-break/>X_train, x_test, Y_train, y_test = train_test_split(digits.data, digits.target, </text:span><text:span text:style-name="T12">test_size </text:span><text:span text:style-name="T11">= </text:span><text:span text:style-name="T13">0.2</text:span><text:span text:style-name="T11">, </text:span><text:span text:style-name="T12">random_state </text:span><text:span text:style-name="T11">= </text:span><text:span text:style-name="T13">11</text:span><text:span text:style-name="T11">)<text:line-break/><text:line-break/>np.savez(</text:span><text:span text:style-name="T14">"shared/s_datasets.npz"</text:span><text:span text:style-name="T11">,<text:line-break/> <text:s text:c="8"/></text:span><text:span text:style-name="T12">X_train</text:span><text:span text:style-name="T11">=X_train,<text:line-break/> <text:s text:c="8"/></text:span><text:span text:style-name="T12">Y_train</text:span><text:span text:style-name="T11">=Y_train,<text:line-break/> <text:s text:c="8"/></text:span><text:span text:style-name="T12">x_test</text:span><text:span text:style-name="T11">=x_test,<text:line-break/> <text:s text:c="8"/></text:span><text:span text:style-name="T12">y_test</text:span><text:span text:style-name="T11">=y_test)</text:span><text:span text:style-name="T3"><text:line-break/></text:span></text:p>
      <text:p text:style-name="P13"><text:s/></text:p>
      <text:p text:style-name="P19">Знову завантажу дані, розділю ях на навчальні й тестові у співвідношенні 4:1 вже вивченим у минулій лабі методом.</text:p>
      <text:p text:style-name="P19">Збережу дані в архів формату .npz для зручного використання в інших модулях роботи.</text:p>
      <text:p text:style-name="P19"/>
      <text:p text:style-name="P20">Пункт 3:</text:p>
      <text:p text:style-name="P21"><text:span text:style-name="T15">Створю і навчу модель </text:span><text:span text:style-name="T16">k-NN алгоритму</text:span><text:span text:style-name="T17">:</text:span></text:p>
      <text:p text:style-name="P14" loext:marker-style-name="T3"><text:span text:style-name="T4">from </text:span><text:span text:style-name="T3">sklearn.neighbors </text:span><text:span text:style-name="T4">import </text:span><text:span text:style-name="T3">KNeighborsClassifier<text:line-break/></text:span><text:span text:style-name="T4">import </text:span><text:span text:style-name="T3">numpy </text:span><text:span text:style-name="T4">as </text:span><text:span text:style-name="T3">np<text:line-break/></text:span><text:span text:style-name="T4">import </text:span><text:span text:style-name="T3">joblib<text:line-break/><text:line-break/>data = np.load(</text:span><text:span text:style-name="T8">"shared/s_datasets.npz"</text:span><text:span text:style-name="T3">)<text:line-break/><text:line-break/>X_train = data[</text:span><text:span text:style-name="T8">"X_train"</text:span><text:span text:style-name="T3">]<text:line-break/>Y_train = data[</text:span><text:span text:style-name="T8">"Y_train"</text:span><text:span text:style-name="T3">]<text:line-break/><text:line-break/>knn = KNeighborsClassifier()<text:line-break/><text:line-break/>knn.fit(X_train, Y_train)<text:line-break/><text:line-break/>joblib.dump(knn, </text:span><text:span text:style-name="T8">"shared/knn_model.pkl"</text:span><text:span text:style-name="T3">)</text:span></text:p>
      <text:p text:style-name="P22"><text:s/></text:p>
      <text:p text:style-name="P23">Завантажу тренувальні дані, збережені в минулому пункті. Навчу модель на цих даних. Оскільки модель є пайтон об’єктом, збережу її в форматі .pkl <text:span text:style-name="T18">за допомогою бібліотеки joblib</text:span> для подальшого використання в інших модулях роботи.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Пункт<text:span text:style-name="T19">и</text:span> 4-<text:span text:style-name="T18">7</text:span>:</text:p>
      <text:p text:style-name="P24"/>
      <text:p text:style-name="P25">Створю код, що виконає одразу 4-7 пункти:</text:p>
      <text:p text:style-name="P25"/>
      <text:p text:style-name="P14" loext:marker-style-name="T3"><text:span text:style-name="T4">from </text:span><text:span text:style-name="T3">sklearn.metrics </text:span><text:span text:style-name="T4">import </text:span><text:span text:style-name="T3">confusion_matrix, classification_report<text:line-break/></text:span><text:span text:style-name="T4">import </text:span><text:span text:style-name="T3">numpy </text:span><text:span text:style-name="T4">as </text:span><text:span text:style-name="T3">np<text:line-break/></text:span><text:span text:style-name="T4">import </text:span><text:span text:style-name="T3">joblib<text:line-break/><text:line-break/>data = np.load(</text:span><text:span text:style-name="T8">"shared/s_datasets.npz"</text:span><text:span text:style-name="T3">)<text:line-break/>x_test = data[</text:span><text:span text:style-name="T8">"x_test"</text:span><text:span text:style-name="T3">]<text:line-break/>y_test = data[</text:span><text:span text:style-name="T8">"y_test"</text:span><text:span text:style-name="T3">]<text:line-break/><text:line-break/>knn = joblib.load(</text:span><text:span text:style-name="T8">"shared/knn_model.pkl"</text:span><text:span text:style-name="T3">)<text:line-break/><text:line-break/>predicted = knn.predict(x_test)<text:line-break/>expected = y_test<text:line-break/><text:line-break/></text:span><text:span text:style-name="T20">#print(f"Predicted:{predicted[:36]}")<text:line-break/>#print(f"Expected: {expected[:36]}")<text:line-break/><text:line-break/>#print(f"{knn.score(x_test, y_test):.2%}")<text:line-break/><text:line-break/>#print(f"{confusion_matrix(y_true=expected, y_pred=predicted)}")<text:line-break/><text:line-break/>#names = [str(dig) for dig in range(0,10)]<text:line-break/>#print(classification_report(expected, predicted, target_names=names))<text:line-break/><text:line-break/></text:span><text:span text:style-name="T6">print</text:span><text:span text:style-name="T3">(</text:span><text:span text:style-name="T8">"Pred vs Exp (first 36):"</text:span><text:span text:style-name="T3">)<text:line-break/></text:span><text:span text:style-name="T6">print</text:span><text:span text:style-name="T3">(</text:span><text:span text:style-name="T8">" "</text:span><text:span text:style-name="T3">.join(</text:span><text:span text:style-name="T8">f"</text:span><text:span text:style-name="T4">{</text:span><text:span text:style-name="T3">p</text:span><text:span text:style-name="T4">}</text:span><text:span text:style-name="T8">/</text:span><text:span text:style-name="T4">{</text:span><text:span text:style-name="T3">e</text:span><text:span text:style-name="T4">}</text:span><text:span text:style-name="T8">" </text:span><text:span text:style-name="T4">for </text:span><text:span text:style-name="T3">p, e </text:span><text:span text:style-name="T4">in </text:span><text:span text:style-name="T6">zip</text:span><text:span text:style-name="T3">(predicted[:</text:span><text:span text:style-name="T9">36</text:span><text:span text:style-name="T3">], expected[:</text:span><text:span text:style-name="T9">36</text:span><text:span text:style-name="T3">])))<text:line-break/><text:line-break/></text:span><text:span text:style-name="T6">print</text:span><text:span text:style-name="T3">(</text:span><text:span text:style-name="T8">f"</text:span><text:span text:style-name="T4">\n</text:span><text:span text:style-name="T8">Accuracy: </text:span><text:span text:style-name="T4">{</text:span><text:span text:style-name="T3">knn.score(x_test, y_test)</text:span><text:span text:style-name="T4">:</text:span><text:span text:style-name="T8">.2%</text:span><text:span text:style-name="T4">}</text:span><text:span text:style-name="T8">"</text:span><text:span text:style-name="T3">)<text:line-break/><text:line-break/></text:span><text:span text:style-name="T6">print</text:span><text:span text:style-name="T3">(</text:span><text:span text:style-name="T8">"</text:span><text:span text:style-name="T4">\n</text:span><text:span text:style-name="T8">Confusion matrix:"</text:span><text:span text:style-name="T3">)<text:line-break/>cm = confusion_matrix(expected, predicted)<text:line-break/></text:span><text:span text:style-name="T4">for </text:span><text:span text:style-name="T3">row </text:span><text:span text:style-name="T4">in </text:span><text:span text:style-name="T3">cm:<text:line-break/> <text:s text:c="3"/></text:span><text:span text:style-name="T6">print</text:span><text:span text:style-name="T3">(</text:span><text:span text:style-name="T8">" "</text:span><text:span text:style-name="T3">.join(</text:span><text:span text:style-name="T8">f"</text:span><text:span text:style-name="T4">{</text:span><text:span text:style-name="T3">num</text:span><text:span text:style-name="T4">:</text:span><text:span text:style-name="T8">3d</text:span><text:span text:style-name="T4">}</text:span><text:span text:style-name="T8">" </text:span><text:span text:style-name="T4">for </text:span><text:span text:style-name="T3">num </text:span><text:span text:style-name="T4">in </text:span><text:span text:style-name="T3">row))<text:line-break/><text:line-break/></text:span><text:span text:style-name="T6">print</text:span><text:span text:style-name="T3">(</text:span><text:span text:style-name="T8">"</text:span><text:span text:style-name="T4">\n</text:span><text:span text:style-name="T8">Report:"</text:span><text:span text:style-name="T3">)<text:line-break/>names = [</text:span><text:span text:style-name="T6">str</text:span><text:span text:style-name="T3">(i) </text:span><text:span text:style-name="T4">for </text:span><text:span text:style-name="T3">i </text:span><text:span text:style-name="T4">in </text:span><text:span text:style-name="T6">range</text:span><text:span text:style-name="T3">(</text:span><text:span text:style-name="T9">10</text:span><text:span text:style-name="T3">)]<text:line-break/></text:span><text:span text:style-name="T6">print</text:span><text:span text:style-name="T3">(classification_report(expected, predicted, </text:span><text:span text:style-name="T7">target_names</text:span><text:span text:style-name="T3">=names, </text:span><text:span text:style-name="T7">digits</text:span><text:span text:style-name="T3">=</text:span><text:span text:style-name="T9">4</text:span><text:span text:style-name="T3">))</text:span></text:p>
      <text:p text:style-name="P25"><text:s/></text:p>
      <text:p text:style-name="P25">Спочатку завантажуються тестові дані та кнн-модель. Модель виконує передбачення, після чого відбувається необхідний аналіз: виводяться порівняння прогнозів і очікування для перших 36 входжень, точність моделі на тестовому датасеті, матриця невідповідностей, звіт класифікації. <text:span text:style-name="T21">Мої частини коду закоментовані, а вивід всіх цих даних – згенерований ллм-кою код, яку я попросив зробити гарний вивід, за змістом і логікою ідентичний моєму коду.</text:span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<text:span text:style-name="T22">Результат виконання</text:span>:</text:p>
      <text:p text:style-name="P26"/>
      <text:p text:style-name="P26">---</text:p>
      <text:p text:style-name="P26">/home/misha/Documents/2sem26/ml/.venv/bin/python /home/misha/Documents/2sem26/ml/lab4/4-7-test.py </text:p>
      <text:p text:style-name="P26">Pred vs Exp (first 36):</text:p>
      <text:p text:style-name="P26">0/0 4/4 9/9 9/9 3/3 1/1 4/4 1/1 5/5 0/0 4/4 9/9 4/4 1/1 5/5 3/3 3/3 8/8 5/3 6/6 9/9 6/6 0/0 6/6 9/9 3/3 2/2 1/1 8/8 1/1 7/7 0/0 4/4 4/4 1/1 5/5</text:p>
      <text:p text:style-name="P26"/>
      <text:p text:style-name="P26">Accuracy: 98.61%</text:p>
      <text:p text:style-name="P26"/>
      <text:p text:style-name="P26">Confusion matrix:</text:p>
      <text:p text:style-name="P26"><text:s/>38 <text:s text:c="2"/>0 <text:s text:c="2"/>0 <text:s text:c="2"/>0 <text:s text:c="2"/>0 <text:s text:c="2"/>0 <text:s text:c="2"/>0 <text:s text:c="2"/>0 <text:s text:c="2"/>0 <text:s text:c="2"/>0</text:p>
      <text:p text:style-name="P26"><text:s text:c="2"/>0 <text:s/>37 <text:s text:c="2"/>0 <text:s text:c="2"/>0 <text:s text:c="2"/>0 <text:s text:c="2"/>0 <text:s text:c="2"/>0 <text:s text:c="2"/>0 <text:s text:c="2"/>0 <text:s text:c="2"/>0</text:p>
      <text:p text:style-name="P26"><text:s text:c="2"/>0 <text:s text:c="2"/>0 <text:s/>39 <text:s text:c="2"/>0 <text:s text:c="2"/>0 <text:s text:c="2"/>0 <text:s text:c="2"/>0 <text:s text:c="2"/>0 <text:s text:c="2"/>0 <text:s text:c="2"/>0</text:p>
      <text:p text:style-name="P26"><text:s text:c="2"/>0 <text:s text:c="2"/>0 <text:s text:c="2"/>0 <text:s/>39 <text:s text:c="2"/>0 <text:s text:c="2"/>1 <text:s text:c="2"/>0 <text:s text:c="2"/>1 <text:s text:c="2"/>0 <text:s text:c="2"/>0</text:p>
      <text:p text:style-name="P26"><text:s text:c="2"/>0 <text:s text:c="2"/>0 <text:s text:c="2"/>0 <text:s text:c="2"/>0 <text:s/>40 <text:s text:c="2"/>0 <text:s text:c="2"/>0 <text:s text:c="2"/>1 <text:s text:c="2"/>0 <text:s text:c="2"/>0</text:p>
      <text:p text:style-name="P26"><text:s text:c="2"/>0 <text:s text:c="2"/>0 <text:s text:c="2"/>0 <text:s text:c="2"/>0 <text:s text:c="2"/>0 <text:s/>27 <text:s text:c="2"/>0 <text:s text:c="2"/>0 <text:s text:c="2"/>0 <text:s text:c="2"/>0</text:p>
      <text:p text:style-name="P26"><text:s text:c="2"/>0 <text:s text:c="2"/>0 <text:s text:c="2"/>0 <text:s text:c="2"/>0 <text:s text:c="2"/>0 <text:s text:c="2"/>0 <text:s/>30 <text:s text:c="2"/>0 <text:s text:c="2"/>0 <text:s text:c="2"/>0</text:p>
      <text:p text:style-name="P26"><text:s text:c="2"/>0 <text:s text:c="2"/>0 <text:s text:c="2"/>0 <text:s text:c="2"/>0 <text:s text:c="2"/>0 <text:s text:c="2"/>0 <text:s text:c="2"/>0 <text:s/>36 <text:s text:c="2"/>0 <text:s text:c="2"/>0</text:p>
      <text:p text:style-name="P26"><text:s text:c="2"/>0 <text:s text:c="2"/>0 <text:s text:c="2"/>0 <text:s text:c="2"/>0 <text:s text:c="2"/>0 <text:s text:c="2"/>0 <text:s text:c="2"/>0 <text:s text:c="2"/>0 <text:s/>34 <text:s text:c="2"/>0</text:p>
      <text:p text:style-name="P26"><text:s text:c="2"/>0 <text:s text:c="2"/>0 <text:s text:c="2"/>0 <text:s text:c="2"/>0 <text:s text:c="2"/>1 <text:s text:c="2"/>0 <text:s text:c="2"/>0 <text:s text:c="2"/>0 <text:s text:c="2"/>1 <text:s/>35</text:p>
      <text:p text:style-name="P26"/>
      <text:p text:style-name="P26">Report:</text:p>
      <text:p text:style-name="P26"><text:s text:c="14"/>precision <text:s text:c="3"/>recall <text:s/>f1-score <text:s text:c="2"/>support</text:p>
      <text:p text:style-name="P26"/>
      <text:p text:style-name="P26"><text:s text:c="11"/>0 <text:s text:c="4"/>1.0000 <text:s text:c="3"/>1.0000 <text:s text:c="3"/>1.0000 <text:s text:c="7"/>38</text:p>
      <text:p text:style-name="P26"><text:s text:c="11"/>1 <text:s text:c="4"/>1.0000 <text:s text:c="3"/>1.0000 <text:s text:c="3"/>1.0000 <text:s text:c="7"/>37</text:p>
      <text:p text:style-name="P26"><text:s text:c="11"/>2 <text:s text:c="4"/>1.0000 <text:s text:c="3"/>1.0000 <text:s text:c="3"/>1.0000 <text:s text:c="7"/>39</text:p>
      <text:p text:style-name="P26"><text:s text:c="11"/>3 <text:s text:c="4"/>1.0000 <text:s text:c="3"/>0.9512 <text:s text:c="3"/>0.9750 <text:s text:c="7"/>41</text:p>
      <text:p text:style-name="P26"><text:s text:c="11"/>4 <text:s text:c="4"/>0.9756 <text:s text:c="3"/>0.9756 <text:s text:c="3"/>0.9756 <text:s text:c="7"/>41</text:p>
      <text:p text:style-name="P26"><text:s text:c="11"/>5 <text:s text:c="4"/>0.9643 <text:s text:c="3"/>1.0000 <text:s text:c="3"/>0.9818 <text:s text:c="7"/>27</text:p>
      <text:p text:style-name="P26"><text:s text:c="11"/>6 <text:s text:c="4"/>1.0000 <text:s text:c="3"/>1.0000 <text:s text:c="3"/>1.0000 <text:s text:c="7"/>30</text:p>
      <text:p text:style-name="P26"><text:s text:c="11"/>7 <text:s text:c="4"/>0.9474 <text:s text:c="3"/>1.0000 <text:s text:c="3"/>0.9730 <text:s text:c="7"/>36</text:p>
      <text:p text:style-name="P26"><text:s text:c="11"/>8 <text:s text:c="4"/>0.9714 <text:s text:c="3"/>1.0000 <text:s text:c="3"/>0.9855 <text:s text:c="7"/>34</text:p>
      <text:p text:style-name="P26"><text:s text:c="11"/>9 <text:s text:c="4"/>1.0000 <text:s text:c="3"/>0.9459 <text:s text:c="3"/>0.9722 <text:s text:c="7"/>37</text:p>
      <text:p text:style-name="P26"/>
      <text:p text:style-name="P26"><text:s text:c="4"/>accuracy <text:s text:c="24"/>0.9861 <text:s text:c="6"/>360</text:p>
      <text:p text:style-name="P26"><text:s text:c="3"/>macro avg <text:s text:c="4"/>0.9859 <text:s text:c="3"/>0.9873 <text:s text:c="3"/>0.9863 <text:s text:c="6"/>360</text:p>
      <text:p text:style-name="P26">weighted avg <text:s text:c="4"/>0.9866 <text:s text:c="3"/>0.9861 <text:s text:c="3"/>0.9861 <text:s text:c="6"/>360</text:p>
      <text:p text:style-name="P26"/>
      <text:p text:style-name="P26"/>
      <text:p text:style-name="P26">Process finished with exit code 0</text:p>
      <text:p text:style-name="P26">---</text:p>
      <text:p text:style-name="P25"/>
      <text:p text:style-name="P27">Модель достатньо точно вгадує надане число, зокрема серед перших 36 входжень було невагдано лише одне (5 замість очікуваного 3, що достатньо не дивно, там навіть людина може заплутатись). Згідно з матрицею невідповідностей модель не вгадала 5 входжень. Залежнність між матрицею невідповідностей і результатом репорту прослідковується.</text:p>
      <text:p text:style-name="P28"/>
      <text:p text:style-name="P28"/>
      <text:p text:style-name="P28"><text:soft-page-break/></text:p>
      <text:p text:style-name="P29">Пункт 8:</text:p>
      <text:p text:style-name="P30"/>
      <text:p text:style-name="P30">Створю декілька моделей на основі трьох різних алгоритмів:</text:p>
      <text:p text:style-name="P30"/>
      <text:p text:style-name="P14" loext:marker-style-name="T3"><text:span text:style-name="T4">from </text:span><text:span text:style-name="T3">sklearn.svm </text:span><text:span text:style-name="T4">import </text:span><text:span text:style-name="T3">SVC<text:line-break/></text:span><text:span text:style-name="T4">from </text:span><text:span text:style-name="T3">sklearn.naive_bayes </text:span><text:span text:style-name="T4">import </text:span><text:span text:style-name="T3">GaussianNB<text:line-break/></text:span><text:span text:style-name="T4">from </text:span><text:span text:style-name="T3">sklearn.neighbors </text:span><text:span text:style-name="T4">import </text:span><text:span text:style-name="T3">KNeighborsClassifier<text:line-break/></text:span><text:span text:style-name="T4">from </text:span><text:span text:style-name="T3">lab4.tools </text:span><text:span text:style-name="T4">import </text:span><text:span text:style-name="T3">report<text:line-break/></text:span><text:span text:style-name="T4">import </text:span><text:span text:style-name="T3">numpy </text:span><text:span text:style-name="T4">as </text:span><text:span text:style-name="T3">np<text:line-break/><text:line-break/>data = np.load(</text:span><text:span text:style-name="T8">"shared/s_datasets.npz"</text:span><text:span text:style-name="T3">)<text:line-break/><text:line-break/>X_train = data[</text:span><text:span text:style-name="T8">"X_train"</text:span><text:span text:style-name="T3">]<text:line-break/>Y_train = data[</text:span><text:span text:style-name="T8">"Y_train"</text:span><text:span text:style-name="T3">]<text:line-break/>x_test = data[</text:span><text:span text:style-name="T8">"x_test"</text:span><text:span text:style-name="T3">]<text:line-break/>y_test = data[</text:span><text:span text:style-name="T8">"y_test"</text:span><text:span text:style-name="T3">]<text:line-break/><text:line-break/>svc = SVC()<text:line-break/>knn = KNeighborsClassifier()<text:line-break/>nb = GaussianNB()<text:line-break/><text:line-break/>svc.fit(X_train, Y_train)<text:line-break/>knn.fit(X_train, Y_train)<text:line-break/>nb.fit(X_train, Y_train)<text:line-break/><text:line-break/>report(</text:span><text:span text:style-name="T8">"SVC"</text:span><text:span text:style-name="T3">, svc.predict(x_test), y_test)<text:line-break/>report(</text:span><text:span text:style-name="T8">"Neighbors"</text:span><text:span text:style-name="T3">, knn.predict(x_test), y_test)<text:line-break/>report(</text:span><text:span text:style-name="T8">"Naive Bayes"</text:span><text:span text:style-name="T3">, nb.predict(x_test), y_test)<text:line-break/></text:span></text:p>
      <text:p text:style-name="P30"><text:s/></text:p>
      <text:p text:style-name="P30">Код завантажує тестові дані, моделі навчаються, після чого використано функцію репор для кожної:</text:p>
      <text:p text:style-name="P30"/>
      <text:p text:style-name="P14" loext:marker-style-name="T3"><text:span text:style-name="T4">from </text:span><text:span text:style-name="T3">sklearn.metrics </text:span><text:span text:style-name="T4">import </text:span><text:span text:style-name="T3">classification_report<text:line-break/></text:span><text:span text:style-name="T4">from </text:span><text:span text:style-name="T3">sklearn.metrics </text:span><text:span text:style-name="T4">import </text:span><text:span text:style-name="T3">confusion_matrix<text:line-break/><text:line-break/></text:span><text:span text:style-name="T4">def </text:span><text:span text:style-name="T5">report</text:span><text:span text:style-name="T3">(mname, predicted, expected):<text:line-break/> <text:s text:c="3"/></text:span><text:span text:style-name="T6">print</text:span><text:span text:style-name="T3">(</text:span><text:span text:style-name="T8">f"</text:span><text:span text:style-name="T4">\n</text:span><text:span text:style-name="T8">=== </text:span><text:span text:style-name="T4">{</text:span><text:span text:style-name="T3">mname</text:span><text:span text:style-name="T4">}</text:span><text:span text:style-name="T8"> ==="</text:span><text:span text:style-name="T3">)<text:line-break/><text:line-break/> <text:s text:c="3"/>names = [</text:span><text:span text:style-name="T6">str</text:span><text:span text:style-name="T3">(i) </text:span><text:span text:style-name="T4">for </text:span><text:span text:style-name="T3">i </text:span><text:span text:style-name="T4">in </text:span><text:span text:style-name="T6">range</text:span><text:span text:style-name="T3">(</text:span><text:span text:style-name="T9">10</text:span><text:span text:style-name="T3">)]<text:line-break/> <text:s text:c="3"/></text:span><text:span text:style-name="T6">print</text:span><text:span text:style-name="T3">(classification_report(expected, predicted, </text:span><text:span text:style-name="T7">target_names</text:span><text:span text:style-name="T3">=names, </text:span><text:span text:style-name="T7">digits</text:span><text:span text:style-name="T3">=</text:span><text:span text:style-name="T9">4</text:span><text:span text:style-name="T3">))<text:line-break/><text:line-break/> <text:s text:c="3"/>cm = confusion_matrix(expected, predicted)<text:line-break/> <text:s text:c="3"/></text:span><text:span text:style-name="T4">for </text:span><text:span text:style-name="T3">row </text:span><text:span text:style-name="T4">in </text:span><text:span text:style-name="T3">cm:<text:line-break/> <text:s text:c="7"/></text:span><text:span text:style-name="T6">print</text:span><text:span text:style-name="T3">(</text:span><text:span text:style-name="T8">" "</text:span><text:span text:style-name="T3">.join(</text:span><text:span text:style-name="T8">f"</text:span><text:span text:style-name="T4">{</text:span><text:span text:style-name="T3">num</text:span><text:span text:style-name="T4">:</text:span><text:span text:style-name="T8">3d</text:span><text:span text:style-name="T4">}</text:span><text:span text:style-name="T8">" </text:span><text:span text:style-name="T4">for </text:span><text:span text:style-name="T3">num </text:span><text:span text:style-name="T4">in </text:span><text:span text:style-name="T3">row))<text:line-break/></text:span></text:p>
      <text:p text:style-name="P30"><text:s/></text:p>
      <text:p text:style-name="P30">Така функція виводи<text:span text:style-name="T23">ть назву моделі (передається як аргумент), виводиться репорт і матриця невідповідностей для передбачень і очікувань (теж передаються як аргументи). Імена класів є стрінгіфікованими цілими </text:span><text:span text:style-name="T24">числами </text:span><text:span text:style-name="T23">від 0 до 9, </text:span><text:span text:style-name="T24">репорт вивод</text:span><text:span text:style-name="T25">и</text:span><text:span text:style-name="T24">ться з 4-знаками після крапки </text:span><text:span text:style-name="T26">для точнсті</text:span><text:span text:style-name="T23">.</text:span></text:p>
      <text:p text:style-name="P30"/>
      <text:p text:style-name="P31"><text:soft-page-break/></text:p>
      <text:p text:style-name="P31">Результат виконання:</text:p>
      <text:p text:style-name="P31"/>
      <text:p text:style-name="P31">---</text:p>
      <text:p text:style-name="P31">/home/misha/Documents/2sem26/ml/.venv/bin/python /home/misha/Documents/2sem26/ml/lab4/5-compare.py </text:p>
      <text:p text:style-name="P31"/>
      <text:p text:style-name="P31">=== SVC ===</text:p>
      <text:p text:style-name="P31"><text:s text:c="14"/>precision <text:s text:c="3"/>recall <text:s/>f1-score <text:s text:c="2"/>support</text:p>
      <text:p text:style-name="P31"/>
      <text:p text:style-name="P31"><text:s text:c="11"/>0 <text:s text:c="4"/>1.0000 <text:s text:c="3"/>1.0000 <text:s text:c="3"/>1.0000 <text:s text:c="7"/>38</text:p>
      <text:p text:style-name="P31"><text:s text:c="11"/>1 <text:s text:c="4"/>1.0000 <text:s text:c="3"/>1.0000 <text:s text:c="3"/>1.0000 <text:s text:c="7"/>37</text:p>
      <text:p text:style-name="P31"><text:s text:c="11"/>2 <text:s text:c="4"/>1.0000 <text:s text:c="3"/>1.0000 <text:s text:c="3"/>1.0000 <text:s text:c="7"/>39</text:p>
      <text:p text:style-name="P31"><text:s text:c="11"/>3 <text:s text:c="4"/>1.0000 <text:s text:c="3"/>0.9268 <text:s text:c="3"/>0.9620 <text:s text:c="7"/>41</text:p>
      <text:p text:style-name="P31"><text:s text:c="11"/>4 <text:s text:c="4"/>1.0000 <text:s text:c="3"/>1.0000 <text:s text:c="3"/>1.0000 <text:s text:c="7"/>41</text:p>
      <text:p text:style-name="P31"><text:s text:c="11"/>5 <text:s text:c="4"/>0.9643 <text:s text:c="3"/>1.0000 <text:s text:c="3"/>0.9818 <text:s text:c="7"/>27</text:p>
      <text:p text:style-name="P31"><text:s text:c="11"/>6 <text:s text:c="4"/>1.0000 <text:s text:c="3"/>1.0000 <text:s text:c="3"/>1.0000 <text:s text:c="7"/>30</text:p>
      <text:p text:style-name="P31"><text:s text:c="11"/>7 <text:s text:c="4"/>0.9459 <text:s text:c="3"/>0.9722 <text:s text:c="3"/>0.9589 <text:s text:c="7"/>36</text:p>
      <text:p text:style-name="P31"><text:s text:c="11"/>8 <text:s text:c="4"/>0.9714 <text:s text:c="3"/>1.0000 <text:s text:c="3"/>0.9855 <text:s text:c="7"/>34</text:p>
      <text:p text:style-name="P31"><text:s text:c="11"/>9 <text:s text:c="4"/>0.9730 <text:s text:c="3"/>0.9730 <text:s text:c="3"/>0.9730 <text:s text:c="7"/>37</text:p>
      <text:p text:style-name="P31"/>
      <text:p text:style-name="P31"><text:s text:c="4"/>accuracy <text:s text:c="24"/>0.9861 <text:s text:c="6"/>360</text:p>
      <text:p text:style-name="P31"><text:s text:c="3"/>macro avg <text:s text:c="4"/>0.9855 <text:s text:c="3"/>0.9872 <text:s text:c="3"/>0.9861 <text:s text:c="6"/>360</text:p>
      <text:p text:style-name="P31">weighted avg <text:s text:c="4"/>0.9864 <text:s text:c="3"/>0.9861 <text:s text:c="3"/>0.9861 <text:s text:c="6"/>360</text:p>
      <text:p text:style-name="P31"/>
      <text:p text:style-name="P31"><text:s/>38 <text:s text:c="2"/>0 <text:s text:c="2"/>0 <text:s text:c="2"/>0 <text:s text:c="2"/>0 <text:s text:c="2"/>0 <text:s text:c="2"/>0 <text:s text:c="2"/>0 <text:s text:c="2"/>0 <text:s text:c="2"/>0</text:p>
      <text:p text:style-name="P31"><text:s text:c="2"/>0 <text:s/>37 <text:s text:c="2"/>0 <text:s text:c="2"/>0 <text:s text:c="2"/>0 <text:s text:c="2"/>0 <text:s text:c="2"/>0 <text:s text:c="2"/>0 <text:s text:c="2"/>0 <text:s text:c="2"/>0</text:p>
      <text:p text:style-name="P31"><text:s text:c="2"/>0 <text:s text:c="2"/>0 <text:s/>39 <text:s text:c="2"/>0 <text:s text:c="2"/>0 <text:s text:c="2"/>0 <text:s text:c="2"/>0 <text:s text:c="2"/>0 <text:s text:c="2"/>0 <text:s text:c="2"/>0</text:p>
      <text:p text:style-name="P31"><text:s text:c="2"/>0 <text:s text:c="2"/>0 <text:s text:c="2"/>0 <text:s/>38 <text:s text:c="2"/>0 <text:s text:c="2"/>1 <text:s text:c="2"/>0 <text:s text:c="2"/>1 <text:s text:c="2"/>1 <text:s text:c="2"/>0</text:p>
      <text:p text:style-name="P31"><text:s text:c="2"/>0 <text:s text:c="2"/>0 <text:s text:c="2"/>0 <text:s text:c="2"/>0 <text:s/>41 <text:s text:c="2"/>0 <text:s text:c="2"/>0 <text:s text:c="2"/>0 <text:s text:c="2"/>0 <text:s text:c="2"/>0</text:p>
      <text:p text:style-name="P31"><text:s text:c="2"/>0 <text:s text:c="2"/>0 <text:s text:c="2"/>0 <text:s text:c="2"/>0 <text:s text:c="2"/>0 <text:s/>27 <text:s text:c="2"/>0 <text:s text:c="2"/>0 <text:s text:c="2"/>0 <text:s text:c="2"/>0</text:p>
      <text:p text:style-name="P31"><text:s text:c="2"/>0 <text:s text:c="2"/>0 <text:s text:c="2"/>0 <text:s text:c="2"/>0 <text:s text:c="2"/>0 <text:s text:c="2"/>0 <text:s/>30 <text:s text:c="2"/>0 <text:s text:c="2"/>0 <text:s text:c="2"/>0</text:p>
      <text:p text:style-name="P31"><text:s text:c="2"/>0 <text:s text:c="2"/>0 <text:s text:c="2"/>0 <text:s text:c="2"/>0 <text:s text:c="2"/>0 <text:s text:c="2"/>0 <text:s text:c="2"/>0 <text:s/>35 <text:s text:c="2"/>0 <text:s text:c="2"/>1</text:p>
      <text:p text:style-name="P31"><text:s text:c="2"/>0 <text:s text:c="2"/>0 <text:s text:c="2"/>0 <text:s text:c="2"/>0 <text:s text:c="2"/>0 <text:s text:c="2"/>0 <text:s text:c="2"/>0 <text:s text:c="2"/>0 <text:s/>34 <text:s text:c="2"/>0</text:p>
      <text:p text:style-name="P31"><text:s text:c="2"/>0 <text:s text:c="2"/>0 <text:s text:c="2"/>0 <text:s text:c="2"/>0 <text:s text:c="2"/>0 <text:s text:c="2"/>0 <text:s text:c="2"/>0 <text:s text:c="2"/>1 <text:s text:c="2"/>0 <text:s/>36</text:p>
      <text:p text:style-name="P31"/>
      <text:p text:style-name="P31">=== Neighbors ===</text:p>
      <text:p text:style-name="P31"><text:s text:c="14"/>precision <text:s text:c="3"/>recall <text:s/>f1-score <text:s text:c="2"/>support</text:p>
      <text:p text:style-name="P31"/>
      <text:p text:style-name="P31"><text:s text:c="11"/>0 <text:s text:c="4"/>1.0000 <text:s text:c="3"/>1.0000 <text:s text:c="3"/>1.0000 <text:s text:c="7"/>38</text:p>
      <text:p text:style-name="P31"><text:s text:c="11"/>1 <text:s text:c="4"/>1.0000 <text:s text:c="3"/>1.0000 <text:s text:c="3"/>1.0000 <text:s text:c="7"/>37</text:p>
      <text:p text:style-name="P31"><text:s text:c="11"/>2 <text:s text:c="4"/>1.0000 <text:s text:c="3"/>1.0000 <text:s text:c="3"/>1.0000 <text:s text:c="7"/>39</text:p>
      <text:p text:style-name="P31"><text:s text:c="11"/>3 <text:s text:c="4"/>1.0000 <text:s text:c="3"/>0.9512 <text:s text:c="3"/>0.9750 <text:s text:c="7"/>41</text:p>
      <text:p text:style-name="P31"><text:s text:c="11"/>4 <text:s text:c="4"/>0.9756 <text:s text:c="3"/>0.9756 <text:s text:c="3"/>0.9756 <text:s text:c="7"/>41</text:p>
      <text:p text:style-name="P31"><text:s text:c="11"/>5 <text:s text:c="4"/>0.9643 <text:s text:c="3"/>1.0000 <text:s text:c="3"/>0.9818 <text:s text:c="7"/>27</text:p>
      <text:p text:style-name="P31"><text:s text:c="11"/>6 <text:s text:c="4"/>1.0000 <text:s text:c="3"/>1.0000 <text:s text:c="3"/>1.0000 <text:s text:c="7"/>30</text:p>
      <text:p text:style-name="P31"><text:s text:c="11"/>7 <text:s text:c="4"/>0.9474 <text:s text:c="3"/>1.0000 <text:s text:c="3"/>0.9730 <text:s text:c="7"/>36</text:p>
      <text:p text:style-name="P31"><text:s text:c="11"/>8 <text:s text:c="4"/>0.9714 <text:s text:c="3"/>1.0000 <text:s text:c="3"/>0.9855 <text:s text:c="7"/>34</text:p>
      <text:p text:style-name="P31"><text:s text:c="11"/>9 <text:s text:c="4"/>1.0000 <text:s text:c="3"/>0.9459 <text:s text:c="3"/>0.9722 <text:s text:c="7"/>37</text:p>
      <text:p text:style-name="P31"/>
      <text:p text:style-name="P31"><text:s text:c="4"/>accuracy <text:s text:c="24"/>0.9861 <text:s text:c="6"/>360</text:p>
      <text:p text:style-name="P31"><text:s text:c="3"/>macro avg <text:s text:c="4"/>0.9859 <text:s text:c="3"/>0.9873 <text:s text:c="3"/>0.9863 <text:s text:c="6"/>360</text:p>
      <text:p text:style-name="P31"><text:soft-page-break/>weighted avg <text:s text:c="4"/>0.9866 <text:s text:c="3"/>0.9861 <text:s text:c="3"/>0.9861 <text:s text:c="6"/>360</text:p>
      <text:p text:style-name="P31"/>
      <text:p text:style-name="P31"><text:s/>38 <text:s text:c="2"/>0 <text:s text:c="2"/>0 <text:s text:c="2"/>0 <text:s text:c="2"/>0 <text:s text:c="2"/>0 <text:s text:c="2"/>0 <text:s text:c="2"/>0 <text:s text:c="2"/>0 <text:s text:c="2"/>0</text:p>
      <text:p text:style-name="P31"><text:s text:c="2"/>0 <text:s/>37 <text:s text:c="2"/>0 <text:s text:c="2"/>0 <text:s text:c="2"/>0 <text:s text:c="2"/>0 <text:s text:c="2"/>0 <text:s text:c="2"/>0 <text:s text:c="2"/>0 <text:s text:c="2"/>0</text:p>
      <text:p text:style-name="P31"><text:s text:c="2"/>0 <text:s text:c="2"/>0 <text:s/>39 <text:s text:c="2"/>0 <text:s text:c="2"/>0 <text:s text:c="2"/>0 <text:s text:c="2"/>0 <text:s text:c="2"/>0 <text:s text:c="2"/>0 <text:s text:c="2"/>0</text:p>
      <text:p text:style-name="P31"><text:s text:c="2"/>0 <text:s text:c="2"/>0 <text:s text:c="2"/>0 <text:s/>39 <text:s text:c="2"/>0 <text:s text:c="2"/>1 <text:s text:c="2"/>0 <text:s text:c="2"/>1 <text:s text:c="2"/>0 <text:s text:c="2"/>0</text:p>
      <text:p text:style-name="P31"><text:s text:c="2"/>0 <text:s text:c="2"/>0 <text:s text:c="2"/>0 <text:s text:c="2"/>0 <text:s/>40 <text:s text:c="2"/>0 <text:s text:c="2"/>0 <text:s text:c="2"/>1 <text:s text:c="2"/>0 <text:s text:c="2"/>0</text:p>
      <text:p text:style-name="P31"><text:s text:c="2"/>0 <text:s text:c="2"/>0 <text:s text:c="2"/>0 <text:s text:c="2"/>0 <text:s text:c="2"/>0 <text:s/>27 <text:s text:c="2"/>0 <text:s text:c="2"/>0 <text:s text:c="2"/>0 <text:s text:c="2"/>0</text:p>
      <text:p text:style-name="P31"><text:s text:c="2"/>0 <text:s text:c="2"/>0 <text:s text:c="2"/>0 <text:s text:c="2"/>0 <text:s text:c="2"/>0 <text:s text:c="2"/>0 <text:s/>30 <text:s text:c="2"/>0 <text:s text:c="2"/>0 <text:s text:c="2"/>0</text:p>
      <text:p text:style-name="P31"><text:s text:c="2"/>0 <text:s text:c="2"/>0 <text:s text:c="2"/>0 <text:s text:c="2"/>0 <text:s text:c="2"/>0 <text:s text:c="2"/>0 <text:s text:c="2"/>0 <text:s/>36 <text:s text:c="2"/>0 <text:s text:c="2"/>0</text:p>
      <text:p text:style-name="P31"><text:s text:c="2"/>0 <text:s text:c="2"/>0 <text:s text:c="2"/>0 <text:s text:c="2"/>0 <text:s text:c="2"/>0 <text:s text:c="2"/>0 <text:s text:c="2"/>0 <text:s text:c="2"/>0 <text:s/>34 <text:s text:c="2"/>0</text:p>
      <text:p text:style-name="P31"><text:s text:c="2"/>0 <text:s text:c="2"/>0 <text:s text:c="2"/>0 <text:s text:c="2"/>0 <text:s text:c="2"/>1 <text:s text:c="2"/>0 <text:s text:c="2"/>0 <text:s text:c="2"/>0 <text:s text:c="2"/>1 <text:s/>35</text:p>
      <text:p text:style-name="P31"/>
      <text:p text:style-name="P31">=== Naive Bayes ===</text:p>
      <text:p text:style-name="P31"><text:s text:c="14"/>precision <text:s text:c="3"/>recall <text:s/>f1-score <text:s text:c="2"/>support</text:p>
      <text:p text:style-name="P31"/>
      <text:p text:style-name="P31"><text:s text:c="11"/>0 <text:s text:c="4"/>0.9730 <text:s text:c="3"/>0.9474 <text:s text:c="3"/>0.9600 <text:s text:c="7"/>38</text:p>
      <text:p text:style-name="P31"><text:s text:c="11"/>1 <text:s text:c="4"/>0.8158 <text:s text:c="3"/>0.8378 <text:s text:c="3"/>0.8267 <text:s text:c="7"/>37</text:p>
      <text:p text:style-name="P31"><text:s text:c="11"/>2 <text:s text:c="4"/>0.9714 <text:s text:c="3"/>0.8718 <text:s text:c="3"/>0.9189 <text:s text:c="7"/>39</text:p>
      <text:p text:style-name="P31"><text:s text:c="11"/>3 <text:s text:c="4"/>0.9706 <text:s text:c="3"/>0.8049 <text:s text:c="3"/>0.8800 <text:s text:c="7"/>41</text:p>
      <text:p text:style-name="P31"><text:s text:c="11"/>4 <text:s text:c="4"/>0.9231 <text:s text:c="3"/>0.8780 <text:s text:c="3"/>0.9000 <text:s text:c="7"/>41</text:p>
      <text:p text:style-name="P31"><text:s text:c="11"/>5 <text:s text:c="4"/>0.9000 <text:s text:c="3"/>1.0000 <text:s text:c="3"/>0.9474 <text:s text:c="7"/>27</text:p>
      <text:p text:style-name="P31"><text:s text:c="11"/>6 <text:s text:c="4"/>1.0000 <text:s text:c="3"/>0.9333 <text:s text:c="3"/>0.9655 <text:s text:c="7"/>30</text:p>
      <text:p text:style-name="P31"><text:s text:c="11"/>7 <text:s text:c="4"/>0.6316 <text:s text:c="3"/>1.0000 <text:s text:c="3"/>0.7742 <text:s text:c="7"/>36</text:p>
      <text:p text:style-name="P31"><text:s text:c="11"/>8 <text:s text:c="4"/>0.6579 <text:s text:c="3"/>0.7353 <text:s text:c="3"/>0.6944 <text:s text:c="7"/>34</text:p>
      <text:p text:style-name="P31"><text:s text:c="11"/>9 <text:s text:c="4"/>0.9167 <text:s text:c="3"/>0.5946 <text:s text:c="3"/>0.7213 <text:s text:c="7"/>37</text:p>
      <text:p text:style-name="P31"/>
      <text:p text:style-name="P31"><text:s text:c="4"/>accuracy <text:s text:c="24"/>0.8556 <text:s text:c="6"/>360</text:p>
      <text:p text:style-name="P31"><text:s text:c="3"/>macro avg <text:s text:c="4"/>0.8760 <text:s text:c="3"/>0.8603 <text:s text:c="3"/>0.8588 <text:s text:c="6"/>360</text:p>
      <text:p text:style-name="P31">weighted avg <text:s text:c="4"/>0.8778 <text:s text:c="3"/>0.8556 <text:s text:c="3"/>0.8572 <text:s text:c="6"/>360</text:p>
      <text:p text:style-name="P31"/>
      <text:p text:style-name="P31"><text:s/>36 <text:s text:c="2"/>0 <text:s text:c="2"/>0 <text:s text:c="2"/>0 <text:s text:c="2"/>1 <text:s text:c="2"/>0 <text:s text:c="2"/>0 <text:s text:c="2"/>1 <text:s text:c="2"/>0 <text:s text:c="2"/>0</text:p>
      <text:p text:style-name="P31"><text:s text:c="2"/>0 <text:s/>31 <text:s text:c="2"/>0 <text:s text:c="2"/>0 <text:s text:c="2"/>0 <text:s text:c="2"/>0 <text:s text:c="2"/>0 <text:s text:c="2"/>1 <text:s text:c="2"/>3 <text:s text:c="2"/>2</text:p>
      <text:p text:style-name="P31"><text:s text:c="2"/>0 <text:s text:c="2"/>1 <text:s/>34 <text:s text:c="2"/>0 <text:s text:c="2"/>0 <text:s text:c="2"/>0 <text:s text:c="2"/>0 <text:s text:c="2"/>0 <text:s text:c="2"/>4 <text:s text:c="2"/>0</text:p>
      <text:p text:style-name="P31"><text:s text:c="2"/>0 <text:s text:c="2"/>1 <text:s text:c="2"/>0 <text:s/>33 <text:s text:c="2"/>0 <text:s text:c="2"/>2 <text:s text:c="2"/>0 <text:s text:c="2"/>2 <text:s text:c="2"/>3 <text:s text:c="2"/>0</text:p>
      <text:p text:style-name="P31"><text:s text:c="2"/>0 <text:s text:c="2"/>0 <text:s text:c="2"/>0 <text:s text:c="2"/>0 <text:s/>36 <text:s text:c="2"/>0 <text:s text:c="2"/>0 <text:s text:c="2"/>5 <text:s text:c="2"/>0 <text:s text:c="2"/>0</text:p>
      <text:p text:style-name="P31"><text:s text:c="2"/>0 <text:s text:c="2"/>0 <text:s text:c="2"/>0 <text:s text:c="2"/>0 <text:s text:c="2"/>0 <text:s/>27 <text:s text:c="2"/>0 <text:s text:c="2"/>0 <text:s text:c="2"/>0 <text:s text:c="2"/>0</text:p>
      <text:p text:style-name="P31"><text:s text:c="2"/>0 <text:s text:c="2"/>0 <text:s text:c="2"/>1 <text:s text:c="2"/>0 <text:s text:c="2"/>1 <text:s text:c="2"/>0 <text:s/>28 <text:s text:c="2"/>0 <text:s text:c="2"/>0 <text:s text:c="2"/>0</text:p>
      <text:p text:style-name="P31"><text:s text:c="2"/>0 <text:s text:c="2"/>0 <text:s text:c="2"/>0 <text:s text:c="2"/>0 <text:s text:c="2"/>0 <text:s text:c="2"/>0 <text:s text:c="2"/>0 <text:s/>36 <text:s text:c="2"/>0 <text:s text:c="2"/>0</text:p>
      <text:p text:style-name="P31"><text:s text:c="2"/>0 <text:s text:c="2"/>3 <text:s text:c="2"/>0 <text:s text:c="2"/>1 <text:s text:c="2"/>0 <text:s text:c="2"/>1 <text:s text:c="2"/>0 <text:s text:c="2"/>4 <text:s/>25 <text:s text:c="2"/>0</text:p>
      <text:p text:style-name="P31"><text:s text:c="2"/>1 <text:s text:c="2"/>2 <text:s text:c="2"/>0 <text:s text:c="2"/>0 <text:s text:c="2"/>1 <text:s text:c="2"/>0 <text:s text:c="2"/>0 <text:s text:c="2"/>8 <text:s text:c="2"/>3 <text:s/>22</text:p>
      <text:p text:style-name="P31"/>
      <text:p text:style-name="P31">Process finished with exit code 0</text:p>
      <text:p text:style-name="P31">---</text:p>
      <text:p text:style-name="P32"/>
      <text:p text:style-name="P33">Очевидно, що Naive Bayes сильно програє. Це пояснюється тим, що алгоритм припускає незалежність ознак, що є хибою. Модель не враховує форму цифр, що критично для точності. </text:p>
      <text:p text:style-name="P30"/>
      <text:p text:style-name="P32"/>
      <text:p text:style-name="P32"/>
      <text:p text:style-name="P32"/>
      <text:p text:style-name="P32"><text:soft-page-break/></text:p>
      <text:p text:style-name="P32">Пункт 9:</text:p>
      <text:p text:style-name="P32"/>
      <text:p text:style-name="P34">Поексперментую зі значенням параметру k в моделях алгоритму k-NN:</text:p>
      <text:p text:style-name="P32"/>
      <text:p text:style-name="P14" loext:marker-style-name="T20"><text:span text:style-name="T4">from </text:span><text:span text:style-name="T3">sklearn.neighbors </text:span><text:span text:style-name="T4">import </text:span><text:span text:style-name="T3">KNeighborsClassifier<text:line-break/></text:span><text:span text:style-name="T4">from </text:span><text:span text:style-name="T3">sklearn.model_selection </text:span><text:span text:style-name="T4">import </text:span><text:span text:style-name="T3">StratifiedKFold, cross_val_score<text:line-break/></text:span><text:span text:style-name="T4">from </text:span><text:span text:style-name="T3">lab4.tools </text:span><text:span text:style-name="T4">import </text:span><text:span text:style-name="T3">report<text:line-break/></text:span><text:span text:style-name="T4">import </text:span><text:span text:style-name="T3">numpy </text:span><text:span text:style-name="T4">as </text:span><text:span text:style-name="T3">np<text:line-break/><text:line-break/>data = np.load(</text:span><text:span text:style-name="T8">"shared/s_datasets.npz"</text:span><text:span text:style-name="T3">)<text:line-break/><text:line-break/>X_train = data[</text:span><text:span text:style-name="T8">"X_train"</text:span><text:span text:style-name="T3">]<text:line-break/>Y_train = data[</text:span><text:span text:style-name="T8">"Y_train"</text:span><text:span text:style-name="T3">]<text:line-break/>x_test = data[</text:span><text:span text:style-name="T8">"x_test"</text:span><text:span text:style-name="T3">]<text:line-break/>y_test = data[</text:span><text:span text:style-name="T8">"y_test"</text:span><text:span text:style-name="T3">]<text:line-break/><text:line-break/>X = np.concatenate((data[</text:span><text:span text:style-name="T8">"X_train"</text:span><text:span text:style-name="T3">], data[</text:span><text:span text:style-name="T8">"x_test"</text:span><text:span text:style-name="T3">]))<text:line-break/>y = np.concatenate((data[</text:span><text:span text:style-name="T8">"Y_train"</text:span><text:span text:style-name="T3">], data[</text:span><text:span text:style-name="T8">"y_test"</text:span><text:span text:style-name="T3">]))<text:line-break/><text:line-break/></text:span><text:span text:style-name="T4">for </text:span><text:span text:style-name="T3">k </text:span><text:span text:style-name="T4">in </text:span><text:span text:style-name="T6">range</text:span><text:span text:style-name="T3">(</text:span><text:span text:style-name="T9">1</text:span><text:span text:style-name="T3">, </text:span><text:span text:style-name="T9">10</text:span><text:span text:style-name="T3">):<text:line-break/> <text:s text:c="3"/>model = KNeighborsClassifier(</text:span><text:span text:style-name="T7">n_neighbors</text:span><text:span text:style-name="T3">=k)<text:line-break/><text:line-break/> <text:s text:c="3"/></text:span><text:span text:style-name="T20">#cross validation<text:line-break/> <text:s text:c="3"/></text:span><text:span text:style-name="T3">kf = StratifiedKFold(</text:span><text:span text:style-name="T7">n_splits</text:span><text:span text:style-name="T3">=</text:span><text:span text:style-name="T9">5</text:span><text:span text:style-name="T3">, </text:span><text:span text:style-name="T7">shuffle</text:span><text:span text:style-name="T3">=</text:span><text:span text:style-name="T4">True</text:span><text:span text:style-name="T3">, </text:span><text:span text:style-name="T7">random_state</text:span><text:span text:style-name="T3">=</text:span><text:span text:style-name="T9">42</text:span><text:span text:style-name="T3">)<text:line-break/> <text:s text:c="3"/>scores = cross_val_score(model, X, y, </text:span><text:span text:style-name="T7">cv</text:span><text:span text:style-name="T3">=kf)<text:line-break/> <text:s text:c="3"/></text:span><text:span text:style-name="T6">print</text:span><text:span text:style-name="T3">(</text:span><text:span text:style-name="T8">f"KNN (k=</text:span><text:span text:style-name="T4">{</text:span><text:span text:style-name="T3">k</text:span><text:span text:style-name="T4">}</text:span><text:span text:style-name="T8">): </text:span><text:span text:style-name="T4">{</text:span><text:span text:style-name="T3">scores.mean()</text:span><text:span text:style-name="T4">:</text:span><text:span text:style-name="T8">.2%</text:span><text:span text:style-name="T4">}</text:span><text:span text:style-name="T8"> (+/- </text:span><text:span text:style-name="T4">{</text:span><text:span text:style-name="T3">scores.std()</text:span><text:span text:style-name="T4">:</text:span><text:span text:style-name="T8">.2%</text:span><text:span text:style-name="T4">}</text:span><text:span text:style-name="T8">)"</text:span><text:span text:style-name="T3">)<text:line-break/><text:line-break/> <text:s text:c="3"/></text:span><text:span text:style-name="T20">#models themselves<text:line-break/> <text:s text:c="3"/>#print('\nModels themselves:')<text:line-break/> <text:s text:c="3"/>#model.fit(X_train, Y_train)<text:line-break/> <text:s text:c="3"/>#report(f"KNN (k={k})", model.predict(x_test), y_test)<text:line-break/></text:span></text:p>
      <text:p text:style-name="P32"><text:s text:c="2"/></text:p>
      <text:p text:style-name="P35">Вже за відомою схем<text:span text:style-name="T27">о</text:span>ю завантажуються дані. <text:span text:style-name="T28">Спочатку я написав код для навчання й порівняння 9 моделей, але потім дізнався про крос-валідацію і вирішив її імплементувати. Завантажені дані склеюю в набір ознак і набір очікуваних відповідей. В циклі проводжу крос-валідацію кожної моделі, </text:span><text:span text:style-name="T27">випадково </text:span><text:span text:style-name="T28">розділяючи </text:span><text:span text:style-name="T27">набори</text:span><text:span text:style-name="T28"> на 5 частин і роблячи од</text:span><text:span text:style-name="T27">ин </text:span><text:span text:style-name="T28">з них тестов</text:span><text:span text:style-name="T27">им</text:span><text:span text:style-name="T28"> (повторюється 5 разів, щоб всі частини були тестовими </text:span><text:span text:style-name="T29">по </text:span><text:span text:style-name="T28">1 раз</text:span><text:span text:style-name="T29">у</text:span><text:span text:style-name="T28">), після чого отримую середню точність і среденьоквадратичне відхилення </text:span><text:span text:style-name="T27">відповідної </text:span><text:span text:style-name="T30">гіпотетичної моделі (бо насправді модель перенавчається 5 разів). Ц</text:span><text:span text:style-name="T31">е оцінка </text:span><text:span text:style-name="Strong_20_Emphasis"><text:span text:style-name="T31">узагальнюючої здатності алгоритму з конкретним гіперпараметр</text:span></text:span><text:span text:style-name="Strong_20_Emphasis"><text:span text:style-name="T32">о</text:span></text:span><text:span text:style-name="Strong_20_Emphasis"><text:span text:style-name="T31">м</text:span></text:span><text:span text:style-name="Strong_20_Emphasis"><text:span text:style-name="T32"> к</text:span></text:span><text:span text:style-name="Strong_20_Emphasis"><text:span text:style-name="T33">.</text:span></text:span></text:p>
      <text:p text:style-name="P36"/>
      <text:p text:style-name="P36">Результат виконання:</text:p>
      <text:p text:style-name="P36">---</text:p>
      <text:p text:style-name="P36">/home/misha/Documents/2sem26/ml/.venv/bin/python /home/misha/Documents/2sem26/ml/lab4/6-n_neighbors.py </text:p>
      <text:p text:style-name="P36">KNN (k=1): 98.78% (+/- 0.63%)</text:p>
      <text:p text:style-name="P36">KNN (k=2): 98.50% (+/- 0.52%)</text:p>
      <text:p text:style-name="P36">KNN (k=3): 98.83% (+/- 0.45%)</text:p>
      <text:p text:style-name="P36">KNN (k=4): 98.50% (+/- 0.45%)</text:p>
      <text:p text:style-name="P36">KNN (k=5): 98.61% (+/- 0.39%)</text:p>
      <text:p text:style-name="P36">KNN (k=6): 98.22% (+/- 0.28%)</text:p>
      <text:p text:style-name="P36"><text:soft-page-break/>KNN (k=7): 98.22% (+/- 0.22%)</text:p>
      <text:p text:style-name="P36">KNN (k=8): 97.94% (+/- 0.63%)</text:p>
      <text:p text:style-name="P36">KNN (k=9): 97.94% (+/- 0.45%)</text:p>
      <text:p text:style-name="P36"/>
      <text:p text:style-name="P36">Process finished with exit code 0</text:p>
      <text:p text:style-name="P36">---</text:p>
      <text:p text:style-name="P37">І ось тут вже виявлення найкращої моделі не однозначне. З одного боку модель <text:span text:style-name="T34">3</text:span> має кращу середню точність, але модель <text:span text:style-name="T34">5 </text:span><text:span text:style-name="T35">поступається лише на 0.22% , що дуже мало, враховуючи</text:span></text:p>
      <text:p text:style-name="P38">std +/- 0.4-0.5 %, ще й трохи стабільніша. Ці моделі можна вважати практично еквівалентними. Найбільший розкид має модель 1, що пояснюється її реагуванням на шум.</text:p>
      <text:p text:style-name="P39"/>
      <text:p text:style-name="P40">Висновки:</text:p>
      <text:p text:style-name="P41">В ході виконання роботи я закріпив знання з минулої лаб. роботи зі створення моделей – класифікаторів, отримав знання й досвід створення моделей-класифікаторів зображень. Було проінспектовано датасет із зобр<text:span text:style-name="T36">а</text:span>женням чисел бібліотеки sklearn, створено проінспектовано і порівняно між собою різні моделі.</text:p>
      <text:p text:style-name="P37">Виявлено, що для виконання задачі класифікації зображень добре підходять SVC і k-NN моделі, чого не можна сказати про Naive Bayes. Також виявленно, що для поставленної задачі найбільш оптимальні гіперпараметри n_neighbors для k-NN – 3 і 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7T10:51:53.312718955</dc:date>
    <meta:editing-duration>PT8H22M21S</meta:editing-duration>
    <meta:editing-cycles>256</meta:editing-cycles>
    <meta:generator>LibreOffice/25.8.6.2$Linux_X86_64 LibreOffice_project/580$Build-2</meta:generator>
    <meta:print-date>2026-04-17T10:50:25.581233006</meta:print-date>
    <meta:printed-by>PDF files</meta:printed-by>
    <meta:document-statistic meta:table-count="0" meta:image-count="2" meta:object-count="0" meta:page-count="11" meta:paragraph-count="215" meta:word-count="1905" meta:character-count="14933" meta:non-whitespace-character-count="10587"/>
  </office:meta>
</office:document-meta>
</file>