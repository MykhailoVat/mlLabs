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0000001E0F891715F.png" manifest:media-type="image/png"/>
  <manifest:file-entry manifest:full-path="Pictures/1000000100000280000001E01AC08374.png" manifest:media-type="image/png"/>
  <manifest:file-entry manifest:full-path="Pictures/1000000100000280000001E061BB7E36.png" manifest:media-type="image/png"/>
  <manifest:file-entry manifest:full-path="Pictures/1000000100000280000001E048F907C3.png" manifest:media-type="image/png"/>
  <manifest:file-entry manifest:full-path="Pictures/1000000100000280000001E06EAFA3B5.png" manifest:media-type="image/png"/>
  <manifest:file-entry manifest:full-path="Pictures/1000000100000280000001E0249AA5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Table1" style:family="table">
      <style:table-properties style:width="15.584cm" table:align="left"/>
    </style:style>
    <style:style style:name="Table1.A" style:family="table-column">
      <style:table-column-properties style:column-width="1.189cm"/>
    </style:style>
    <style:style style:name="Table1.B" style:family="table-column">
      <style:table-column-properties style:column-width="5.112cm"/>
    </style:style>
    <style:style style:name="Table1.C" style:family="table-column">
      <style:table-column-properties style:column-width="4.888cm"/>
    </style:style>
    <style:style style:name="Table1.D" style:family="table-column">
      <style:table-column-properties style:column-width="4.396cm"/>
    </style:style>
    <style:style style:name="Table1.A1" style:family="table-cell">
      <style:table-cell-properties style:vertical-align="middle" fo:padding-left="0.088cm" fo:padding-right="0.097cm" fo:padding-top="0.097cm" fo:padding-bottom="0.097cm" fo:border="0.5pt solid #000000"/>
    </style:style>
    <style:style style:name="Table1.B1" style:family="table-cell">
      <style:table-cell-properties style:vertical-align="middle" fo:padding-left="0.088cm" fo:padding-right="0.097cm" fo:padding-top="0.097cm" fo:padding-bottom="0.097cm" fo:border-left="0.5pt solid #000000" fo:border-right="none" fo:border-top="0.5pt solid #000000" fo:border-bottom="0.5pt solid #000000"/>
    </style:style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d10025"/>
    </style:style>
    <style:style style:name="P3" style:family="paragraph" style:parent-style-name="Preformatted_20_Text">
      <style:paragraph-properties fo:text-align="start" style:justify-single-word="false"/>
    </style:style>
    <style:style style:name="P4" style:family="paragraph" style:parent-style-name="Preformatted_20_Text">
      <style:text-properties officeooo:paragraph-rsid="0024b6db"/>
    </style:style>
    <style:style style:name="P5" style:family="paragraph" style:parent-style-name="Preformatted_20_Text">
      <style:text-properties fo:font-size="12pt" style:text-underline-style="solid" style:text-underline-width="auto" style:text-underline-color="font-color" fo:font-weight="bold" officeooo:paragraph-rsid="0024b6db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style:font-size-asian="12pt" style:font-size-complex="12pt"/>
    </style:style>
    <style:style style:name="P7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font-size="12pt" style:text-underline-style="none" officeooo:rsid="00d52a01" officeooo:paragraph-rsid="00d52a01" style:font-size-asian="10.5pt" style:font-size-complex="12pt"/>
    </style:style>
    <style:style style:name="P9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Mono" fo:font-size="12pt" fo:font-style="normal" style:text-underline-style="none" fo:font-weight="normal" officeooo:rsid="00d52a01" officeooo:paragraph-rsid="00d52a01" style:text-blinking="false" fo:background-color="transparent" style:font-name-asian="Noto Sans Mono CJK SC" style:font-size-asian="10.5pt" style:font-name-complex="Liberation Mono1" style:font-size-complex="12pt"/>
    </style:style>
    <style:style style:name="P10" style:family="paragraph" style:parent-style-name="Standard">
      <loext:graphic-properties draw:fill="solid" draw:fill-color="#191a1c"/>
      <style:paragraph-properties fo:background-color="#191a1c" fo:padding="0cm" fo:border="none" style:shadow="none"/>
    </style:style>
    <style:style style:name="P11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Mono" fo:font-size="12pt" fo:font-style="normal" style:text-underline-style="none" fo:font-weight="normal" officeooo:rsid="00d52a01" officeooo:paragraph-rsid="00d52a01" style:text-blinking="false" fo:background-color="transparent" style:font-name-asian="Noto Sans Mono CJK SC" style:font-size-asian="10.5pt" style:font-name-complex="Liberation Mono1" style:font-size-complex="12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Mono" fo:font-size="12pt" fo:font-style="normal" style:text-underline-style="none" fo:font-weight="normal" officeooo:rsid="00d52a01" style:text-blinking="false" fo:background-color="transparent" style:font-name-asian="Noto Sans Mono CJK SC" style:font-name-complex="Liberation Mono1"/>
    </style:style>
    <style:style style:name="P13" style:family="paragraph" style:parent-style-name="Preformatted_20_Text">
      <style:text-properties fo:font-size="12pt" style:text-underline-style="none" officeooo:rsid="00dcce3b" officeooo:paragraph-rsid="00dcce3b" style:font-size-asian="10.5pt" style:font-size-complex="12pt"/>
    </style:style>
    <style:style style:name="P14" style:family="paragraph" style:parent-style-name="Preformatted_20_Text">
      <style:text-properties fo:font-size="12pt" style:text-underline-style="none" officeooo:rsid="00e15a1e" officeooo:paragraph-rsid="00e15a1e" style:font-size-asian="10.5pt" style:font-size-complex="12pt"/>
    </style:style>
    <style:style style:name="P15" style:family="paragraph" style:parent-style-name="Preformatted_20_Text">
      <style:text-properties fo:font-size="12pt" style:text-underline-style="none" officeooo:rsid="00e02db3" officeooo:paragraph-rsid="00dcce3b" style:font-size-asian="10.5pt" style:font-size-complex="12pt"/>
    </style:style>
    <style:style style:name="P16" style:family="paragraph" style:parent-style-name="Preformatted_20_Text">
      <style:text-properties fo:font-size="12pt" style:text-underline-style="none" officeooo:rsid="00e1a104" officeooo:paragraph-rsid="00e1a104" style:font-size-asian="10.5pt" style:font-size-complex="12pt"/>
    </style:style>
    <style:style style:name="P17" style:family="paragraph" style:parent-style-name="Preformatted_20_Text">
      <style:text-properties fo:font-size="12pt" style:text-underline-style="none" officeooo:rsid="00e3686b" officeooo:paragraph-rsid="00e3686b" style:font-size-asian="10.5pt" style:font-size-complex="12pt"/>
    </style:style>
    <style:style style:name="P18" style:family="paragraph" style:parent-style-name="Preformatted_20_Text">
      <style:text-properties fo:font-size="12pt" style:text-underline-style="none" officeooo:rsid="00e530ca" officeooo:paragraph-rsid="00e530ca" style:font-size-asian="10.5pt" style:font-size-complex="12pt"/>
    </style:style>
    <style:style style:name="P19" style:family="paragraph" style:parent-style-name="Preformatted_20_Text">
      <style:text-properties fo:font-size="12pt" style:text-underline-style="none" officeooo:rsid="00e6af3b" officeooo:paragraph-rsid="00e6af3b" style:font-size-asian="10.5pt" style:font-size-complex="12pt"/>
    </style:style>
    <style:style style:name="P20" style:family="paragraph" style:parent-style-name="Preformatted_20_Text">
      <style:text-properties fo:font-size="12pt" style:text-underline-style="none" officeooo:rsid="00e8f97e" officeooo:paragraph-rsid="00e8f97e" style:font-size-asian="10.5pt" style:font-size-complex="12pt"/>
    </style:style>
    <style:style style:name="P21" style:family="paragraph" style:parent-style-name="Preformatted_20_Text">
      <style:text-properties fo:font-size="12pt" style:text-underline-style="none" officeooo:rsid="00eab958" officeooo:paragraph-rsid="00eab958" style:font-size-asian="10.5pt" style:font-size-complex="12pt"/>
    </style:style>
    <style:style style:name="P22" style:family="paragraph" style:parent-style-name="Preformatted_20_Text">
      <style:text-properties fo:font-size="12pt" style:text-underline-style="none" officeooo:rsid="00e77ce0" officeooo:paragraph-rsid="00e77ce0" style:font-size-asian="10.5pt" style:font-size-complex="12pt"/>
    </style:style>
    <style:style style:name="P23" style:family="paragraph" style:parent-style-name="Preformatted_20_Text">
      <style:text-properties fo:font-size="12pt" style:text-underline-style="none" officeooo:rsid="003f9bcd" officeooo:paragraph-rsid="003f9bcd" style:font-size-asian="10.5pt" style:font-size-complex="12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f9bcd" style:text-blinking="false" fo:background-color="transparent" style:font-name-asian="Noto Sans Mono CJK SC" style:font-name-complex="Liberation Mono1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c31c5" officeooo:paragraph-rsid="00ec31c5" style:text-blinking="false" fo:background-color="transparent" style:font-name-asian="Noto Sans Mono CJK SC" style:font-name-complex="Liberation Mono1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Mono1" style:text-underline-style="none" officeooo:rsid="003f9bcd" style:text-blinking="false" fo:background-color="transparent" style:font-name-asian="Noto Sans Mono CJK SC" style:font-name-complex="Liberation Mono1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Mono1" style:text-underline-style="none" officeooo:rsid="00ee8642" officeooo:paragraph-rsid="00ee8642" style:text-blinking="false" fo:background-color="transparent" style:font-name-asian="Noto Sans Mono CJK SC" style:font-name-complex="Liberation Mono1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Mono1" style:text-underline-style="none" officeooo:rsid="003f9bcd" officeooo:paragraph-rsid="00ee8642" style:text-blinking="false" fo:background-color="transparent" style:font-name-asian="Noto Sans Mono CJK SC" style:font-name-complex="Liberation Mono1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Liberation Mono1" officeooo:rsid="003f9bcd" style:font-name-asian="Noto Sans Mono CJK SC" style:font-name-complex="Liberation Mono1"/>
    </style:style>
    <style:style style:name="P30" style:family="paragraph" style:parent-style-name="Standard">
      <style:text-properties style:text-underline-style="solid" style:text-underline-width="auto" style:text-underline-color="font-color" officeooo:rsid="00efa9fb" officeooo:paragraph-rsid="00efa9fb"/>
    </style:style>
    <style:style style:name="P31" style:family="paragraph" style:parent-style-name="Standard">
      <style:text-properties style:text-underline-style="none" officeooo:rsid="00eff37f" officeooo:paragraph-rsid="00eff37f"/>
    </style:style>
    <style:style style:name="P32" style:family="paragraph" style:parent-style-name="Standard">
      <loext:graphic-properties draw:fill="solid" draw:fill-color="#191a1c"/>
      <style:paragraph-properties fo:background-color="#191a1c" fo:padding="0cm" fo:border="none" style:shadow="none"/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P33" style:family="paragraph" style:parent-style-name="Standard">
      <style:text-properties officeooo:paragraph-rsid="00eff37f"/>
    </style:style>
    <style:style style:name="P34" style:family="paragraph" style:parent-style-name="Standard">
      <style:text-properties officeooo:rsid="00eff37f" officeooo:paragraph-rsid="00eff37f"/>
    </style:style>
    <style:style style:name="P35" style:family="paragraph" style:parent-style-name="Standard">
      <style:text-properties officeooo:rsid="00f074da" officeooo:paragraph-rsid="00f074da"/>
    </style:style>
    <style:style style:name="P36" style:family="paragraph" style:parent-style-name="Standard">
      <style:paragraph-properties fo:text-align="start" style:justify-single-word="false"/>
      <style:text-properties officeooo:rsid="00f074da" officeooo:paragraph-rsid="00f7fe4f"/>
    </style:style>
    <style:style style:name="P37" style:family="paragraph" style:parent-style-name="Standard">
      <style:text-properties officeooo:rsid="00f4c054" officeooo:paragraph-rsid="00f4c054"/>
    </style:style>
    <style:style style:name="P38" style:family="paragraph" style:parent-style-name="Preformatted_20_Text">
      <style:text-properties fo:font-size="12pt" style:text-underline-style="none" officeooo:rsid="00f7fe4f" officeooo:paragraph-rsid="00f7fe4f" style:font-size-asian="10.5pt" style:font-size-complex="12pt"/>
    </style:style>
    <style:style style:name="P39" style:family="paragraph" style:parent-style-name="Preformatted_20_Text">
      <style:text-properties fo:font-size="12pt" style:text-underline-style="none" officeooo:rsid="00f7fe4f" officeooo:paragraph-rsid="00f82f66" style:font-size-asian="10.5pt" style:font-size-complex="12pt"/>
    </style:style>
    <style:style style:name="P40" style:family="paragraph" style:parent-style-name="Preformatted_20_Text">
      <style:text-properties fo:font-size="12pt" style:text-underline-style="none" officeooo:rsid="00f82f66" officeooo:paragraph-rsid="00f82f66" style:font-size-asian="10.5pt" style:font-size-complex="12pt"/>
    </style:style>
    <style:style style:name="P41" style:family="paragraph" style:parent-style-name="Preformatted_20_Text">
      <style:text-properties fo:font-size="12pt" style:text-underline-style="solid" style:text-underline-width="auto" style:text-underline-color="font-color" officeooo:rsid="00f9d3b0" officeooo:paragraph-rsid="00f9d3b0" style:font-size-asian="10.5pt" style:font-size-complex="12pt"/>
    </style:style>
    <style:style style:name="P42" style:family="paragraph" style:parent-style-name="Preformatted_20_Text">
      <style:text-properties fo:font-size="12pt" style:text-underline-style="none" officeooo:rsid="00fa8980" officeooo:paragraph-rsid="00fa8980" style:font-size-asian="10.5pt" style:font-size-complex="12pt"/>
    </style:style>
    <style:style style:name="P43" style:family="paragraph" style:parent-style-name="Standard">
      <style:text-properties fo:font-size="12pt" style:text-underline-style="none" officeooo:rsid="00fa8980" officeooo:paragraph-rsid="00fa8980" style:font-size-asian="10.5pt" style:font-size-complex="12pt"/>
    </style:style>
    <style:style style:name="P44" style:family="paragraph" style:parent-style-name="Standard">
      <style:text-properties fo:font-size="12pt" style:text-underline-style="none" officeooo:rsid="00fc1591" officeooo:paragraph-rsid="00fc1591" style:font-size-asian="10.5pt" style:font-size-complex="12pt"/>
    </style:style>
    <style:style style:name="P45" style:family="paragraph" style:parent-style-name="Standard">
      <style:text-properties fo:font-size="12pt" style:text-underline-style="none" officeooo:rsid="00fd5889" officeooo:paragraph-rsid="00fd5889" style:font-size-asian="10.5pt" style:font-size-complex="12pt"/>
    </style:style>
    <style:style style:name="P46" style:family="paragraph" style:parent-style-name="Standard">
      <style:text-properties fo:font-size="12pt" style:text-underline-style="none" officeooo:rsid="010c670b" officeooo:paragraph-rsid="010c670b" style:font-size-asian="10.5pt" style:font-size-complex="12pt"/>
    </style:style>
    <style:style style:name="P47" style:family="paragraph" style:parent-style-name="Standard">
      <style:text-properties fo:font-size="12pt" style:text-underline-style="none" officeooo:rsid="010eb61f" officeooo:paragraph-rsid="010eb61f" style:font-size-asian="10.5pt" style:font-size-complex="12pt"/>
    </style:style>
    <style:style style:name="P48" style:family="paragraph" style:parent-style-name="Standard">
      <style:text-properties fo:font-size="12pt" style:text-underline-style="none" officeooo:rsid="010d4a31" officeooo:paragraph-rsid="010d4a31" style:font-size-asian="10.5pt" style:font-size-complex="12pt"/>
    </style:style>
    <style:style style:name="P49" style:family="paragraph" style:parent-style-name="Preformatted_20_Text">
      <style:text-properties fo:font-size="12pt" style:text-underline-style="none" officeooo:rsid="01000923" officeooo:paragraph-rsid="01000923" style:font-size-asian="10.5pt" style:font-size-complex="12pt"/>
    </style:style>
    <style:style style:name="P50" style:family="paragraph" style:parent-style-name="Preformatted_20_Text">
      <style:text-properties fo:font-size="12pt" style:text-underline-style="none" officeooo:rsid="010138b8" officeooo:paragraph-rsid="010138b8" style:font-size-asian="10.5pt" style:font-size-complex="12pt"/>
    </style:style>
    <style:style style:name="P51" style:family="paragraph" style:parent-style-name="Preformatted_20_Text">
      <style:text-properties fo:font-size="12pt" style:text-underline-style="none" officeooo:rsid="01000923" officeooo:paragraph-rsid="010138b8" style:font-size-asian="10.5pt" style:font-size-complex="12pt"/>
    </style:style>
    <style:style style:name="P52" style:family="paragraph" style:parent-style-name="Preformatted_20_Text">
      <style:text-properties fo:font-size="12pt" style:text-underline-style="solid" style:text-underline-width="auto" style:text-underline-color="font-color" officeooo:rsid="010138b8" officeooo:paragraph-rsid="010138b8" style:font-size-asian="10.5pt" style:font-size-complex="12pt"/>
    </style:style>
    <style:style style:name="P53" style:family="paragraph" style:parent-style-name="Preformatted_20_Text">
      <style:text-properties fo:font-size="12pt" style:text-underline-style="none" officeooo:rsid="010fc98e" officeooo:paragraph-rsid="010fc98e" style:font-size-asian="10.5pt" style:font-size-complex="12pt"/>
    </style:style>
    <style:style style:name="P54" style:family="paragraph" style:parent-style-name="Preformatted_20_Text">
      <style:text-properties fo:font-size="12pt" style:text-underline-style="none" officeooo:rsid="01104069" officeooo:paragraph-rsid="01104069" style:font-size-asian="10.5pt" style:font-size-complex="12pt"/>
    </style:style>
    <style:style style:name="P55" style:family="paragraph" style:parent-style-name="Preformatted_20_Text">
      <style:text-properties fo:font-size="12pt" style:text-underline-style="none" officeooo:rsid="0111d696" officeooo:paragraph-rsid="0111d696" style:font-size-asian="10.5pt" style:font-size-complex="12pt"/>
    </style:style>
    <style:style style:name="T1" style:family="text">
      <style:text-properties officeooo:rsid="00d0822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dc5683"/>
    </style:style>
    <style:style style:name="T4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dee883"/>
    </style:style>
    <style:style style:name="T12" style:family="text">
      <style:text-properties officeooo:rsid="00e3686b"/>
    </style:style>
    <style:style style:name="T13" style:family="text">
      <style:text-properties officeooo:rsid="00e77ce0"/>
    </style:style>
    <style:style style:name="T14" style:family="text">
      <style:text-properties officeooo:rsid="00e77be4"/>
    </style:style>
    <style:style style:name="T15" style:family="text">
      <style:text-properties officeooo:rsid="00ec31c5"/>
    </style:style>
    <style:style style:name="T16" style:family="text">
      <style:text-properties officeooo:rsid="003f9bcd"/>
    </style:style>
    <style:style style:name="T17" style:family="text">
      <style:text-properties officeooo:rsid="00eeb21a"/>
    </style:style>
    <style:style style:name="T18" style:family="text">
      <style:text-properties officeooo:rsid="00ee8642"/>
    </style:style>
    <style:style style:name="T19" style:family="text">
      <style:text-properties officeooo:rsid="00fa8980"/>
    </style:style>
    <style:style style:name="T20" style:family="text">
      <style:text-properties officeooo:rsid="00f37f37"/>
    </style:style>
    <style:style style:name="T21" style:family="text">
      <style:text-properties officeooo:rsid="00f68cf1"/>
    </style:style>
    <style:style style:name="T22" style:family="text">
      <style:text-properties officeooo:rsid="00f7fe4f"/>
    </style:style>
    <style:style style:name="T23" style:family="text">
      <style:text-properties fo:color="#000000" loext:opacity="100%" style:font-name="JetBrains Mono" fo:font-size="10pt" fo:font-style="normal" fo:font-weight="normal" officeooo:rsid="00f7fe4f" style:font-size-asian="10pt" style:font-style-asian="normal" style:font-weight-asian="normal"/>
    </style:style>
    <style:style style:name="T24" style:family="text">
      <style:text-properties fo:color="#aa4926" loext:opacity="100%" style:font-name="JetBrains Mono" fo:font-size="10pt" fo:font-style="normal" fo:font-weight="normal" officeooo:rsid="00f7fe4f" style:font-size-asian="10pt" style:font-style-asian="normal" style:font-weight-asian="normal"/>
    </style:style>
    <style:style style:name="T25" style:family="text">
      <style:text-properties fo:color="#bcbec4" loext:opacity="100%" style:font-name="JetBrains Mono" fo:font-size="10pt" fo:font-style="normal" fo:font-weight="normal" officeooo:rsid="00f7fe4f" style:font-size-asian="10pt" style:font-style-asian="normal" style:font-weight-asian="normal"/>
    </style:style>
    <style:style style:name="T26" style:family="text">
      <style:text-properties fo:color="#6aab73" loext:opacity="100%" style:font-name="JetBrains Mono" fo:font-size="10pt" fo:font-style="normal" fo:font-weight="normal" officeooo:rsid="00f7fe4f" style:font-size-asian="10pt" style:font-style-asian="normal" style:font-weight-asian="normal"/>
    </style:style>
    <style:style style:name="T27" style:family="text">
      <style:text-properties fo:color="#2aacb8" loext:opacity="100%" style:font-name="JetBrains Mono" fo:font-size="10pt" fo:font-style="normal" fo:font-weight="normal" officeooo:rsid="00f7fe4f" style:font-size-asian="10pt" style:font-style-asian="normal" style:font-weight-asian="normal"/>
    </style:style>
    <style:style style:name="T28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officeooo:rsid="00fa755f"/>
    </style:style>
    <style:style style:name="T30" style:family="text">
      <style:text-properties officeooo:rsid="00fac7ed"/>
    </style:style>
    <style:style style:name="T31" style:family="text">
      <style:text-properties officeooo:rsid="00fb249f"/>
    </style:style>
    <style:style style:name="T32" style:family="text">
      <style:text-properties officeooo:rsid="00fd5889"/>
    </style:style>
    <style:style style:name="T33" style:family="text">
      <style:text-properties officeooo:rsid="010abc96"/>
    </style:style>
    <style:style style:name="T34" style:family="text">
      <style:text-properties officeooo:rsid="010d4a31"/>
    </style:style>
    <style:style style:name="T35" style:family="text">
      <style:text-properties officeooo:rsid="010d89bd"/>
    </style:style>
    <style:style style:name="T36" style:family="text">
      <style:text-properties officeooo:rsid="0106b0e5"/>
    </style:style>
    <style:style style:name="T37" style:family="text">
      <style:text-properties officeooo:rsid="0109dbc9"/>
    </style:style>
    <style:style style:name="T38" style:family="text">
      <style:text-properties officeooo:rsid="0110406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 </text:p>
      <text:p text:style-name="P1">Національний технічний університет України  </text:p>
      <text:p text:style-name="P1">«Київський політехнічний інститут ім. Ігоря Сікорського» </text:p>
      <text:p text:style-name="P1">Факультет інформатики та обчислювальної техніки </text:p>
      <text:p text:style-name="P1">Кафедра обчислювальної техніки </text:p>
      <text:p text:style-name="P1"><text:s/></text:p>
      <text:p text:style-name="P1"><text:s/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>ЛАБОРАТОРНА РОБОТА № <text:span text:style-name="T1">3</text:span> </text:p>
      <text:p text:style-name="P1">з дисципліни «Прикладні задачі машинного навчання» </text:p>
      <text:p text:style-name="P1"/>
      <text:p text:style-name="P2">на тему «Класифікація, регресія і кластеризація з використанням бібліотеки</text:p>
      <text:p text:style-name="P2">scikit-learn»</text:p>
      <text:p text:style-name="P1"/>
      <text:p text:style-name="P1"><text:s/></text:p>
      <text:p text:style-name="P1"><text:s/></text:p>
      <text:p text:style-name="P1"><text:s/></text:p>
      <text:p text:style-name="P1"/>
      <text:p text:style-name="P1"/>
      <text:p text:style-name="P1"/>
      <text:p text:style-name="P1"><text:s/></text:p>
      <text:p text:style-name="P1"><text:s/></text:p>
      <text:p text:style-name="P3"><text:s/></text:p>
      <text:p text:style-name="P3">Виконав: <text:s text:c="75"/></text:p>
      <text:p text:style-name="P3">Студент 2 курсу ФІОТ-у <text:s text:c="49"/></text:p>
      <text:p text:style-name="P3">групи ІМ-42 </text:p>
      <text:p text:style-name="P3">Ватолкін Михайло Андрійович</text:p>
      <text:p text:style-name="P3">Номер у списку групи - 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їв <text:s text:c="2"/>2026</text:p>
      <text:p text:style-name="P1"/>
      <text:p text:style-name="Preformatted_20_Text"/>
      <text:p text:style-name="Preformatted_20_Text"><text:soft-page-break/></text:p>
      <text:p text:style-name="P4"/>
      <text:p text:style-name="P5">Постановка завдання</text:p>
      <text:p text:style-name="P6"/>
      <text:p text:style-name="P6">1. Повторити дії описані в пункті «Часові ряди і проста лінійна</text:p>
      <text:p text:style-name="P6">регресія частина 2» даної лабораторної роботи та порівняти з</text:p>
      <text:p text:style-name="P6">результатом попередньої лабораторної роботи. Для виконання</text:p>
      <text:p text:style-name="P6">завдання використати дані з попередньої лабораторної роботи.<text:line-break/></text:p>
      <text:p text:style-name="P6">2. Аналогічно з прикладом з лекції 7, згенеруйте набір даних</text:p>
      <text:p text:style-name="P6">та класифікуйте його використавши класифікатор SVC (слайд 95).</text:p>
      <text:p text:style-name="P6"/>
      <text:p text:style-name="P6">3. Детально порівняти декілька класифікаційних оцінювачів</text:p>
      <text:p text:style-name="P6">наприклад KNeighborsClassifier, SVC та GaussianNB для вбудованого в scikit-learn одного набору даних (вибрати довільний за бажанням).</text:p>
      <text:p text:style-name="P6"/>
      <text:p text:style-name="P6">4. Зробити звіт про роботу, який включає:</text:p>
      <text:p text:style-name="P6">а. Титульна сторінка з інформацією про виконавця, темою та</text:p>
      <text:p text:style-name="P6">номером лабораторної роботи,</text:p>
      <text:p text:style-name="P6">б. Постановку завдання</text:p>
      <text:p text:style-name="P6">в. Скріни коду та скріни результату виконання з коментарями</text:p>
      <text:p text:style-name="P6">г. Висновок</text:p>
      <text:p text:style-name="P6"/>
      <text:p text:style-name="P6">5. Надіслати звіт (.docx або .doc) у Google Classroom перед</text:p>
      <text:p text:style-name="P6">захистом на парі.</text:p>
      <text:p text:style-name="P6"/>
      <text:p text:style-name="Preformatted_20_Text"/>
      <text:p text:style-name="Preformatted_20_Text"/>
      <text:p text:style-name="Preformatted_20_Text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Виконання:</text:p>
      <text:p text:style-name="P7"/>
      <text:p text:style-name="P8"><text:span text:style-name="T2">Пункт 1</text:span>:</text:p>
      <text:p text:style-name="P8"/>
      <text:p text:style-name="P9"><text:bookmark text:name="docs-internal-guid-28b42ee7-7fff-d819-09b9-64ca1d4ee311"/>З рекомендованого сайту завантажив дані по середній температурі в січні в місті Нью-Йорк за період 1895-202<text:span text:style-name="T3">0</text:span> роки, тепер ці дані можна відформатувати і зберегти окремим csv файлом, для цього використано наступний код:</text:p>
      <text:p text:style-name="P10" loext:marker-style-name="T4"><text:span text:style-name="T5">import </text:span><text:span text:style-name="T6">pandas </text:span><text:span text:style-name="T5">as </text:span><text:span text:style-name="T6">pd<text:line-break/><text:line-break/>rnyc = pd.read_csv(</text:span><text:span text:style-name="T7">'data/data.csv'</text:span><text:span text:style-name="T6">)<text:line-break/><text:line-break/>rnyc.columns = [</text:span><text:span text:style-name="T7">'Date'</text:span><text:span text:style-name="T6">, </text:span><text:span text:style-name="T7">'Temperature'</text:span><text:span text:style-name="T6">, </text:span><text:span text:style-name="T7">'Anomaly'</text:span><text:span text:style-name="T6">]<text:line-break/>rnyc.Date = rnyc.Date.floordiv(</text:span><text:span text:style-name="T8">100</text:span><text:span text:style-name="T6">)<text:line-break/><text:line-break/></text:span><text:span text:style-name="T9">print</text:span><text:span text:style-name="T6">(</text:span><text:span text:style-name="T7">' Formatted data '</text:span><text:span text:style-name="T6">.center(</text:span><text:span text:style-name="T8">20</text:span><text:span text:style-name="T6">, </text:span><text:span text:style-name="T7">'#'</text:span><text:span text:style-name="T6">))<text:line-break/></text:span><text:span text:style-name="T9">print</text:span><text:span text:style-name="T6">(rnyc.head())<text:line-break/></text:span><text:span text:style-name="T9">print</text:span><text:span text:style-name="T6">(rnyc.tail())<text:line-break/><text:line-break/>nyc_1895_2018 = rnyc[rnyc[</text:span><text:span text:style-name="T7">'Date'</text:span><text:span text:style-name="T6">] &lt;= </text:span><text:span text:style-name="T8">2020</text:span><text:span text:style-name="T6">]<text:line-break/><text:line-break/>nyc_1895_2018.to_csv(</text:span><text:span text:style-name="T7">'data/data_1895-2020.csv'</text:span><text:span text:style-name="T6">, </text:span><text:span text:style-name="T10">index</text:span><text:span text:style-name="T6">=</text:span><text:span text:style-name="T5">False</text:span><text:span text:style-name="T6">)<text:line-break/><text:line-break/></text:span><text:span text:style-name="T4">#print(nyc.Date.dtype)<text:line-break/></text:span></text:p>
      <text:p text:style-name="P11"/>
      <text:p text:style-name="P9"><text:bookmark text:name="docs-internal-guid-04fc1859-7fff-96dc-ad2e-32d4daaf0a09"/>Даний код зчитує дані csv файлу, що був завантажений з сайту, виводить перші й останні 5 рядків даних, перейменовує стовпці на </text:p>
      <text:p text:style-name="P12">['Date', 'Temperature', 'Anomaly'] та цілочисельно ділить всі значення стовпця 'Date' . Останній крок потрібен, бо формат запису значень в стовпці 'Date' має вигляд yyyymm. Оскільки місяць однаковий для всіх значень 'Date', достатньо мати в цьому стовпчику лише роки. Після цього код створює новий csv файл з відформатованими даними.</text:p>
      <text:p text:style-name="P8"/>
      <text:p text:style-name="P13">Вивід в консоль в результаті виконання коду:</text:p>
      <text:p text:style-name="P13"/>
      <text:p text:style-name="P13">---</text:p>
      <text:p text:style-name="P13"/>
      <text:p text:style-name="P13">/home/misha/Documents/2sem26/ml/.venv/bin/python /home/misha/Documents/2sem26/ml/lab3/1-1-format_data.py </text:p>
      <text:p text:style-name="P13">## Formatted data ##</text:p>
      <text:p text:style-name="P13"><text:s text:c="3"/>Date <text:s/>Temperature <text:s/>Anomaly</text:p>
      <text:p text:style-name="P13">0 <text:s/>1895 <text:s text:c="8"/>28.4 <text:s text:c="4"/>-3.0</text:p>
      <text:p text:style-name="P13">1 <text:s/>1896 <text:s text:c="8"/>27.8 <text:s text:c="4"/>-3.6</text:p>
      <text:p text:style-name="P13">2 <text:s/>1897 <text:s text:c="8"/>28.6 <text:s text:c="4"/>-2.8</text:p>
      <text:p text:style-name="P13">3 <text:s/>1898 <text:s text:c="8"/>33.2 <text:s text:c="5"/>1.8</text:p>
      <text:p text:style-name="P13">4 <text:s/>1899 <text:s text:c="8"/>29.2 <text:s text:c="4"/>-2.2</text:p>
      <text:p text:style-name="P13"><text:s text:c="5"/>Date <text:s/>Temperature <text:s/>Anomaly</text:p>
      <text:p text:style-name="P13"><text:soft-page-break/>127 <text:s/>2022 <text:s text:c="8"/>30.4 <text:s text:c="4"/>-1.0</text:p>
      <text:p text:style-name="P13">128 <text:s/>2023 <text:s text:c="8"/>43.5 <text:s text:c="4"/>12.1</text:p>
      <text:p text:style-name="P13">129 <text:s/>2024 <text:s text:c="8"/>37.0 <text:s text:c="5"/>5.6</text:p>
      <text:p text:style-name="P13">130 <text:s/>2025 <text:s text:c="8"/>31.3 <text:s text:c="4"/>-0.1</text:p>
      <text:p text:style-name="P13">131 <text:s/>2026 <text:s text:c="8"/>30.4 <text:s text:c="4"/>-1.0</text:p>
      <text:p text:style-name="P13"/>
      <text:p text:style-name="P13">Process finished with exit code 0</text:p>
      <text:p text:style-name="P13"/>
      <text:p text:style-name="P13">--<text:span text:style-name="T11">­-</text:span></text:p>
      <text:p text:style-name="P14">Тепер проведемо навчання й тестування моделі простої лінійної регресії, за допомогою коду:</text:p>
      <text:p text:style-name="P14"/>
      <text:p text:style-name="P10" loext:marker-style-name="T6"><text:span text:style-name="T5">from </text:span><text:span text:style-name="T6">sklearn.model_selection </text:span><text:span text:style-name="T5">import </text:span><text:span text:style-name="T6">train_test_split<text:line-break/></text:span><text:span text:style-name="T5">from </text:span><text:span text:style-name="T6">sklearn.linear_model </text:span><text:span text:style-name="T5">import </text:span><text:span text:style-name="T6">LinearRegression<text:line-break/></text:span><text:span text:style-name="T5">import </text:span><text:span text:style-name="T6">pandas </text:span><text:span text:style-name="T5">as </text:span><text:span text:style-name="T6">pd<text:line-break/></text:span><text:span text:style-name="T5">from </text:span><text:span text:style-name="T6">matplotlib </text:span><text:span text:style-name="T5">import </text:span><text:span text:style-name="T6">pyplot </text:span><text:span text:style-name="T5">as </text:span><text:span text:style-name="T6">plt<text:line-break/></text:span><text:span text:style-name="T5">import </text:span><text:span text:style-name="T6">numpy </text:span><text:span text:style-name="T5">as </text:span><text:span text:style-name="T6">np<text:line-break/></text:span><text:span text:style-name="T5">import </text:span><text:span text:style-name="T6">seaborn </text:span><text:span text:style-name="T5">as </text:span><text:span text:style-name="T6">sns<text:line-break/><text:line-break/></text:span><text:span text:style-name="T4">#--- splitting<text:line-break/><text:line-break/></text:span><text:span text:style-name="T6">nyc = pd.read_csv(</text:span><text:span text:style-name="T7">'data/data_1895-2020.csv'</text:span><text:span text:style-name="T6">)<text:line-break/><text:line-break/>X_train, X_test, y_train, y_test = train_test_split(<text:line-break/> <text:s text:c="3"/>nyc.Date.values.reshape(-</text:span><text:span text:style-name="T8">1</text:span><text:span text:style-name="T6">, </text:span><text:span text:style-name="T8">1</text:span><text:span text:style-name="T6">), nyc.Temperature.values,<text:line-break/> <text:s text:c="3"/></text:span><text:span text:style-name="T10">random_state</text:span><text:span text:style-name="T6">=</text:span><text:span text:style-name="T8">42<text:line-break/></text:span><text:span text:style-name="T6">)<text:line-break/><text:line-break/></text:span><text:span text:style-name="T4">#print(X_test)<text:line-break/>#print(y_train)<text:line-break/><text:line-break/></text:span><text:span text:style-name="T9">print</text:span><text:span text:style-name="T6">(X_train.shape)<text:line-break/></text:span><text:span text:style-name="T9">print</text:span><text:span text:style-name="T6">(X_test.shape)<text:line-break/><text:line-break/></text:span><text:span text:style-name="T4">#--- learning<text:line-break/><text:line-break/></text:span><text:span text:style-name="T6">linreg = LinearRegression()<text:line-break/>linreg.fit(X_train, y_train)<text:line-break/><text:line-break/></text:span><text:span text:style-name="T4">#y=kx+b<text:line-break/></text:span><text:span text:style-name="T6">k=linreg.coef_[</text:span><text:span text:style-name="T8">0</text:span><text:span text:style-name="T6">]<text:line-break/>b=linreg.intercept_<text:line-break/><text:line-break/></text:span><text:span text:style-name="T4">#print(k)<text:line-break/>#print(b)<text:line-break/><text:line-break/>#--- testing<text:line-break/><text:line-break/></text:span><text:span text:style-name="T6">predicted = linreg.predict(X_test)<text:line-break/>expected = y_test<text:line-break/><text:line-break/></text:span><text:span text:style-name="T5">for </text:span><text:span text:style-name="T6">p,e </text:span><text:span text:style-name="T5">in </text:span><text:span text:style-name="T9">zip</text:span><text:span text:style-name="T6">(predicted[::</text:span><text:span text:style-name="T8">5</text:span><text:span text:style-name="T6">],expected[::</text:span><text:span text:style-name="T8">5</text:span><text:span text:style-name="T6">]):<text:line-break/> <text:s text:c="3"/></text:span><text:span text:style-name="T9">print</text:span><text:span text:style-name="T6">(</text:span><text:span text:style-name="T7">f'predicted:</text:span><text:span text:style-name="T5">{</text:span><text:span text:style-name="T6">p</text:span><text:span text:style-name="T5">:</text:span><text:span text:style-name="T7">.2f</text:span><text:span text:style-name="T5">}</text:span><text:span text:style-name="T7">,expected:</text:span><text:span text:style-name="T5">{</text:span><text:span text:style-name="T6">e</text:span><text:span text:style-name="T5">:</text:span><text:span text:style-name="T7">.2f</text:span><text:span text:style-name="T5">}</text:span><text:span text:style-name="T7">'</text:span><text:span text:style-name="T6">)<text:line-break/></text:span><text:soft-page-break/><text:span text:style-name="T9">print</text:span><text:span text:style-name="T6">(</text:span><text:span text:style-name="T7">'</text:span><text:span text:style-name="T5">\n</text:span><text:span text:style-name="T7">'</text:span><text:span text:style-name="T6">)<text:line-break/><text:line-break/></text:span><text:span text:style-name="T4">#--- prediction<text:line-break/><text:line-break/></text:span><text:span text:style-name="T6">predict = </text:span><text:span text:style-name="T5">lambda </text:span><text:span text:style-name="T6">x: k*x + b<text:line-break/><text:line-break/></text:span><text:span text:style-name="T5">for </text:span><text:span text:style-name="T6">year </text:span><text:span text:style-name="T5">in </text:span><text:span text:style-name="T9">range</text:span><text:span text:style-name="T6">(</text:span><text:span text:style-name="T8">2021</text:span><text:span text:style-name="T6">, </text:span><text:span text:style-name="T8">2027</text:span><text:span text:style-name="T6">):<text:line-break/> <text:s text:c="3"/></text:span><text:span text:style-name="T9">print</text:span><text:span text:style-name="T6">(</text:span><text:span text:style-name="T7">f'prediction on </text:span><text:span text:style-name="T5">{</text:span><text:span text:style-name="T6">year</text:span><text:span text:style-name="T5">}</text:span><text:span text:style-name="T7">: </text:span><text:span text:style-name="T5">{</text:span><text:span text:style-name="T6">predict(year)</text:span><text:span text:style-name="T5">}</text:span><text:span text:style-name="T7">'</text:span><text:span text:style-name="T6">)<text:line-break/><text:line-break/></text:span><text:span text:style-name="T5">for </text:span><text:span text:style-name="T6">year </text:span><text:span text:style-name="T5">in </text:span><text:span text:style-name="T9">range</text:span><text:span text:style-name="T6">(</text:span><text:span text:style-name="T8">1894</text:span><text:span text:style-name="T6">, </text:span><text:span text:style-name="T8">1888</text:span><text:span text:style-name="T6">, -</text:span><text:span text:style-name="T8">1</text:span><text:span text:style-name="T6">):<text:line-break/> <text:s text:c="3"/></text:span><text:span text:style-name="T9">print</text:span><text:span text:style-name="T6">(</text:span><text:span text:style-name="T7">f'prediction on </text:span><text:span text:style-name="T5">{</text:span><text:span text:style-name="T6">year</text:span><text:span text:style-name="T5">}</text:span><text:span text:style-name="T7">: </text:span><text:span text:style-name="T5">{</text:span><text:span text:style-name="T6">predict(year)</text:span><text:span text:style-name="T5">}</text:span><text:span text:style-name="T7">'</text:span><text:span text:style-name="T6">)<text:line-break/><text:line-break/></text:span><text:span text:style-name="T4">#--- visualizing<text:line-break/>#scatter<text:line-break/></text:span><text:span text:style-name="T6">axes = sns.scatterplot(nyc,</text:span><text:span text:style-name="T10">x</text:span><text:span text:style-name="T6">=</text:span><text:span text:style-name="T7">'Date'</text:span><text:span text:style-name="T6">,</text:span><text:span text:style-name="T10">y</text:span><text:span text:style-name="T6">=</text:span><text:span text:style-name="T7">'Temperature'</text:span><text:span text:style-name="T6">,<text:line-break/> <text:s text:c="22"/></text:span><text:span text:style-name="T10">hue</text:span><text:span text:style-name="T6">=</text:span><text:span text:style-name="T7">'Temperature'</text:span><text:span text:style-name="T6">, </text:span><text:span text:style-name="T10">palette</text:span><text:span text:style-name="T6">=</text:span><text:span text:style-name="T7">'muted'</text:span><text:span text:style-name="T6">, </text:span><text:span text:style-name="T10">legend</text:span><text:span text:style-name="T6">=</text:span><text:span text:style-name="T5">False</text:span><text:span text:style-name="T6">)<text:line-break/>axes.set_ylim(</text:span><text:span text:style-name="T8">10</text:span><text:span text:style-name="T6">, </text:span><text:span text:style-name="T8">70</text:span><text:span text:style-name="T6">)<text:line-break/><text:line-break/></text:span><text:span text:style-name="T4">#line<text:line-break/></text:span><text:span text:style-name="T6">x=np.array([</text:span><text:span text:style-name="T9">min</text:span><text:span text:style-name="T6">(nyc.Date.values), </text:span><text:span text:style-name="T9">max</text:span><text:span text:style-name="T6">(nyc.Date.values)])<text:line-break/>y = predict(x)<text:line-break/><text:line-break/>line = plt.plot(x,y)<text:line-break/><text:line-break/>plt.savefig(</text:span><text:span text:style-name="T7">'./data/plots/linreg.png'</text:span><text:span text:style-name="T6">)<text:line-break/>plt.close()<text:line-break/><text:line-break/></text:span></text:p>
      <text:p text:style-name="P14"/>
      <text:p text:style-name="P15"/>
      <text:p text:style-name="P16">В даному коді спочатку завантажуються відформатовані в минулому пункті дані, які розділяються на навчальні й тестові за допомогою функції train_test_split. Можна побачити, що для Date треба зробити reshape(-1,1), адже функція приймає двовимірний масив ознак. <text:span text:style-name="T12">Якщо ж ознака одна, то функція очікує матрицю з одним стовпчиком і багатьма рядками. Також фісуємо випадковість, задавши </text:span></text:p>
      <text:p text:style-name="P17">random_state = 42, для відтворюваності всіх результатів. <text:span text:style-name="T13">Перевіряємо чи дійсно розділ даних відбувся за відношенням 3:1.</text:span></text:p>
      <text:p text:style-name="P17"/>
      <text:p text:style-name="P18">Наступний крок – саме навчання. “Згодовуємо” навчальні дані алгоритму, отримавши модель простої лінійної регресії. Дістаємо параметри k і b з моделі для майбутніх передбачень.</text:p>
      <text:p text:style-name="P18"/>
      <text:p text:style-name="P18">Тестуємо модель, передавши їй тестові дані, після чого циклом виводимо порівняння передбачень і істинних значень.</text:p>
      <text:p text:style-name="P18"/>
      <text:p text:style-name="P18">Використаємо екстраговані параметри в лямбда функції, що здатна обчислювати передбачення для конкретного року. Така функція даватиме ідентичні передбачення, що й модель. Виведемо ці передбачення в консоль завдяки двом циклам.</text:p>
      <text:p text:style-name="P18"/>
      <text:p text:style-name="P19">Останнім кроком в коді є візуалізація. Малюємо scatterplot з усіма значеннями років та температур. <text:span text:style-name="T14">Далі передбачаємо завдяки лямбда </text:span><text:soft-page-break/><text:span text:style-name="T14">функції темперетуру на мінімальну й максимальну дати, отримавши лінію регресійної прямої, що ідентична модельній. </text:span><text:span text:style-name="T13">Отриманий графік з точками й регресійною прямою збережемо в .png файл.</text:span></text:p>
      <text:p text:style-name="P19"/>
      <text:p text:style-name="P20">Вивід в консоль в результаті виконання коду:</text:p>
      <text:p text:style-name="P20"/>
      <text:p text:style-name="P20">---</text:p>
      <text:p text:style-name="P20">/home/misha/Documents/2sem26/ml/.venv/bin/python /home/misha/Documents/2sem26/ml/lab3/1-2-regression.py </text:p>
      <text:p text:style-name="P20">(94, 1)</text:p>
      <text:p text:style-name="P20">(32, 1)</text:p>
      <text:p text:style-name="P20">predicted:31.45,expected:25.30</text:p>
      <text:p text:style-name="P20">predicted:31.58,expected:34.00</text:p>
      <text:p text:style-name="P20">predicted:29.14,expected:29.20</text:p>
      <text:p text:style-name="P20">predicted:29.61,expected:39.20</text:p>
      <text:p text:style-name="P20">predicted:30.51,expected:23.40</text:p>
      <text:p text:style-name="P20">predicted:30.34,expected:27.30</text:p>
      <text:p text:style-name="P20">predicted:29.91,expected:27.10</text:p>
      <text:p text:style-name="P20"/>
      <text:p text:style-name="P20"/>
      <text:p text:style-name="P20">prediction on 2021: 33.218167692433155</text:p>
      <text:p text:style-name="P20">prediction on 2022: 33.25160632082691</text:p>
      <text:p text:style-name="P20">prediction on 2023: 33.28504494922065</text:p>
      <text:p text:style-name="P20">prediction on 2024: 33.3184835776144</text:p>
      <text:p text:style-name="P20">prediction on 2025: 33.351922206008155</text:p>
      <text:p text:style-name="P20">prediction on 2026: 33.385360834401894</text:p>
      <text:p text:style-name="P20">prediction on 1894: 28.971461886427086</text:p>
      <text:p text:style-name="P20">prediction on 1893: 28.93802325803334</text:p>
      <text:p text:style-name="P20">prediction on 1892: 28.904584629639587</text:p>
      <text:p text:style-name="P20">prediction on 1891: 28.87114600124584</text:p>
      <text:p text:style-name="P20">prediction on 1890: 28.837707372852094</text:p>
      <text:p text:style-name="P20">prediction on 1889: 28.80426874445834</text:p>
      <text:p text:style-name="P20"/>
      <text:p text:style-name="P20">Process finished with exit code 0</text:p>
      <text:p text:style-name="P20">---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Графік:</text:p>
      <text:p text:style-name="P21"/>
      <text:p text:style-name="P21">---</text:p>
      <text:p text:style-name="P21"><draw:frame draw:style-name="fr1" draw:name="Image1" text:anchor-type="as-char" svg:width="15.879cm" svg:height="11.906cm" draw:z-index="0"><draw:image xlink:href="Pictures/1000000100000280000001E0249AA52D.png" xlink:type="simple" xlink:show="embed" xlink:actuate="onLoad" draw:mime-type="image/png"/></draw:frame></text:p>
      <text:p text:style-name="P21"/>
      <text:p text:style-name="P21">---</text:p>
      <text:p text:style-name="P19"/>
      <text:p text:style-name="P22">Порівняємо передбачення з минулою лаб. роботою.</text:p>
      <text:p text:style-name="P23"/>
      <text:p text:style-name="P23"/>
      <text:section text:style-name="Sect1" text:name="docs-internal-guid-f31b2c0c-7fff-57e2-ea06-fb4556669093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24">Рік</text:p>
            </table:table-cell>
            <table:table-cell table:style-name="Table1.B1" office:value-type="string">
              <text:p text:style-name="P24">Передбачена температура <text:span text:style-name="T15">(2 лаба)</text:span>,°F.</text:p>
            </table:table-cell>
            <table:table-cell table:style-name="Table1.A1" office:value-type="string">
              <text:p text:style-name="P25">Передбачена температура (модель)<text:span text:style-name="T16">,°F.</text:span></text:p>
            </table:table-cell>
            <table:table-cell table:style-name="Table1.A1" office:value-type="string">
              <text:p text:style-name="P24">Фактична температура,°F.</text:p>
            </table:table-cell>
          </table:table-row>
          <table:table-row>
            <table:table-cell table:style-name="Table1.A1" office:value-type="string">
              <text:p text:style-name="P24">2021</text:p>
            </table:table-cell>
            <table:table-cell table:style-name="Table1.B1" office:value-type="string">
              <text:p text:style-name="P26">≈<text:span text:style-name="T17">33.13</text:span></text:p>
            </table:table-cell>
            <table:table-cell table:style-name="Table1.A1" office:value-type="string">
              <text:p text:style-name="P27"><text:span text:style-name="T16">≈</text:span>33.22</text:p>
            </table:table-cell>
            <table:table-cell table:style-name="Table1.A1" office:value-type="string">
              <text:p text:style-name="P24">34.8</text:p>
            </table:table-cell>
          </table:table-row>
          <table:table-row>
            <table:table-cell table:style-name="Table1.A1" office:value-type="string">
              <text:p text:style-name="P24">2022</text:p>
            </table:table-cell>
            <table:table-cell table:style-name="Table1.B1" office:value-type="string">
              <text:p text:style-name="P26">≈<text:span text:style-name="T17">33.16</text:span></text:p>
            </table:table-cell>
            <table:table-cell table:style-name="Table1.A1" office:value-type="string">
              <text:p text:style-name="P28">≈<text:span text:style-name="T18">33.25</text:span></text:p>
            </table:table-cell>
            <table:table-cell table:style-name="Table1.A1" office:value-type="string">
              <text:p text:style-name="P24">30.4</text:p>
            </table:table-cell>
          </table:table-row>
          <table:table-row>
            <table:table-cell table:style-name="Table1.A1" office:value-type="string">
              <text:p text:style-name="P24">2023</text:p>
            </table:table-cell>
            <table:table-cell table:style-name="Table1.B1" office:value-type="string">
              <text:p text:style-name="P26">≈<text:span text:style-name="T17">33.19</text:span></text:p>
            </table:table-cell>
            <table:table-cell table:style-name="Table1.A1" office:value-type="string">
              <text:p text:style-name="P28">≈<text:span text:style-name="T18">33.29</text:span></text:p>
            </table:table-cell>
            <table:table-cell table:style-name="Table1.A1" office:value-type="string">
              <text:p text:style-name="P24">43.5</text:p>
            </table:table-cell>
          </table:table-row>
          <table:table-row>
            <table:table-cell table:style-name="Table1.A1" office:value-type="string">
              <text:p text:style-name="P24">2024</text:p>
            </table:table-cell>
            <table:table-cell table:style-name="Table1.B1" office:value-type="string">
              <text:p text:style-name="P26">≈<text:span text:style-name="T17">33.22</text:span></text:p>
            </table:table-cell>
            <table:table-cell table:style-name="Table1.A1" office:value-type="string">
              <text:p text:style-name="P28">≈<text:span text:style-name="T18">33.</text:span><text:span text:style-name="T17">3</text:span><text:span text:style-name="T18">2</text:span></text:p>
            </table:table-cell>
            <table:table-cell table:style-name="Table1.A1" office:value-type="string">
              <text:p text:style-name="P24">37.0</text:p>
            </table:table-cell>
          </table:table-row>
          <table:table-row>
            <table:table-cell table:style-name="Table1.A1" office:value-type="string">
              <text:p text:style-name="P24">2025</text:p>
            </table:table-cell>
            <table:table-cell table:style-name="Table1.B1" office:value-type="string">
              <text:p text:style-name="P26">≈<text:span text:style-name="T17">33.25</text:span></text:p>
            </table:table-cell>
            <table:table-cell table:style-name="Table1.A1" office:value-type="string">
              <text:p text:style-name="P28">≈<text:span text:style-name="T18">33.35</text:span></text:p>
            </table:table-cell>
            <table:table-cell table:style-name="Table1.A1" office:value-type="string">
              <text:p text:style-name="P24">31.3</text:p>
            </table:table-cell>
          </table:table-row>
          <table:table-row>
            <table:table-cell table:style-name="Table1.A1" office:value-type="string">
              <text:p text:style-name="P24">2026</text:p>
            </table:table-cell>
            <table:table-cell table:style-name="Table1.B1" office:value-type="string">
              <text:p text:style-name="P26">≈<text:span text:style-name="T17">33.28</text:span></text:p>
            </table:table-cell>
            <table:table-cell table:style-name="Table1.A1" office:value-type="string">
              <text:p text:style-name="P28">≈<text:span text:style-name="T18">33.39</text:span></text:p>
            </table:table-cell>
            <table:table-cell table:style-name="Table1.A1" office:value-type="string">
              <text:p text:style-name="P24">30.4</text:p>
            </table:table-cell>
          </table:table-row>
        </table:table>
        <text:p text:style-name="P29"/>
      </text:section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0">Пункт 2 :</text:p>
      <text:p text:style-name="P30"/>
      <text:p text:style-name="P31">Згенеруємо набір даних та класифікуємо його за допомогою класифікатора SVC.</text:p>
      <text:p text:style-name="P31"/>
      <text:p text:style-name="P10" loext:marker-style-name="T6"><text:span text:style-name="T5">from </text:span><text:span text:style-name="T6">sklearn.svm </text:span><text:span text:style-name="T5">import </text:span><text:span text:style-name="T6">SVC<text:line-break/></text:span><text:span text:style-name="T5">from </text:span><text:span text:style-name="T6">matplotlib </text:span><text:span text:style-name="T5">import </text:span><text:span text:style-name="T6">pyplot </text:span><text:span text:style-name="T5">as </text:span><text:span text:style-name="T6">plt<text:line-break/></text:span><text:span text:style-name="T5">import </text:span><text:span text:style-name="T6">numpy </text:span><text:span text:style-name="T5">as </text:span><text:span text:style-name="T6">np<text:line-break/></text:span><text:span text:style-name="T5">from </text:span><text:span text:style-name="T6">lab3.plot_decision_regions </text:span><text:span text:style-name="T5">import </text:span><text:span text:style-name="T6">pdr<text:line-break/><text:line-break/></text:span><text:span text:style-name="T4">#--- data<text:line-break/><text:line-break/></text:span><text:span text:style-name="T6">np.random.seed(</text:span><text:span text:style-name="T8">1</text:span><text:span text:style-name="T6">)<text:line-break/>X_xor = np.random.randn(</text:span><text:span text:style-name="T8">200</text:span><text:span text:style-name="T6">,</text:span><text:span text:style-name="T8">2</text:span><text:span text:style-name="T6">)<text:line-break/>y_xor = np.logical_xor(X_xor[:,</text:span><text:span text:style-name="T8">0</text:span><text:span text:style-name="T6">] &gt; </text:span><text:span text:style-name="T8">0</text:span><text:span text:style-name="T6">, X_xor[:,</text:span><text:span text:style-name="T8">1</text:span><text:span text:style-name="T6">] &gt; </text:span><text:span text:style-name="T8">0</text:span><text:span text:style-name="T6">)<text:line-break/>y_xor = np.where(y_xor, </text:span><text:span text:style-name="T8">1</text:span><text:span text:style-name="T6">, -</text:span><text:span text:style-name="T8">1</text:span><text:span text:style-name="T6">)<text:line-break/>plt.scatter(X_xor[y_xor == </text:span><text:span text:style-name="T8">1</text:span><text:span text:style-name="T6">, </text:span><text:span text:style-name="T8">0</text:span><text:span text:style-name="T6">], X_xor[y_xor == </text:span><text:span text:style-name="T8">1</text:span><text:span text:style-name="T6">, </text:span><text:span text:style-name="T8">1</text:span><text:span text:style-name="T6">],<text:line-break/> </text:span><text:span text:style-name="T10">c</text:span><text:span text:style-name="T6">=</text:span><text:span text:style-name="T7">'b'</text:span><text:span text:style-name="T6">, </text:span><text:span text:style-name="T10">marker</text:span><text:span text:style-name="T6">=</text:span><text:span text:style-name="T7">'x'</text:span><text:span text:style-name="T6">, </text:span><text:span text:style-name="T10">label</text:span><text:span text:style-name="T6">=</text:span><text:span text:style-name="T7">'1'</text:span><text:span text:style-name="T6">)<text:line-break/>plt.scatter(X_xor[y_xor == -</text:span><text:span text:style-name="T8">1</text:span><text:span text:style-name="T6">, </text:span><text:span text:style-name="T8">0</text:span><text:span text:style-name="T6">], X_xor[y_xor == -</text:span><text:span text:style-name="T8">1</text:span><text:span text:style-name="T6">, </text:span><text:span text:style-name="T8">1</text:span><text:span text:style-name="T6">],<text:line-break/> </text:span><text:span text:style-name="T10">c</text:span><text:span text:style-name="T6">=</text:span><text:span text:style-name="T7">'r'</text:span><text:span text:style-name="T6">, </text:span><text:span text:style-name="T10">marker</text:span><text:span text:style-name="T6">=</text:span><text:span text:style-name="T7">'s'</text:span><text:span text:style-name="T6">, </text:span><text:span text:style-name="T10">label</text:span><text:span text:style-name="T6">=</text:span><text:span text:style-name="T7">'-1'</text:span><text:span text:style-name="T6">)<text:line-break/><text:line-break/>plt.xlim([-</text:span><text:span text:style-name="T8">3</text:span><text:span text:style-name="T6">,</text:span><text:span text:style-name="T8">4</text:span><text:span text:style-name="T6">])<text:line-break/>plt.ylim([-</text:span><text:span text:style-name="T8">3</text:span><text:span text:style-name="T6">,</text:span><text:span text:style-name="T8">3</text:span><text:span text:style-name="T6">])<text:line-break/>plt.legend(</text:span><text:span text:style-name="T10">loc</text:span><text:span text:style-name="T6">=</text:span><text:span text:style-name="T7">'best'</text:span><text:span text:style-name="T6">)<text:line-break/>plt.savefig(</text:span><text:span text:style-name="T7">'./data/plots/xor_data.png'</text:span><text:span text:style-name="T6">)<text:line-break/>plt.close()<text:line-break/><text:line-break/></text:span><text:span text:style-name="T4">#--- SVC<text:line-break/><text:line-break/></text:span><text:span text:style-name="T6">svm = SVC(</text:span><text:span text:style-name="T10">kernel</text:span><text:span text:style-name="T6">=</text:span><text:span text:style-name="T7">'rbf'</text:span><text:span text:style-name="T6">, </text:span><text:span text:style-name="T10">random_state</text:span><text:span text:style-name="T6">=</text:span><text:span text:style-name="T8">1</text:span><text:span text:style-name="T6">, </text:span><text:span text:style-name="T10">gamma</text:span><text:span text:style-name="T6">=</text:span><text:span text:style-name="T8">0.1</text:span><text:span text:style-name="T6">, </text:span><text:span text:style-name="T10">C</text:span><text:span text:style-name="T6">=</text:span><text:span text:style-name="T8">10</text:span><text:span text:style-name="T6">)<text:line-break/>svm.fit(X_xor, y_xor)<text:line-break/>pdr(X_xor, y_xor, svm)<text:line-break/>plt.legend(</text:span><text:span text:style-name="T10">loc</text:span><text:span text:style-name="T6">=</text:span><text:span text:style-name="T7">'best'</text:span><text:span text:style-name="T6">)<text:line-break/>plt.savefig(</text:span><text:span text:style-name="T7">'./data/plots/svc.png'</text:span><text:span text:style-name="T6">)<text:line-break/>plt.close()</text:span></text:p>
      <text:p text:style-name="P32" loext:marker-style-name="T6"/>
      <text:p text:style-name="P33"/>
      <text:p text:style-name="P34">Спочатку згенеруєо дані за такою логікою:<text:line-break/>Генерується випадкові значення координат точок за нормальним розподілом, якщо точки в 1 і 3 чвертях умовної площині – точки відносяться до одного класу -1, інші точки – до класу 1.</text:p>
      <text:p text:style-name="P34"/>
      <text:p text:style-name="P35">Графік з цими точками зберігається.</text:p>
      <text:p text:style-name="P35"/>
      <text:p text:style-name="P36">Далі <text:span text:style-name="T19">ініціалізовуємо</text:span> модель svm і навчаємо її. <text:s/>Завдяки функції pdr (plot_decision_regions) <text:span text:style-name="T20">візуалізуємо те, як модель “думає”, </text:span><text:span text:style-name="T21">тобто до якого класу модель відносить точку в залежності від її ознак. </text:span><text:span text:style-name="T22">Параметри створення моделі </text:span><text:span text:style-name="T23">(</text:span><text:span text:style-name="T24">kernel</text:span><text:span text:style-name="T25">=</text:span><text:span text:style-name="T26">'rbf'</text:span><text:span text:style-name="T25">, </text:span><text:span text:style-name="T24">random_state</text:span><text:span text:style-name="T25">=</text:span><text:span text:style-name="T27">1</text:span><text:span text:style-name="T25">, </text:span><text:span text:style-name="T24">gamma</text:span><text:span text:style-name="T25">=</text:span><text:span text:style-name="T27">0.1</text:span><text:span text:style-name="T25">, </text:span><text:span text:style-name="T24">C</text:span><text:span text:style-name="T25">=</text:span><text:span text:style-name="T27">10</text:span><text:span text:style-name="T23">) були взяті з методички, про них йтиметься в наступному пункті при аналізі різних моделей.</text:span></text:p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7">Сама функція виглядає так:</text:p>
      <text:p text:style-name="P37"/>
      <text:p text:style-name="P10" loext:marker-style-name="T6"><text:span text:style-name="T5">from </text:span><text:span text:style-name="T6">matplotlib </text:span><text:span text:style-name="T5">import </text:span><text:span text:style-name="T6">pyplot </text:span><text:span text:style-name="T5">as </text:span><text:span text:style-name="T6">plt<text:line-break/></text:span><text:span text:style-name="T5">from </text:span><text:span text:style-name="T6">matplotlib.colors </text:span><text:span text:style-name="T5">import </text:span><text:span text:style-name="T6">ListedColormap<text:line-break/></text:span><text:span text:style-name="T5">import </text:span><text:span text:style-name="T6">numpy </text:span><text:span text:style-name="T5">as </text:span><text:span text:style-name="T6">np<text:line-break/><text:line-break/></text:span><text:span text:style-name="T5">def </text:span><text:span text:style-name="T28">pdr </text:span><text:span text:style-name="T6">(X, y, classifier, test_idx=</text:span><text:span text:style-name="T5">None</text:span><text:span text:style-name="T6">, resolution=</text:span><text:span text:style-name="T8">0.02</text:span><text:span text:style-name="T6">):<text:line-break/> <text:s text:c="3"/>markers = (</text:span><text:span text:style-name="T7">'s'</text:span><text:span text:style-name="T6">, </text:span><text:span text:style-name="T7">'x'</text:span><text:span text:style-name="T6">, </text:span><text:span text:style-name="T7">'o'</text:span><text:span text:style-name="T6">, </text:span><text:span text:style-name="T7">'^'</text:span><text:span text:style-name="T6">, </text:span><text:span text:style-name="T7">'v'</text:span><text:span text:style-name="T6">)<text:line-break/> <text:s text:c="3"/>colors = (</text:span><text:span text:style-name="T7">'red'</text:span><text:span text:style-name="T6">, </text:span><text:span text:style-name="T7">'blue'</text:span><text:span text:style-name="T6">, </text:span><text:span text:style-name="T7">'green'</text:span><text:span text:style-name="T6">, </text:span><text:span text:style-name="T7">'gray'</text:span><text:span text:style-name="T6">, </text:span><text:span text:style-name="T7">'cyan'</text:span><text:span text:style-name="T6">)<text:line-break/> <text:s text:c="3"/>cmap = ListedColormap(colors[:</text:span><text:span text:style-name="T9">len</text:span><text:span text:style-name="T6">(np.unique(y))])<text:line-break/><text:line-break/> <text:s text:c="3"/>x1_min, x1_max = X[:, </text:span><text:span text:style-name="T8">0</text:span><text:span text:style-name="T6">].min() - </text:span><text:span text:style-name="T8">1</text:span><text:span text:style-name="T6">, X[:, </text:span><text:span text:style-name="T8">0</text:span><text:span text:style-name="T6">].max() + </text:span><text:span text:style-name="T8">1<text:line-break/> <text:s text:c="3"/></text:span><text:span text:style-name="T6">x2_min, x2_max = X[:, </text:span><text:span text:style-name="T8">1</text:span><text:span text:style-name="T6">].min() - </text:span><text:span text:style-name="T8">1</text:span><text:span text:style-name="T6">, X[:, </text:span><text:span text:style-name="T8">1</text:span><text:span text:style-name="T6">].max() + </text:span><text:span text:style-name="T8">1<text:line-break/> <text:s text:c="3"/></text:span><text:span text:style-name="T6">xx1,xx2 = np.meshgrid(np.arange(x1_min, x1_max, resolution),<text:line-break/> <text:s text:c="25"/>np.arange(x2_min, x2_max, resolution))<text:line-break/> <text:s text:c="3"/>Z = classifier.predict(np.array([xx1.ravel(), xx2.ravel()]).T)<text:line-break/> <text:s text:c="3"/>Z = Z.reshape(xx1.shape)<text:line-break/> <text:s text:c="3"/>plt.contourf(xx1, xx2, Z, </text:span><text:span text:style-name="T10">alpha</text:span><text:span text:style-name="T6">=</text:span><text:span text:style-name="T8">0.3</text:span><text:span text:style-name="T6">, </text:span><text:span text:style-name="T10">cmap</text:span><text:span text:style-name="T6">=cmap)<text:line-break/> <text:s text:c="3"/>plt.xlim(xx1.min(), xx1.max())<text:line-break/> <text:s text:c="3"/>plt.ylim(xx2.min(), xx2.max())<text:line-break/><text:line-break/> <text:s text:c="3"/></text:span><text:span text:style-name="T5">for </text:span><text:span text:style-name="T6">idx, cl </text:span><text:span text:style-name="T5">in </text:span><text:span text:style-name="T9">enumerate</text:span><text:span text:style-name="T6">(np.unique(y)):<text:line-break/> <text:s text:c="7"/>plt.scatter(</text:span><text:span text:style-name="T10">x</text:span><text:span text:style-name="T6">=X[y == cl, </text:span><text:span text:style-name="T8">0</text:span><text:span text:style-name="T6">], </text:span><text:span text:style-name="T10">y</text:span><text:span text:style-name="T6">=X[y == cl, </text:span><text:span text:style-name="T8">1</text:span><text:span text:style-name="T6">],</text:span><text:span text:style-name="T10">alpha</text:span><text:span text:style-name="T6">=</text:span><text:span text:style-name="T8">0.8</text:span><text:span text:style-name="T6">,</text:span><text:span text:style-name="T10">c</text:span><text:span text:style-name="T6">=colors[idx],<text:line-break/> <text:s text:c="19"/></text:span><text:span text:style-name="T10">marker</text:span><text:span text:style-name="T6">=markers[idx],</text:span><text:span text:style-name="T10">label</text:span><text:span text:style-name="T6">=cl)<text:line-break/><text:line-break/> <text:s text:c="3"/></text:span><text:span text:style-name="T5">if </text:span><text:span text:style-name="T6">test_idx:<text:line-break/> <text:s text:c="7"/>X_test, y_test = X[test_idx, :], y[test_idx]<text:line-break/><text:line-break/> <text:s text:c="7"/>plt.scatter(X_test[:, </text:span><text:span text:style-name="T8">0</text:span><text:span text:style-name="T6">], X_test[:, </text:span><text:span text:style-name="T8">1</text:span><text:span text:style-name="T6">], </text:span><text:span text:style-name="T10">c</text:span><text:span text:style-name="T6">=</text:span><text:span text:style-name="T7">'white'</text:span><text:span text:style-name="T6">,</text:span><text:span text:style-name="T10">edgecolor</text:span><text:span text:style-name="T6">=</text:span><text:span text:style-name="T7">'black'</text:span><text:span text:style-name="T6">,<text:line-break/> <text:s text:c="19"/></text:span><text:span text:style-name="T10">alpha</text:span><text:span text:style-name="T6">=</text:span><text:span text:style-name="T8">1.0</text:span><text:span text:style-name="T6">, </text:span><text:span text:style-name="T10">linewidth</text:span><text:span text:style-name="T6">=</text:span><text:span text:style-name="T8">1</text:span><text:span text:style-name="T6">, </text:span><text:span text:style-name="T10">marker</text:span><text:span text:style-name="T6">=</text:span><text:span text:style-name="T7">'o'</text:span><text:span text:style-name="T6">,</text:span><text:span text:style-name="T10">s</text:span><text:span text:style-name="T6">=</text:span><text:span text:style-name="T8">15 </text:span><text:span text:style-name="T6">,</text:span><text:span text:style-name="T10">label</text:span><text:span text:style-name="T6">=</text:span><text:span text:style-name="T7">'test set'</text:span><text:span text:style-name="T6">)<text:line-break/></text:span></text:p>
      <text:p text:style-name="P37"/>
      <text:p text:style-name="P38">В результаті виконання коду отримано 2 графіки: </text:p>
      <text:p text:style-name="P38">---</text:p>
      <text:p text:style-name="P39"><draw:frame draw:style-name="fr1" draw:name="Image2 Copy 1" text:anchor-type="as-char" svg:width="7.641cm" svg:height="5.731cm" draw:z-index="2"><draw:image xlink:href="Pictures/1000000100000280000001E06EAFA3B5.png" xlink:type="simple" xlink:show="embed" xlink:actuate="onLoad" draw:mime-type="image/png"/></draw:frame><draw:frame draw:style-name="fr1" draw:name="Image3" text:anchor-type="as-char" svg:width="7.648cm" svg:height="5.736cm" draw:z-index="1"><draw:image xlink:href="Pictures/1000000100000280000001E01AC08374.png" xlink:type="simple" xlink:show="embed" xlink:actuate="onLoad" draw:mime-type="image/png"/></draw:frame><text:s/></text:p>
      <text:p text:style-name="P38">---</text:p>
      <text:p text:style-name="P40">Перший показує розподіл даних, другий відображає логіку моделі.</text:p>
      <text:p text:style-name="P38"/>
      <text:p text:style-name="P38"/>
      <text:p text:style-name="P38"/>
      <text:p text:style-name="P38"/>
      <text:p text:style-name="P38"><text:soft-page-break/></text:p>
      <text:p text:style-name="P41">Пункт 3:</text:p>
      <text:p text:style-name="P41"/>
      <text:p text:style-name="P23"><text:span text:style-name="T29">П</text:span>орівня<text:span text:style-name="T29">ймо</text:span> декілька класифікаційних оцінювачів</text:p>
      <text:p text:style-name="P23">наприклад KNeighborsClassifier, SVC та GaussianNB для вбудованого в scikit-learn набору даних <text:span text:style-name="T29">про вино.</text:span></text:p>
      <text:p text:style-name="P23"/>
      <text:p text:style-name="P42">Для цього використа<text:span text:style-name="T30">ю</text:span> функцію, що приймає <text:span text:style-name="T31">ненавчену модель-класифікатор:<text:line-break/></text:span></text:p>
      <text:p text:style-name="P10" loext:marker-style-name="T6"><text:span text:style-name="T5">from </text:span><text:span text:style-name="T6">sklearn.datasets </text:span><text:span text:style-name="T5">import </text:span><text:span text:style-name="T6">load_wine<text:line-break/></text:span><text:span text:style-name="T5">from </text:span><text:span text:style-name="T6">sklearn.model_selection </text:span><text:span text:style-name="T5">import </text:span><text:span text:style-name="T6">train_test_split<text:line-break/></text:span><text:span text:style-name="T5">import </text:span><text:span text:style-name="T6">numpy </text:span><text:span text:style-name="T5">as </text:span><text:span text:style-name="T6">np<text:line-break/></text:span><text:span text:style-name="T5">import </text:span><text:span text:style-name="T6">matplotlib.pyplot </text:span><text:span text:style-name="T5">as </text:span><text:span text:style-name="T6">plt<text:line-break/></text:span><text:span text:style-name="T5">from </text:span><text:span text:style-name="T6">lab3.plot_decision_regions </text:span><text:span text:style-name="T5">import </text:span><text:span text:style-name="T6">pdr<text:line-break/><text:line-break/></text:span><text:span text:style-name="T5">def </text:span><text:span text:style-name="T28">learn_wine</text:span><text:span text:style-name="T6">(classifier, res_file_name):<text:line-break/> wine = load_wine()<text:line-break/><text:line-break/> X = wine.data[:,:</text:span><text:span text:style-name="T8">2</text:span><text:span text:style-name="T6">]<text:line-break/> y = wine.target<text:line-break/><text:line-break/> X_train, X_test, y_train, y_test = train_test_split(X, y, </text:span><text:span text:style-name="T10">random_state</text:span><text:span text:style-name="T6">=</text:span><text:span text:style-name="T8">42</text:span><text:span text:style-name="T6">)<text:line-break/><text:line-break/> classifier.fit(X_train, y_train)<text:line-break/><text:line-break/> X_comb = np.vstack((X_train, X_test))<text:line-break/> y_comb = np.hstack((y_train, y_test))<text:line-break/> t_ind = </text:span><text:span text:style-name="T9">range</text:span><text:span text:style-name="T6">(</text:span><text:span text:style-name="T9">len</text:span><text:span text:style-name="T6">(y_train),</text:span><text:span text:style-name="T9">len</text:span><text:span text:style-name="T6">(y_comb))<text:line-break/><text:line-break/> pdr(X_comb, y_comb, classifier, </text:span><text:span text:style-name="T10">test_idx</text:span><text:span text:style-name="T6">=t_ind)<text:line-break/> plt.legend(</text:span><text:span text:style-name="T10">loc</text:span><text:span text:style-name="T6">=</text:span><text:span text:style-name="T7">'best'</text:span><text:span text:style-name="T6">)<text:line-break/> plt.savefig(</text:span><text:span text:style-name="T7">f'./data/plots/</text:span><text:span text:style-name="T5">{</text:span><text:span text:style-name="T6">res_file_name</text:span><text:span text:style-name="T5">}</text:span><text:span text:style-name="T7">.png'</text:span><text:span text:style-name="T6">)<text:line-break/> plt.close()<text:line-break/><text:line-break/></text:span><text:span text:style-name="T4">#accuracy = classifier.score(X_test, y_test)<text:line-break/>#print(f"\nOverall accuracy: {accuracy:.2%}")<text:line-break/><text:line-break/></text:span><text:span text:style-name="T6">y_pred = classifier.predict(X_test)<text:line-break/></text:span><text:span text:style-name="T9">print</text:span><text:span text:style-name="T6">(classification_report(y_test, y_pred, </text:span><text:span text:style-name="T10">target_names</text:span><text:span text:style-name="T6">=wine.target_names, </text:span><text:span text:style-name="T10">digits</text:span><text:span text:style-name="T6">=</text:span><text:span text:style-name="T8">4</text:span><text:span text:style-name="T6">))</text:span></text:p>
      <text:p text:style-name="P32" loext:marker-style-name="T6"/>
      <text:p text:style-name="P43"/>
      <text:p text:style-name="P44">Ця функція навчає переданий класифікатор на даних про вино. Завантажуємо дані про вино, розділяємо їх вже відомим нам методом. Для зручної 2-Д візуалізації було завантажено перші 2 ознаки вина (з документації про вбудовані дані це <text:span text:style-name="T32">міцність і кількість яблучної кислоти</text:span>), <text:span text:style-name="T32">класами є 3 різні регіони італії, де виготовляють вина.</text:span></text:p>
      <text:p text:style-name="P44"/>
      <text:p text:style-name="P45">Навчаємо модель, передавши ознаки та target. Тепер поєднаємо набір ознак і набір цілей, не перемішуючи. Запишемо в масив індекси тестових даних.</text:p>
      <text:p text:style-name="P45"/>
      <text:p text:style-name="P45">Використаємо вже відому функцію pdr, тепер передавши індекси тестових даних, тепер ми можемо побачити їх на графіку. Зберігаємо графік в файл з відповідною назвою, що ми також передали як параметр функції. <text:span text:style-name="T33">Виводимо рапорт про точність моделі</text:span>.</text:p>
      <text:p text:style-name="P45"><text:soft-page-break/></text:p>
      <text:p text:style-name="P45"/>
      <text:p text:style-name="P45">Для порівняння використаємо цю функцію, передавши туди різні класифікатори:</text:p>
      <text:p text:style-name="P45"/>
      <text:p text:style-name="P10" loext:marker-style-name="T6"><text:span text:style-name="T5">from </text:span><text:span text:style-name="T6">sklearn.svm </text:span><text:span text:style-name="T5">import </text:span><text:span text:style-name="T6">SVC<text:line-break/></text:span><text:span text:style-name="T5">from </text:span><text:span text:style-name="T6">learn_procs </text:span><text:span text:style-name="T5">import </text:span><text:span text:style-name="T6">learn_wine<text:line-break/><text:line-break/>svm = SVC(</text:span><text:span text:style-name="T10">kernel</text:span><text:span text:style-name="T6">=</text:span><text:span text:style-name="T7">'rbf'</text:span><text:span text:style-name="T6">, </text:span><text:span text:style-name="T10">random_state</text:span><text:span text:style-name="T6">=</text:span><text:span text:style-name="T8">1</text:span><text:span text:style-name="T6">, </text:span><text:span text:style-name="T10">gamma</text:span><text:span text:style-name="T6">=</text:span><text:span text:style-name="T8">0.1</text:span><text:span text:style-name="T6">)<text:line-break/><text:line-break/>learn_wine(svm,</text:span><text:span text:style-name="T7">'wine_svc'</text:span><text:span text:style-name="T6">)</text:span></text:p>
      <text:p text:style-name="P45"/>
      <text:p text:style-name="P46">kernel=”rbf” – використовуємо алгоритм, що “малюватиме” не просто прямі лінії, а складніші округлі зони.</text:p>
      <text:p text:style-name="P46">random_state=1 – передаємо seed для повторюваності досліджень.</text:p>
      <text:p text:style-name="P46">Gamma=0.1 – визначаємо зону впливу кожної точки, досить широко для уникнення overfitting.</text:p>
      <text:p text:style-name="P47">С=1.0 – коофіцієнт регуляції, дефолтне значення – 1.</text:p>
      <text:p text:style-name="P45"/>
      <text:p text:style-name="P10" loext:marker-style-name="T6"><text:span text:style-name="T5">from </text:span><text:span text:style-name="T6">sklearn.neighbors </text:span><text:span text:style-name="T5">import </text:span><text:span text:style-name="T6">KNeighborsClassifier<text:line-break/></text:span><text:span text:style-name="T5">from </text:span><text:span text:style-name="T6">learn_procs </text:span><text:span text:style-name="T5">import </text:span><text:span text:style-name="T6">learn_wine<text:line-break/><text:line-break/>knm = KNeighborsClassifier(</text:span><text:span text:style-name="T10">n_neighbors</text:span><text:span text:style-name="T6">=</text:span><text:span text:style-name="T8">5</text:span><text:span text:style-name="T6">, </text:span><text:span text:style-name="T10">weights</text:span><text:span text:style-name="T6">=</text:span><text:span text:style-name="T7">'uniform'</text:span><text:span text:style-name="T6">)<text:line-break/><text:line-break/>learn_wine(knm,</text:span><text:span text:style-name="T7">'wine_KNeighbors'</text:span><text:span text:style-name="T6">)</text:span></text:p>
      <text:p text:style-name="P45"/>
      <text:p text:style-name="P46">n_neihgbors=5 – <text:span text:style-name="T34">параметр зміщення дисперсії.</text:span></text:p>
      <text:p text:style-name="P48">weight=’uniform’ – вага точок-сусідів не залежить від відстані до н<text:span text:style-name="T35">их.</text:span></text:p>
      <text:p text:style-name="P45"/>
      <text:p text:style-name="P10" loext:marker-style-name="T6"><text:span text:style-name="T5">from </text:span><text:span text:style-name="T6">sklearn.naive_bayes </text:span><text:span text:style-name="T5">import </text:span><text:span text:style-name="T6">GaussianNB<text:line-break/></text:span><text:span text:style-name="T5">from </text:span><text:span text:style-name="T6">learn_procs </text:span><text:span text:style-name="T5">import </text:span><text:span text:style-name="T6">learn_wine<text:line-break/><text:line-break/>gnb = GaussianNB()<text:line-break/><text:line-break/>learn_wine(gnb,</text:span><text:span text:style-name="T7">'wine_GaussianNB'</text:span><text:span text:style-name="T6">)</text:span></text:p>
      <text:p text:style-name="P45"/>
      <text:p text:style-name="P46">(Дефолтні параметри)</text:p>
      <text:p text:style-name="P46">priors=None – вручну задати ймовірності появи певного класу.</text:p>
      <text:p text:style-name="P46">var_smoothing=1e-9 – доданок до дисперсії всіх ознак (щоб не ламалось при певних сценаріях)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Отримані графіки у відповідному порядку:</text:p>
      <text:p text:style-name="P45">---</text:p>
      <text:p text:style-name="P45"/>
      <text:p text:style-name="P23"><draw:frame draw:style-name="fr1" draw:name="Image4" text:anchor-type="as-char" svg:width="14.275cm" svg:height="10.707cm" draw:z-index="3"><draw:image xlink:href="Pictures/1000000100000280000001E0F891715F.png" xlink:type="simple" xlink:show="embed" xlink:actuate="onLoad" draw:mime-type="image/png"/></draw:frame></text:p>
      <text:p text:style-name="P23"/>
      <text:p text:style-name="P23"/>
      <text:p text:style-name="P23"><draw:frame draw:style-name="fr1" draw:name="Image5" text:anchor-type="as-char" svg:width="14.332cm" svg:height="10.749cm" draw:z-index="4"><draw:image xlink:href="Pictures/1000000100000280000001E048F907C3.png" xlink:type="simple" xlink:show="embed" xlink:actuate="onLoad" draw:mime-type="image/png"/></draw:frame></text:p>
      <text:p text:style-name="P23"/>
      <text:p text:style-name="P23"/>
      <text:p text:style-name="P23"><text:soft-page-break/><draw:frame draw:style-name="fr1" draw:name="Image6" text:anchor-type="as-char" svg:width="14.489cm" svg:height="10.867cm" draw:z-index="5"><draw:image xlink:href="Pictures/1000000100000280000001E061BB7E36.png" xlink:type="simple" xlink:show="embed" xlink:actuate="onLoad" draw:mime-type="image/png"/></draw:frame></text:p>
      <text:p text:style-name="P23">---</text:p>
      <text:p text:style-name="P49">Білими точками позначено тестові входження.</text:p>
      <text:p text:style-name="P50">Також відомі <text:span text:style-name="T36">статистичні дані тестування </text:span>моделей<text:span text:style-name="T37">(вивід в консоль)</text:span>:</text:p>
      <text:p text:style-name="P50"/>
      <text:p text:style-name="P51">/home/misha/Documents/2sem26/ml/.venv/bin/python /home/misha/Documents/2sem26/ml/lab3/3-1-svc.py </text:p>
      <text:p text:style-name="P51"><text:s text:c="14"/>precision <text:s text:c="3"/>recall <text:s/>f1-score <text:s text:c="2"/>support</text:p>
      <text:p text:style-name="P51"/>
      <text:p text:style-name="P51"><text:s text:c="5"/>class_0 <text:s text:c="4"/>0.7059 <text:s text:c="3"/>0.8000 <text:s text:c="3"/>0.7500 <text:s text:c="7"/>15</text:p>
      <text:p text:style-name="P51"><text:s text:c="5"/>class_1 <text:s text:c="4"/>0.9412 <text:s text:c="3"/>0.8889 <text:s text:c="3"/>0.9143 <text:s text:c="7"/>18</text:p>
      <text:p text:style-name="P51"><text:s text:c="5"/>class_2 <text:s text:c="4"/>0.6364 <text:s text:c="3"/>0.5833 <text:s text:c="3"/>0.6087 <text:s text:c="7"/>12</text:p>
      <text:p text:style-name="P51"/>
      <text:p text:style-name="P51"><text:s text:c="4"/>accuracy <text:s text:c="24"/>0.7778 <text:s text:c="7"/>45</text:p>
      <text:p text:style-name="P51"><text:s text:c="3"/>macro avg <text:s text:c="4"/>0.7611 <text:s text:c="3"/>0.7574 <text:s text:c="3"/>0.7577 <text:s text:c="7"/>45</text:p>
      <text:p text:style-name="P51">weighted avg <text:s text:c="4"/>0.7815 <text:s text:c="3"/>0.7778 <text:s text:c="3"/>0.7780 <text:s text:c="7"/>45</text:p>
      <text:p text:style-name="P51"/>
      <text:p text:style-name="P51"/>
      <text:p text:style-name="P51">Process finished with exit code 0</text:p>
      <text:p text:style-name="P51"/>
      <text:p text:style-name="P51">/home/misha/Documents/2sem26/ml/.venv/bin/python /home/misha/Documents/2sem26/ml/lab3/3-2-KNeighbors.py </text:p>
      <text:p text:style-name="P51"><text:s text:c="14"/>precision <text:s text:c="3"/>recall <text:s/>f1-score <text:s text:c="2"/>support</text:p>
      <text:p text:style-name="P51"/>
      <text:p text:style-name="P51"><text:s text:c="5"/>class_0 <text:s text:c="4"/>0.8000 <text:s text:c="3"/>0.8000 <text:s text:c="3"/>0.8000 <text:s text:c="7"/>15</text:p>
      <text:p text:style-name="P51"><text:s text:c="5"/>class_1 <text:s text:c="4"/>1.0000 <text:s text:c="3"/>0.7778 <text:s text:c="3"/>0.8750 <text:s text:c="7"/>18</text:p>
      <text:p text:style-name="P51"><text:s text:c="5"/>class_2 <text:s text:c="4"/>0.6250 <text:s text:c="3"/>0.8333 <text:s text:c="3"/>0.7143 <text:s text:c="7"/>12</text:p>
      <text:p text:style-name="P51"/>
      <text:p text:style-name="P51"><text:s text:c="4"/>accuracy <text:s text:c="24"/>0.8000 <text:s text:c="7"/>45</text:p>
      <text:p text:style-name="P51"><text:s text:c="3"/>macro avg <text:s text:c="4"/>0.8083 <text:s text:c="3"/>0.8037 <text:s text:c="3"/>0.7964 <text:s text:c="7"/>45</text:p>
      <text:p text:style-name="P51">weighted avg <text:s text:c="4"/>0.8333 <text:s text:c="3"/>0.8000 <text:s text:c="3"/>0.8071 <text:s text:c="7"/>45</text:p>
      <text:p text:style-name="P51"><text:soft-page-break/></text:p>
      <text:p text:style-name="P51">Process finished with exit code 0</text:p>
      <text:p text:style-name="P51"/>
      <text:p text:style-name="P51">/home/misha/Documents/2sem26/ml/.venv/bin/python /home/misha/Documents/2sem26/ml/lab3/3-3-GaussianNB.py </text:p>
      <text:p text:style-name="P51"><text:s text:c="14"/>precision <text:s text:c="3"/>recall <text:s/>f1-score <text:s text:c="2"/>support</text:p>
      <text:p text:style-name="P51"/>
      <text:p text:style-name="P51"><text:s text:c="5"/>class_0 <text:s text:c="4"/>0.6667 <text:s text:c="3"/>0.8000 <text:s text:c="3"/>0.7273 <text:s text:c="7"/>15</text:p>
      <text:p text:style-name="P51"><text:s text:c="5"/>class_1 <text:s text:c="4"/>0.9375 <text:s text:c="3"/>0.8333 <text:s text:c="3"/>0.8824 <text:s text:c="7"/>18</text:p>
      <text:p text:style-name="P51"><text:s text:c="5"/>class_2 <text:s text:c="4"/>0.6364 <text:s text:c="3"/>0.5833 <text:s text:c="3"/>0.6087 <text:s text:c="7"/>12</text:p>
      <text:p text:style-name="P51"/>
      <text:p text:style-name="P51"><text:s text:c="4"/>accuracy <text:s text:c="24"/>0.7556 <text:s text:c="7"/>45</text:p>
      <text:p text:style-name="P51"><text:s text:c="3"/>macro avg <text:s text:c="4"/>0.7468 <text:s text:c="3"/>0.7389 <text:s text:c="3"/>0.7394 <text:s text:c="7"/>45</text:p>
      <text:p text:style-name="P51">weighted avg <text:s text:c="4"/>0.7669 <text:s text:c="3"/>0.7556 <text:s text:c="3"/>0.7577 <text:s text:c="7"/>45</text:p>
      <text:p text:style-name="P51"/>
      <text:p text:style-name="P51"/>
      <text:p text:style-name="P51">Process finished with exit code 0</text:p>
      <text:p text:style-name="P52"/>
      <text:p text:style-name="P52">Висновок:</text:p>
      <text:p text:style-name="P23"/>
      <text:p text:style-name="P53">В ході виконання лабораторної роботи було навчено модель просто лінійної регресії, її передбачення порівнянні з немодельними передбаченнями з другої лабортарної роботи. Передбачені значення були на 0.9 – 0.11 більші за немодельні, <text:span text:style-name="T38">модель вважає тренд зростання температури більш стрімким</text:span>. Такий зсув пояснюється в першу чергу тим, що модель не бачила на навчанні всіх даних, а тільки випадково виділені 75%.</text:p>
      <text:p text:style-name="P53"/>
      <text:p text:style-name="P54">Було створено модель SVC класифікатора, що був натренований на синтетичних даних. Його логіку розділення площини ознак на класи можна було візуально спостерігати на графіку. Це знання допомогло в настпуному пункті.</text:p>
      <text:p text:style-name="P54"/>
      <text:p text:style-name="P54">Було порівняно різні моделі класифікаторів, а саме: SVC, KneighborsClassifier і GaussianNB. Роботу моделей було проаналізовано статистично і візуально, графіки розділення площини були створені за допомогою тієї ж функції, що й в минулому пункті.</text:p>
      <text:p text:style-name="P54"/>
      <text:p text:style-name="P55">Висновки на основі зазначеного аналізу:</text:p>
      <text:p text:style-name="P54"/>
      <text:p text:style-name="P54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family-generic="roman" style:font-pitch="variable"/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2T20:04:18.802918799</dc:date>
    <meta:editing-duration>PT6H38M47S</meta:editing-duration>
    <meta:editing-cycles>206</meta:editing-cycles>
    <meta:generator>LibreOffice/25.8.5.2$Linux_X86_64 LibreOffice_project/580$Build-2</meta:generator>
    <meta:document-statistic meta:table-count="1" meta:image-count="6" meta:object-count="0" meta:page-count="14" meta:paragraph-count="207" meta:word-count="1731" meta:character-count="15291" meta:non-whitespace-character-count="12711"/>
  </office:meta>
</office:document-meta>
</file>