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0000001E06179C688.png" manifest:media-type="image/png"/>
  <manifest:file-entry manifest:full-path="Pictures/1000000000000280000001E067101AA1.png" manifest:media-type="image/png"/>
  <manifest:file-entry manifest:full-path="Pictures/1000000000000280000001E098DC0E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4.993cm" table:align="left"/>
    </style:style>
    <style:style style:name="Table1.A" style:family="table-column">
      <style:table-column-properties style:column-width="1.478cm"/>
    </style:style>
    <style:style style:name="Table1.B" style:family="table-column">
      <style:table-column-properties style:column-width="7.121cm"/>
    </style:style>
    <style:style style:name="Table1.C" style:family="table-column">
      <style:table-column-properties style:column-width="6.39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</style:style>
    <style:style style:name="P3" style:family="paragraph" style:parent-style-name="Preformatted_20_Text">
      <style:text-properties officeooo:paragraph-rsid="0024b6db"/>
    </style:style>
    <style:style style:name="P4" style:family="paragraph" style:parent-style-name="Preformatted_20_Text">
      <style:text-properties fo:font-size="12pt" style:text-underline-style="solid" style:text-underline-width="auto" style:text-underline-color="font-color" fo:font-weight="bold" officeooo:paragraph-rsid="0024b6db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style:font-size-asian="12pt" style:font-size-complex="12pt"/>
    </style:style>
    <style:style style:name="P6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fo:font-size="12pt" style:text-underline-style="none" fo:font-weight="normal" officeooo:rsid="0031bc07" officeooo:paragraph-rsid="0031bc07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font-size="12pt" style:text-underline-style="none" fo:font-weight="normal" officeooo:rsid="00529554" officeooo:paragraph-rsid="00529554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font-size="12pt" fo:font-style="normal" style:text-underline-style="solid" style:text-underline-width="auto" style:text-underline-color="font-color" fo:font-weight="normal" officeooo:rsid="003353c4" officeooo:paragraph-rsid="003353c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text-properties fo:font-size="12pt" officeooo:rsid="00336e40" officeooo:paragraph-rsid="00336e40" style:font-size-asian="10.5pt" style:font-size-complex="12pt"/>
    </style:style>
    <style:style style:name="P12" style:family="paragraph" style:parent-style-name="Preformatted_20_Text">
      <style:text-properties fo:font-size="12pt" style:text-underline-style="solid" style:text-underline-width="auto" style:text-underline-color="font-color" officeooo:rsid="003733d8" officeooo:paragraph-rsid="00336e40" style:font-size-asian="10.5pt" style:font-size-complex="12pt"/>
    </style:style>
    <style:style style:name="P13" style:family="paragraph" style:parent-style-name="Preformatted_20_Text">
      <style:text-properties fo:font-size="12pt" style:text-underline-style="solid" style:text-underline-width="auto" style:text-underline-color="font-color" officeooo:rsid="003733d8" officeooo:paragraph-rsid="003733d8" style:font-size-asian="10.5pt" style:font-size-complex="12pt"/>
    </style:style>
    <style:style style:name="P14" style:family="paragraph" style:parent-style-name="Preformatted_20_Text">
      <style:text-properties fo:font-size="12pt" style:text-underline-style="none" officeooo:rsid="0037f327" officeooo:paragraph-rsid="0037f327" style:font-size-asian="10.5pt" style:font-size-complex="12pt"/>
    </style:style>
    <style:style style:name="P15" style:family="paragraph" style:parent-style-name="Preformatted_20_Text">
      <style:text-properties fo:font-size="12pt" style:text-underline-style="solid" style:text-underline-width="auto" style:text-underline-color="font-color" officeooo:rsid="003f9bcd" officeooo:paragraph-rsid="0037f327" style:font-size-asian="10.5pt" style:font-size-complex="12pt"/>
    </style:style>
    <style:style style:name="P16" style:family="paragraph" style:parent-style-name="Preformatted_20_Text">
      <style:text-properties fo:font-size="12pt" style:text-underline-style="solid" style:text-underline-width="auto" style:text-underline-color="font-color" officeooo:rsid="003f9bcd" officeooo:paragraph-rsid="003f9bcd" style:font-size-asian="10.5pt" style:font-size-complex="12pt"/>
    </style:style>
    <style:style style:name="P17" style:family="paragraph" style:parent-style-name="Preformatted_20_Text">
      <style:text-properties fo:font-size="12pt" style:text-underline-style="none" officeooo:rsid="003f9bcd" officeooo:paragraph-rsid="003f9bcd" style:font-size-asian="10.5pt" style:font-size-complex="12pt"/>
    </style:style>
    <style:style style:name="P18" style:family="paragraph" style:parent-style-name="Preformatted_20_Text">
      <style:text-properties fo:font-size="12pt" style:text-underline-style="solid" style:text-underline-width="auto" style:text-underline-color="font-color" officeooo:rsid="0042519c" officeooo:paragraph-rsid="0042519c" style:font-size-asian="10.5pt" style:font-size-complex="12pt"/>
    </style:style>
    <style:style style:name="P19" style:family="paragraph" style:parent-style-name="Preformatted_20_Text">
      <style:text-properties fo:font-size="12pt" style:text-underline-style="none" officeooo:rsid="003f9bcd" officeooo:paragraph-rsid="0042519c" style:font-size-asian="10.5pt" style:font-size-complex="12pt"/>
    </style:style>
    <style:style style:name="P20" style:family="paragraph" style:parent-style-name="Preformatted_20_Text">
      <style:text-properties fo:font-size="12pt" style:text-underline-style="solid" style:text-underline-width="auto" style:text-underline-color="font-color" officeooo:rsid="003f9bcd" officeooo:paragraph-rsid="0042519c" style:font-size-asian="10.5pt" style:font-size-complex="12pt"/>
    </style:style>
    <style:style style:name="P21" style:family="paragraph" style:parent-style-name="Preformatted_20_Text">
      <style:text-properties fo:font-size="12pt" style:text-underline-style="none" officeooo:rsid="006692dc" officeooo:paragraph-rsid="006692dc" style:font-size-asian="10.5pt" style:font-size-complex="12pt"/>
    </style:style>
    <style:style style:name="P22" style:family="paragraph" style:parent-style-name="Table_20_Contents">
      <style:text-properties style:font-name="Times New Roman" fo:font-size="12pt" officeooo:rsid="006ce66d" officeooo:paragraph-rsid="006ce66d" style:font-name-asian="Noto Sans Mono CJK SC" style:font-size-asian="10.5pt" style:font-name-complex="Liberation Mono" style:font-size-complex="12pt"/>
    </style:style>
    <style:style style:name="P23" style:family="paragraph" style:parent-style-name="Table_20_Contents">
      <style:text-properties style:font-name="Times New Roman" officeooo:paragraph-rsid="006ce66d"/>
    </style:style>
    <style:style style:name="P24" style:family="paragraph" style:parent-style-name="Table_20_Contents">
      <style:text-properties style:font-name="Times New Roman" fo:font-size="12pt" officeooo:rsid="00738a7a" officeooo:paragraph-rsid="00738a7a" style:font-name-asian="Noto Sans Mono CJK SC" style:font-size-asian="10.5pt" style:font-name-complex="Liberation Mono" style:font-size-complex="12pt"/>
    </style:style>
    <style:style style:name="P25" style:family="paragraph" style:parent-style-name="Table_20_Contents">
      <style:text-properties style:font-name="Times New Roman" fo:font-size="12pt" style:font-name-asian="Noto Sans Mono CJK SC" style:font-size-asian="10.5pt" style:font-name-complex="Liberation Mono" style:font-size-complex="12pt"/>
    </style:style>
    <style:style style:name="P26" style:family="paragraph" style:parent-style-name="Table_20_Contents">
      <style:text-properties style:font-name="Times New Roman" fo:font-size="12pt" officeooo:rsid="007185d2" officeooo:paragraph-rsid="007185d2" style:font-name-asian="Noto Sans Mono CJK SC" style:font-size-asian="10.5pt" style:font-name-complex="Liberation Mono" style:font-size-complex="12pt"/>
    </style:style>
    <style:style style:name="P27" style:family="paragraph" style:parent-style-name="Table_20_Contents">
      <style:text-properties style:font-name="Times New Roman" officeooo:paragraph-rsid="007185d2"/>
    </style:style>
    <style:style style:name="P28" style:family="paragraph" style:parent-style-name="Preformatted_20_Text">
      <style:text-properties fo:font-size="12pt" style:text-underline-style="none" officeooo:rsid="003f9bcd" officeooo:paragraph-rsid="006692dc" style:font-size-asian="10.5pt" style:font-size-complex="12pt"/>
    </style:style>
    <style:style style:name="P29" style:family="paragraph" style:parent-style-name="Preformatted_20_Text">
      <style:text-properties fo:font-size="12pt" style:text-underline-style="none" officeooo:rsid="007442be" officeooo:paragraph-rsid="007442be" style:font-size-asian="10.5pt" style:font-size-complex="12pt"/>
    </style:style>
    <style:style style:name="P30" style:family="paragraph" style:parent-style-name="Preformatted_20_Text">
      <style:text-properties fo:font-size="12pt" style:text-underline-style="solid" style:text-underline-width="auto" style:text-underline-color="font-color" fo:font-weight="bold" officeooo:rsid="003f9bcd" officeooo:paragraph-rsid="0042519c" style:font-size-asian="10.5pt" style:font-weight-asian="bold" style:font-size-complex="12pt" style:font-weight-complex="bold"/>
    </style:style>
    <style:style style:name="T1" style:family="text">
      <style:text-properties officeooo:rsid="001f2ab0"/>
    </style:style>
    <style:style style:name="T2" style:family="text">
      <style:text-properties officeooo:rsid="0031bc07"/>
    </style:style>
    <style:style style:name="T3" style:family="text">
      <style:text-properties officeooo:rsid="00327d05"/>
    </style:style>
    <style:style style:name="T4" style:family="text">
      <style:text-properties officeooo:rsid="0045360d"/>
    </style:style>
    <style:style style:name="T5" style:family="text">
      <style:text-properties officeooo:rsid="0045f605"/>
    </style:style>
    <style:style style:name="T6" style:family="text">
      <style:text-properties officeooo:rsid="004db211"/>
    </style:style>
    <style:style style:name="T7" style:family="text">
      <style:text-properties fo:font-size="12pt" officeooo:rsid="006ce66d" style:font-name-asian="Noto Sans Mono CJK SC" style:font-size-asian="10.5pt" style:font-name-complex="Liberation Mono" style:font-size-complex="12pt"/>
    </style:style>
    <style:style style:name="T8" style:family="text">
      <style:text-properties officeooo:rsid="00705d16"/>
    </style:style>
    <style:style style:name="T9" style:family="text">
      <style:text-properties fo:font-size="12pt" officeooo:rsid="007185d2" style:font-name-asian="Noto Sans Mono CJK SC" style:font-size-asian="10.5pt" style:font-name-complex="Liberation Mono" style:font-size-complex="12pt"/>
    </style:style>
    <style:style style:name="T10" style:family="text">
      <style:text-properties officeooo:rsid="004ab688"/>
    </style:style>
    <style:style style:name="T11" style:family="text">
      <style:text-properties officeooo:rsid="005f08a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 </text:p>
      <text:p text:style-name="P1">Національний технічний університет України  </text:p>
      <text:p text:style-name="P1">«Київський політехнічний інститут ім. Ігоря Сікорського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><text:s/></text:p>
      <text:p text:style-name="P1"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>ЛАБОРАТОРНА РОБОТА № <text:span text:style-name="T1">2</text:span> </text:p>
      <text:p text:style-name="P1">з дисципліни «Прикладні задачі машинного навчання» </text:p>
      <text:p text:style-name="P1">на тему «Часові ряди і проста лінійна регресія»</text:p>
      <text:p text:style-name="P1"/>
      <text:p text:style-name="P1"><text:s/></text:p>
      <text:p text:style-name="P1"><text:s/></text:p>
      <text:p text:style-name="P1"><text:s/></text:p>
      <text:p text:style-name="P1"/>
      <text:p text:style-name="P1"/>
      <text:p text:style-name="P1"/>
      <text:p text:style-name="P1"><text:s/></text:p>
      <text:p text:style-name="P1"><text:s/></text:p>
      <text:p text:style-name="P2"><text:s/></text:p>
      <text:p text:style-name="P2">Виконав: <text:s text:c="75"/></text:p>
      <text:p text:style-name="P2">Студент 2 курсу ФІОТ-у <text:s text:c="49"/></text:p>
      <text:p text:style-name="P2">групи ІМ-42 </text:p>
      <text:p text:style-name="P2">Ватолкін Михайло Андрійович</text:p>
      <text:p text:style-name="P2">Номер у списку групи - 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<text:s text:c="2"/>2026</text:p>
      <text:p text:style-name="P1"/>
      <text:p text:style-name="Preformatted_20_Text"/>
      <text:p text:style-name="Preformatted_20_Text"/>
      <text:p text:style-name="P3"><text:soft-page-break/><text:s text:c="30"/></text:p>
      <text:p text:style-name="P3"><text:s text:c="5"/></text:p>
      <text:p text:style-name="P3"/>
      <text:p text:style-name="P3"/>
      <text:p text:style-name="P4">Постановка завдання</text:p>
      <text:p text:style-name="P5"/>
      <text:p text:style-name="P5">1. В даній лабораторній роботі Вам потрібно завантажити</text:p>
      <text:p text:style-name="P5">метеорологічні дані в 1895-2024 роках з CSV-файлу в DataFrame. Після цього дані треба буде відформатувати для використання. Збережіть ці дані для використання їх у лабораторній роботі No3.</text:p>
      <text:p text:style-name="P5"/>
      <text:p text:style-name="P5">2. Використати бібліотеку Seaborn для графічного</text:p>
      <text:p text:style-name="P5">представлення даних DataFrame у вигляді регресійної прямої (лише</text:p>
      <text:p text:style-name="P5">регресійної прямої), що представляє графік зміни обраних показників за період 1895-2020 років.</text:p>
      <text:p text:style-name="P5"/>
      <text:p text:style-name="P5">3. Спрогнозуйте дані на 2021, 2022, 2023 та 2024 рік.</text:p>
      <text:p text:style-name="P5"/>
      <text:p text:style-name="P5">4. Оцініть за формулою, якою могли б бути показники до 1895</text:p>
      <text:p text:style-name="P5">року (опрацювати не менше 5 років). Наприклад, оцінка середньої</text:p>
      <text:p text:style-name="P5">температури за січень 1890 року може бути отримана наступним</text:p>
      <text:p text:style-name="P5">чином:</text:p>
      <text:p text:style-name="P5"/>
      <text:p text:style-name="P5">5. Скористайтесь функцією regplot бібліотеки Seaborn для</text:p>
      <text:p text:style-name="P5">виведення всіх точок даних; дати представляються на осі x, а</text:p>
      <text:p text:style-name="P5">показники на осі y. Функція regplot будує діаграму розкиду даних, на якій точки представляють показники за заданий рік, а пряма лінія - регресійну пряму.</text:p>
      <text:p text:style-name="P5"/>
      <text:p text:style-name="P5">6. Виконайте масштабування осі у від (приклад від 10 до 70</text:p>
      <text:p text:style-name="P5">градусів)</text:p>
      <text:p text:style-name="P5"/>
      <text:p text:style-name="P5">7. Порівняйте отриманий прогноз для 2021, 2022, 2023 та за</text:p>
      <text:p text:style-name="P5">2024 роки з даними на NOAA «Climate at a Glance»:</text:p>
      <text:p text:style-name="P5">https://www.ncdc.noaa.gov/cag/ і зробіть висновок про те, чому</text:p>
      <text:p text:style-name="P5">результати співпадають чи не співпадають.</text:p>
      <text:p text:style-name="P5"/>
      <text:p text:style-name="P5">8. Зробити звіт про роботу, який включає:</text:p>
      <text:p text:style-name="P5">а. Титульна сторінка з інформацією про виконавця, темою та</text:p>
      <text:p text:style-name="P5">номером лабораторної роботи,</text:p>
      <text:p text:style-name="P5">б. Постановку завдання</text:p>
      <text:p text:style-name="P5">в. Скріни коду та скріни результату виконання з коментарями</text:p>
      <text:p text:style-name="P5">г. Висновок</text:p>
      <text:p text:style-name="P5"/>
      <text:p text:style-name="P5">9. Надіслати звіт (.docx або .doc) у Google Classroom перед</text:p>
      <text:p text:style-name="P5">захистом на парі.</text:p>
      <text:p text:style-name="P5"/>
      <text:p text:style-name="Preformatted_20_Text"/>
      <text:p text:style-name="Preformatted_20_Text"/>
      <text:p text:style-name="Preformatted_20_Text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Виконання:</text:p>
      <text:p text:style-name="P6"/>
      <text:p text:style-name="P7">Пункт <text:span text:style-name="T2">1:</text:span></text:p>
      <text:p text:style-name="P8">Завантажив дані з сайту за період 1895-2026 роки (методичка мабуть була написана в 2024), тепер ці дані можна відформатувати і зберегти окремим <text:span text:style-name="T3">csv файлом, для цього використано наступний код:</text:span></text:p>
      <text:p text:style-name="P8"/>
      <text:p text:style-name="P8">---</text:p>
      <text:p text:style-name="P8">import pandas as pd</text:p>
      <text:p text:style-name="P8"/>
      <text:p text:style-name="P8">rnyc = pd.read_csv('data/data.csv')</text:p>
      <text:p text:style-name="P8"/>
      <text:p text:style-name="P8">print(' Raw data '.center(20, '#'))</text:p>
      <text:p text:style-name="P8">print(rnyc.head())</text:p>
      <text:p text:style-name="P8">print(rnyc.tail())</text:p>
      <text:p text:style-name="P8"/>
      <text:p text:style-name="P8">rnyc.columns = ['Date', 'Temperature', 'Anomaly']</text:p>
      <text:p text:style-name="P8">#print(nyc.Date.dtype)</text:p>
      <text:p text:style-name="P8">rnyc.Date = rnyc.Date.floordiv(100)</text:p>
      <text:p text:style-name="P8"/>
      <text:p text:style-name="P8">print(' Formatted data '.center(20, '#'))</text:p>
      <text:p text:style-name="P8">print(rnyc.head())</text:p>
      <text:p text:style-name="P8">print(rnyc.tail())</text:p>
      <text:p text:style-name="P8"/>
      <text:p text:style-name="P8">rnyc.to_csv('data/formatted_data.csv', index=False)</text:p>
      <text:p text:style-name="P8">---</text:p>
      <text:p text:style-name="P8">---</text:p>
      <text:p text:style-name="P8">/home/misha/Documents/2sem26/ml/.venv/bin/python /home/misha/Documents/2sem26/ml/lab2/1_format_data.py </text:p>
      <text:p text:style-name="P8">##### Raw data #####</text:p>
      <text:p text:style-name="P8"><text:s text:c="5"/>Date <text:s/>Value <text:s/>Anomaly</text:p>
      <text:p text:style-name="P8">0 <text:s/>189501 <text:s text:c="2"/>28.4 <text:s text:c="4"/>-3.0</text:p>
      <text:p text:style-name="P8">1 <text:s/>189601 <text:s text:c="2"/>27.8 <text:s text:c="4"/>-3.6</text:p>
      <text:p text:style-name="P8">2 <text:s/>189701 <text:s text:c="2"/>28.6 <text:s text:c="4"/>-2.8</text:p>
      <text:p text:style-name="P8">3 <text:s/>189801 <text:s text:c="2"/>33.2 <text:s text:c="5"/>1.8</text:p>
      <text:p text:style-name="P8">4 <text:s/>189901 <text:s text:c="2"/>29.2 <text:s text:c="4"/>-2.2</text:p>
      <text:p text:style-name="P8"><text:s text:c="7"/>Date <text:s/>Value <text:s/>Anomaly</text:p>
      <text:p text:style-name="P8">127 <text:s/>202201 <text:s text:c="2"/>30.4 <text:s text:c="4"/>-1.0</text:p>
      <text:p text:style-name="P8">128 <text:s/>202301 <text:s text:c="2"/>43.5 <text:s text:c="4"/>12.1</text:p>
      <text:p text:style-name="P8">129 <text:s/>202401 <text:s text:c="2"/>37.0 <text:s text:c="5"/>5.6</text:p>
      <text:p text:style-name="P8">130 <text:s/>202501 <text:s text:c="2"/>31.3 <text:s text:c="4"/>-0.1</text:p>
      <text:p text:style-name="P8">131 <text:s/>202601 <text:s text:c="2"/>30.4 <text:s text:c="4"/>-1.0</text:p>
      <text:p text:style-name="P8">## Formatted data ##</text:p>
      <text:p text:style-name="P8"><text:s text:c="3"/>Date <text:s/>Temperature <text:s/>Anomaly</text:p>
      <text:p text:style-name="P8">0 <text:s/>1895 <text:s text:c="8"/>28.4 <text:s text:c="4"/>-3.0</text:p>
      <text:p text:style-name="P8">1 <text:s/>1896 <text:s text:c="8"/>27.8 <text:s text:c="4"/>-3.6</text:p>
      <text:p text:style-name="P8">2 <text:s/>1897 <text:s text:c="8"/>28.6 <text:s text:c="4"/>-2.8</text:p>
      <text:p text:style-name="P8">3 <text:s/>1898 <text:s text:c="8"/>33.2 <text:s text:c="5"/>1.8</text:p>
      <text:p text:style-name="P8">4 <text:s/>1899 <text:s text:c="8"/>29.2 <text:s text:c="4"/>-2.2</text:p>
      <text:p text:style-name="P8"><text:s text:c="5"/>Date <text:s/>Temperature <text:s/>Anomaly</text:p>
      <text:p text:style-name="P8">127 <text:s/>2022 <text:s text:c="8"/>30.4 <text:s text:c="4"/>-1.0</text:p>
      <text:p text:style-name="P8"><text:soft-page-break/>128 <text:s/>2023 <text:s text:c="8"/>43.5 <text:s text:c="4"/>12.1</text:p>
      <text:p text:style-name="P8">129 <text:s/>2024 <text:s text:c="8"/>37.0 <text:s text:c="5"/>5.6</text:p>
      <text:p text:style-name="P8">130 <text:s/>2025 <text:s text:c="8"/>31.3 <text:s text:c="4"/>-0.1</text:p>
      <text:p text:style-name="P8">131 <text:s/>2026 <text:s text:c="8"/>30.4 <text:s text:c="4"/>-1.0</text:p>
      <text:p text:style-name="P8"/>
      <text:p text:style-name="P8">Process finished with exit code 0</text:p>
      <text:p text:style-name="P9">---</text:p>
      <text:p text:style-name="P8"/>
      <text:p text:style-name="P10">Пункт 2:</text:p>
      <text:p text:style-name="P11">Побудую регресивну пряму завдяки бібліотеці seaborn. Зображення буде збережено – це більш надійно (якщо одразу показувати на різних машинах можуть бути проблеми з бекендом пайтона):</text:p>
      <text:p text:style-name="P11"/>
      <text:p text:style-name="P11">---</text:p>
      <text:p text:style-name="P11">import seaborn as sns</text:p>
      <text:p text:style-name="P11">import matplotlib.pyplot as plt</text:p>
      <text:p text:style-name="P11">import pandas as pd</text:p>
      <text:p text:style-name="P11"/>
      <text:p text:style-name="P11">nyc = pd.read_csv('data/formatted_data.csv')</text:p>
      <text:p text:style-name="P11"/>
      <text:p text:style-name="P11">years = nyc['Date'][nyc['Date'] &lt;= 2020]</text:p>
      <text:p text:style-name="P11">#print(years)</text:p>
      <text:p text:style-name="P11">temp = nyc['Temperature'][nyc['Date'] &lt;= 2020]</text:p>
      <text:p text:style-name="P11">#print(temp)</text:p>
      <text:p text:style-name="P11"/>
      <text:p text:style-name="P11">sns.regplot(x=years, y=temp,ci=None,scatter = False)</text:p>
      <text:p text:style-name="P11">plt.savefig('./data/plots/linregr_partial.png')</text:p>
      <text:p text:style-name="P11">plt.close()</text:p>
      <text:p text:style-name="P11">---</text:p>
      <text:p text:style-name="P11">---</text:p>
      <text:p text:style-name="P11"><draw:frame draw:style-name="fr1" draw:name="Image1" text:anchor-type="as-char" svg:y="-3.618cm" svg:width="12.107cm" svg:height="9.081cm" draw:z-index="0"><draw:image xlink:href="Pictures/1000000000000280000001E098DC0E2B.png" xlink:type="simple" xlink:show="embed" xlink:actuate="onLoad" draw:mime-type="image/png"/></draw:frame></text:p>
      <text:p text:style-name="P11"/>
      <text:p text:style-name="P11">---</text:p>
      <text:p text:style-name="P11"/>
      <text:p text:style-name="P11"/>
      <text:p text:style-name="P12"><text:soft-page-break/></text:p>
      <text:p text:style-name="P13">Пункт 3:</text:p>
      <text:p text:style-name="P14">Використавши модуль scipy.stats спрогнозуємо дані за 2021-2026 роки, використовуючи формулу прямої лінії на площині y=kx+b :</text:p>
      <text:p text:style-name="P14"/>
      <text:p text:style-name="P14">---</text:p>
      <text:p text:style-name="P14">import pandas as pd</text:p>
      <text:p text:style-name="P14">import scipy.stats as stats</text:p>
      <text:p text:style-name="P14"/>
      <text:p text:style-name="P14">nyc = pd.read_csv('./data/formatted_data.csv')</text:p>
      <text:p text:style-name="P14"/>
      <text:p text:style-name="P14">linear_regression = stats.linregress(nyc['Date'], nyc['Temperature'])</text:p>
      <text:p text:style-name="P14"/>
      <text:p text:style-name="P14">#print(linear_regression.slope)</text:p>
      <text:p text:style-name="P14">#print(linear_regression.intercept)</text:p>
      <text:p text:style-name="P14"/>
      <text:p text:style-name="P14">pred_2021 = linear_regression.slope * 2021 + linear_regression.intercept</text:p>
      <text:p text:style-name="P14">pred_2022 = linear_regression.slope * 2022 + linear_regression.intercept</text:p>
      <text:p text:style-name="P14">pred_2023 = linear_regression.slope * 2023 + linear_regression.intercept</text:p>
      <text:p text:style-name="P14">pred_2024 = linear_regression.slope * 2024 + linear_regression.intercept</text:p>
      <text:p text:style-name="P14">pred_2025 = linear_regression.slope * 2025 + linear_regression.intercept</text:p>
      <text:p text:style-name="P14">pred_2026 = linear_regression.slope * 2026 + linear_regression.intercept</text:p>
      <text:p text:style-name="P14"/>
      <text:p text:style-name="P14">print('Predictions')</text:p>
      <text:p text:style-name="P14">print('2021:', pred_2021)</text:p>
      <text:p text:style-name="P14">print('2022:', pred_2022)</text:p>
      <text:p text:style-name="P14">print('2023:', pred_2023)</text:p>
      <text:p text:style-name="P14">print('2024:', pred_2024)</text:p>
      <text:p text:style-name="P14">print('2025:', pred_2025)</text:p>
      <text:p text:style-name="P14">print('2026:', pred_2026)</text:p>
      <text:p text:style-name="P14">---</text:p>
      <text:p text:style-name="P14">---</text:p>
      <text:p text:style-name="P14">/home/misha/Documents/2sem26/ml/.venv/bin/python /home/misha/Documents/2sem26/ml/lab2/3_future_predictions.py </text:p>
      <text:p text:style-name="P14">Predictions</text:p>
      <text:p text:style-name="P14">2021: 33.35297082052808</text:p>
      <text:p text:style-name="P14">2022: 33.38583985988567</text:p>
      <text:p text:style-name="P14">2023: 33.41870889924325</text:p>
      <text:p text:style-name="P14">2024: 33.45157793860084</text:p>
      <text:p text:style-name="P14">2025: 33.484446977958434</text:p>
      <text:p text:style-name="P14">2026: 33.51731601731603</text:p>
      <text:p text:style-name="P14"/>
      <text:p text:style-name="P14">Process finished with exit code 0</text:p>
      <text:p text:style-name="P14">---</text:p>
      <text:p text:style-name="P15"/>
      <text:p text:style-name="P15"/>
      <text:p text:style-name="P16"><text:soft-page-break/></text:p>
      <text:p text:style-name="P16">Пункт 4:</text:p>
      <text:p text:style-name="P17">Виконання ідентичне до минулого пункту, варто лише змінити роки:</text:p>
      <text:p text:style-name="P17"/>
      <text:p text:style-name="P17">---</text:p>
      <text:p text:style-name="P17">import pandas as pd</text:p>
      <text:p text:style-name="P17">import scipy.stats as stats</text:p>
      <text:p text:style-name="P17"/>
      <text:p text:style-name="P17">nyc = pd.read_csv('./data/formatted_data.csv')</text:p>
      <text:p text:style-name="P17"/>
      <text:p text:style-name="P17">linear_regression = stats.linregress(nyc['Date'], nyc['Temperature'])</text:p>
      <text:p text:style-name="P17"/>
      <text:p text:style-name="P17">#print(linear_regression.slope)</text:p>
      <text:p text:style-name="P17">#print(linear_regression.intercept)</text:p>
      <text:p text:style-name="P17"/>
      <text:p text:style-name="P17">pred_1894 = linear_regression.slope * 1894 + linear_regression.intercept</text:p>
      <text:p text:style-name="P17">pred_1893 = linear_regression.slope * 1893 + linear_regression.intercept</text:p>
      <text:p text:style-name="P17">pred_1892 = linear_regression.slope * 1892 + linear_regression.intercept</text:p>
      <text:p text:style-name="P17">pred_1891 = linear_regression.slope * 1891 + linear_regression.intercept</text:p>
      <text:p text:style-name="P17">pred_1890 = linear_regression.slope * 1890 + linear_regression.intercept</text:p>
      <text:p text:style-name="P17">pred_1889 = linear_regression.slope * 1889 + linear_regression.intercept</text:p>
      <text:p text:style-name="P17"/>
      <text:p text:style-name="P17">print('Predictions')</text:p>
      <text:p text:style-name="P17">print('1894:', pred_1894)</text:p>
      <text:p text:style-name="P17">print('1893:', pred_1893)</text:p>
      <text:p text:style-name="P17">print('1892:', pred_1892)</text:p>
      <text:p text:style-name="P17">print('1891:', pred_1891)</text:p>
      <text:p text:style-name="P17">print('1890:', pred_1890)</text:p>
      <text:p text:style-name="P17">print('1889:', pred_1889)</text:p>
      <text:p text:style-name="P17">---</text:p>
      <text:p text:style-name="P17">---</text:p>
      <text:p text:style-name="P17">/home/misha/Documents/2sem26/ml/.venv/bin/python /home/misha/Documents/2sem26/ml/lab2/4_past_predictions.py </text:p>
      <text:p text:style-name="P17">Predictions</text:p>
      <text:p text:style-name="P17">1894: 29.17860282211427</text:p>
      <text:p text:style-name="P17">1893: 29.145733782756686</text:p>
      <text:p text:style-name="P17">1892: 29.112864743399093</text:p>
      <text:p text:style-name="P17">1891: 29.079995704041508</text:p>
      <text:p text:style-name="P17">1890: 29.047126664683915</text:p>
      <text:p text:style-name="P17">1889: 29.01425762532633</text:p>
      <text:p text:style-name="P17"/>
      <text:p text:style-name="P17">Process finished with exit code 0</text:p>
      <text:p text:style-name="P17">---</text:p>
      <text:p text:style-name="P17"/>
      <text:p text:style-name="P17"/>
      <text:p text:style-name="P17"/>
      <text:p text:style-name="P17"><text:soft-page-break/></text:p>
      <text:p text:style-name="P18"/>
      <text:p text:style-name="P18"/>
      <text:p text:style-name="P18">Пункт 5,<text:span text:style-name="T4">6</text:span>:</text:p>
      <text:p text:style-name="P19">Зміню стиль графіка на ‘<text:span text:style-name="T5">whitegrid</text:span>’, спочатку створю графік завдяки функції <text:span text:style-name="T5">regplot() бібліотеки seaborn, збережу його. Потім відформатую графік, а саме задам максимальні значення осі y вручну:</text:span></text:p>
      <text:p text:style-name="P19"/>
      <text:p text:style-name="P19">---</text:p>
      <text:p text:style-name="P19">import seaborn as sns</text:p>
      <text:p text:style-name="P19">import matplotlib.pyplot as plt</text:p>
      <text:p text:style-name="P19">import pandas as pd</text:p>
      <text:p text:style-name="P19"/>
      <text:p text:style-name="P19">nyc = pd.read_csv('data/formatted_data.csv')</text:p>
      <text:p text:style-name="P19"/>
      <text:p text:style-name="P19">sns.set_style('whitegrid')</text:p>
      <text:p text:style-name="P19">axes = sns.regplot(x=nyc['Date'], y=nyc['Temperature'],ci=None)</text:p>
      <text:p text:style-name="P19">plt.savefig('./data/plots/linregr_full.png')</text:p>
      <text:p text:style-name="P19">#plt.close()</text:p>
      <text:p text:style-name="P19"/>
      <text:p text:style-name="P19">#formatting</text:p>
      <text:p text:style-name="P19"/>
      <text:p text:style-name="P19">axes.set_ylim(10,70)</text:p>
      <text:p text:style-name="P19"/>
      <text:p text:style-name="P19">plt.savefig('./data/plots/linregr_formatted.png')</text:p>
      <text:p text:style-name="P19">plt.close()</text:p>
      <text:p text:style-name="P19">---</text:p>
      <text:p text:style-name="P19">---</text:p>
      <text:p text:style-name="P19"><draw:frame draw:style-name="fr2" draw:name="Image2" text:anchor-type="as-char" svg:width="7.234cm" svg:height="5.424cm" draw:z-index="1"><draw:image xlink:href="Pictures/1000000000000280000001E067101AA1.png" xlink:type="simple" xlink:show="embed" xlink:actuate="onLoad" draw:mime-type="image/png"/></draw:frame><text:s/><draw:frame draw:style-name="fr2" draw:name="Image3" text:anchor-type="as-char" svg:width="7.257cm" svg:height="5.442cm" draw:z-index="2"><draw:image xlink:href="Pictures/1000000000000280000001E06179C688.png" xlink:type="simple" xlink:show="embed" xlink:actuate="onLoad" draw:mime-type="image/png"/></draw:frame></text:p>
      <text:p text:style-name="P19">---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Пункт <text:span text:style-name="T6">7:</text:span></text:p>
      <text:p text:style-name="P21">Порівняю фактичні значення температури за 2021-2026 роки з передбаченнями з третього пунтку.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Рік</text:p>
          </table:table-cell>
          <table:table-cell table:style-name="Table1.A1" office:value-type="string">
            <text:p text:style-name="P23"><text:span text:style-name="T7">Передбачена температура,</text:span>°F<text:span text:style-name="T7">.</text:span></text:p>
          </table:table-cell>
          <table:table-cell table:style-name="Table1.C1" office:value-type="string">
            <text:p text:style-name="P22">Фактична температура,°F.</text:p>
          </table:table-cell>
        </table:table-row>
        <table:table-row>
          <table:table-cell table:style-name="Table1.A2" office:value-type="string">
            <text:p text:style-name="P24">2021</text:p>
          </table:table-cell>
          <table:table-cell table:style-name="Table1.A2" office:value-type="string">
            <text:p text:style-name="P25">≈<text:span text:style-name="T8">33.35</text:span></text:p>
          </table:table-cell>
          <table:table-cell table:style-name="Table1.C2" office:value-type="string">
            <text:p text:style-name="P26">34.8</text:p>
          </table:table-cell>
        </table:table-row>
        <table:table-row>
          <table:table-cell table:style-name="Table1.A2" office:value-type="string">
            <text:p text:style-name="P24">2022</text:p>
          </table:table-cell>
          <table:table-cell table:style-name="Table1.A2" office:value-type="string">
            <text:p text:style-name="P25">≈<text:span text:style-name="T8">33.39</text:span></text:p>
          </table:table-cell>
          <table:table-cell table:style-name="Table1.C2" office:value-type="string">
            <text:p text:style-name="P26">30.4</text:p>
          </table:table-cell>
        </table:table-row>
        <table:table-row>
          <table:table-cell table:style-name="Table1.A2" office:value-type="string">
            <text:p text:style-name="P24">2023</text:p>
          </table:table-cell>
          <table:table-cell table:style-name="Table1.A2" office:value-type="string">
            <text:p text:style-name="P25">≈<text:span text:style-name="T8">33.42</text:span></text:p>
          </table:table-cell>
          <table:table-cell table:style-name="Table1.C2" office:value-type="string">
            <text:p text:style-name="P26">43.5</text:p>
          </table:table-cell>
        </table:table-row>
        <table:table-row>
          <table:table-cell table:style-name="Table1.A2" office:value-type="string">
            <text:p text:style-name="P24">2024</text:p>
          </table:table-cell>
          <table:table-cell table:style-name="Table1.A2" office:value-type="string">
            <text:p text:style-name="P25">≈<text:span text:style-name="T8">33.45</text:span></text:p>
          </table:table-cell>
          <table:table-cell table:style-name="Table1.C2" office:value-type="string">
            <text:p text:style-name="P27"><text:span text:style-name="T9">37.0</text:span></text:p>
          </table:table-cell>
        </table:table-row>
        <table:table-row>
          <table:table-cell table:style-name="Table1.A2" office:value-type="string">
            <text:p text:style-name="P24">2025</text:p>
          </table:table-cell>
          <table:table-cell table:style-name="Table1.A2" office:value-type="string">
            <text:p text:style-name="P25">≈<text:span text:style-name="T8">33.48</text:span></text:p>
          </table:table-cell>
          <table:table-cell table:style-name="Table1.C2" office:value-type="string">
            <text:p text:style-name="P26">31.3</text:p>
          </table:table-cell>
        </table:table-row>
        <table:table-row>
          <table:table-cell table:style-name="Table1.A2" office:value-type="string">
            <text:p text:style-name="P24">2026</text:p>
          </table:table-cell>
          <table:table-cell table:style-name="Table1.A2" office:value-type="string">
            <text:p text:style-name="P25">≈<text:span text:style-name="T8">33.52</text:span></text:p>
          </table:table-cell>
          <table:table-cell table:style-name="Table1.C2" office:value-type="string">
            <text:p text:style-name="P26">30.4</text:p>
          </table:table-cell>
        </table:table-row>
      </table:table>
      <text:p text:style-name="P28"/>
      <text:p text:style-name="P29">Результати не співпадають, бо регресійна лінія лише описує тренд, тобто найвижча ймовірність температури передбачених наперед років знаходиться в околі обрахованих значень.</text:p>
      <text:p text:style-name="P29"/>
      <text:p text:style-name="P30">Висновки:</text:p>
      <text:p text:style-name="P30"/>
      <text:p text:style-name="P17">В ході виконання лабораторної роботи я навчився створювати графіки лінійної регресії завдяки бібліотеці <text:span text:style-name="T10">seaborn для мови python, навчився передбачати майбутні показники, використовуючи лінійну регресію.</text:span></text:p>
      <text:p text:style-name="P17"/>
      <text:p text:style-name="P17">Було порівняно результати передбачень температури на <text:span text:style-name="T11">2021-2026 роки, жодні числа не співпали, похибка була приблизно від 2 до 10 градусів за Фаренгейтом. Проте це не є поганим результатом. Передбачена температура це лише значення, яке з найбільшою ймовірністю буде істинним, а ніяк не точне передбачення. Для точного передбачення лише аналізувати статистику недостатньо, такими передбаченнями займається метеорологія.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7T01:17:11.869616892</dc:date>
    <meta:editing-duration>PT1H35M34S</meta:editing-duration>
    <meta:editing-cycles>78</meta:editing-cycles>
    <meta:generator>LibreOffice/25.8.5.2$Linux_X86_64 LibreOffice_project/580$Build-2</meta:generator>
    <meta:document-statistic meta:table-count="1" meta:image-count="3" meta:object-count="0" meta:page-count="8" meta:paragraph-count="233" meta:word-count="951" meta:character-count="8206" meta:non-whitespace-character-count="7054"/>
  </office:meta>
</office:document-meta>
</file>